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7d3" officeooo:paragraph-rsid="000c47d3"/>
    </style:style>
    <style:style style:name="P2" style:family="paragraph" style:parent-style-name="Standard">
      <style:text-properties officeooo:rsid="000f2682" officeooo:paragraph-rsid="000f2682"/>
    </style:style>
    <style:style style:name="P3" style:family="paragraph" style:parent-style-name="Standard">
      <style:text-properties officeooo:rsid="000c47d3" officeooo:paragraph-rsid="000c47d3"/>
    </style:style>
    <style:style style:name="T1" style:family="text">
      <style:text-properties officeooo:rsid="00103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>Minutes of Meeting – 2021/07/08</text:p>
      <text:p text:style-name="P1"/>
      <text:p text:style-name="P1">Information available <text:span text:style-name="T1">on Tubes</text:span>:</text:p>
      <text:p text:style-name="P1">1. Tubes has values of Fin_Lot and Material_Spec printed on it.</text:p>
      <text:p text:style-name="P1"/>
      <text:p text:style-name="P1">Information available in Invoice in SAP:</text:p>
      <text:p text:style-name="P1">Inventory Increase of Districutor:</text:p>
      <text:p text:style-name="P1">1. Batch_No (Charge) and Invoice_No will combines is unique for the inventory of a distributor.</text:p>
      <text:p text:style-name="P1">2. Batch_No is assigned to a Fin_Lot. Hence we can say that, a Fin_Lot may contain multiple Batch_No.</text:p>
      <text:p text:style-name="P1">3. Total No of tubes supplied to districutor is the aggregated value of Charge_Val against a Fin_Lot.</text:p>
      <text:p text:style-name="P1">4. Inventory of distributor will be decreased in FIFO manner.</text:p>
      <text:p text:style-name="P1"/>
      <text:p text:style-name="P1"/>
      <text:p text:style-name="P1">TC Generation:</text:p>
      <text:p text:style-name="P1">1. Orders will be placed against Material_Description and Fin_Lot using the Web Portal.</text:p>
      <text:p text:style-name="P1">2. Distributor inventory will be decreased in FIFO manner.</text:p>
      <text:p text:style-name="P1">3. For each Inv_No or Challan_No, saperate TC will be generated.</text:p>
      <text:p text:style-name="P1">4. For different Materail_Description, saperate TC will be generated.</text:p>
      <text:p text:style-name="P1">5. Fin_Lot orders against the Material_Description should be contained in the generated TC.</text:p>
      <text:p text:style-name="P1">6. In each TC, the tensile report will be the values provided in the Invoice against the FinLot no.</text:p>
      <text:p text:style-name="P1">7. The distributor will decrease their physical inventory based on the information available in the generated TC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13:43:18.106541294</meta:creation-date>
    <dc:date>2021-07-09T14:01:04.345082992</dc:date>
    <meta:editing-duration>PT4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82" meta:character-count="1152" meta:non-whitespace-character-count="986"/>
  </office:meta>
</office:document-meta>
</file>