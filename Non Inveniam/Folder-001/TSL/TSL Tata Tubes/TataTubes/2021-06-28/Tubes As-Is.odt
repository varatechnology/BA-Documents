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9a6" officeooo:paragraph-rsid="001069a6"/>
    </style:style>
    <style:style style:name="P2" style:family="paragraph" style:parent-style-name="Standard">
      <style:text-properties officeooo:rsid="001069a6" officeooo:paragraph-rsid="0011f509"/>
    </style:style>
    <style:style style:name="P3" style:family="paragraph" style:parent-style-name="Standard">
      <style:text-properties officeooo:paragraph-rsid="001069a6"/>
    </style:style>
    <style:style style:name="P4" style:family="paragraph" style:parent-style-name="Standard">
      <style:text-properties officeooo:rsid="0011f509" officeooo:paragraph-rsid="0011f509"/>
    </style:style>
    <style:style style:name="P5" style:family="paragraph" style:parent-style-name="Standard">
      <style:text-properties officeooo:rsid="001205ac" officeooo:paragraph-rsid="001291c9"/>
    </style:style>
    <style:style style:name="P6" style:family="paragraph" style:parent-style-name="Standard">
      <style:text-properties officeooo:rsid="001291c9" officeooo:paragraph-rsid="001291c9"/>
    </style:style>
    <style:style style:name="P7" style:family="paragraph" style:parent-style-name="Standard">
      <style:text-properties officeooo:paragraph-rsid="001291c9"/>
    </style:style>
    <style:style style:name="P8" style:family="paragraph" style:parent-style-name="Standard">
      <style:text-properties officeooo:rsid="00148e5d" officeooo:paragraph-rsid="00148e5d"/>
    </style:style>
    <style:style style:name="P9" style:family="paragraph" style:parent-style-name="Standard">
      <style:text-properties officeooo:paragraph-rsid="001798d0"/>
    </style:style>
    <style:style style:name="P10" style:family="paragraph" style:parent-style-name="Standard">
      <style:text-properties fo:color="#355269" officeooo:rsid="001761f7" officeooo:paragraph-rsid="001761f7"/>
    </style:style>
    <style:style style:name="P11" style:family="paragraph" style:parent-style-name="Standard">
      <style:text-properties fo:color="#355269" officeooo:paragraph-rsid="001761f7"/>
    </style:style>
    <style:style style:name="P12" style:family="paragraph" style:parent-style-name="Standard">
      <style:text-properties fo:color="#355269" officeooo:rsid="001798d0" officeooo:paragraph-rsid="001798d0"/>
    </style:style>
    <style:style style:name="P13" style:family="paragraph" style:parent-style-name="Standard">
      <style:text-properties fo:color="#355269" officeooo:paragraph-rsid="001798d0"/>
    </style:style>
    <style:style style:name="P14" style:family="paragraph" style:parent-style-name="Standard">
      <style:text-properties fo:color="#355269" officeooo:rsid="001880c6" officeooo:paragraph-rsid="001880c6"/>
    </style:style>
    <style:style style:name="P15" style:family="paragraph" style:parent-style-name="Standard">
      <style:text-properties fo:color="#355269" officeooo:rsid="0019c1ce" officeooo:paragraph-rsid="0019c1ce"/>
    </style:style>
    <style:style style:name="P16" style:family="paragraph" style:parent-style-name="Standard">
      <style:text-properties fo:color="#355269" officeooo:rsid="001d77aa" officeooo:paragraph-rsid="001d77aa"/>
    </style:style>
    <style:style style:name="T1" style:family="text">
      <style:text-properties officeooo:rsid="001069a6"/>
    </style:style>
    <style:style style:name="T2" style:family="text">
      <style:text-properties officeooo:rsid="0011f509"/>
    </style:style>
    <style:style style:name="T3" style:family="text">
      <style:text-properties officeooo:rsid="001205ac"/>
    </style:style>
    <style:style style:name="T4" style:family="text">
      <style:text-properties officeooo:rsid="001291c9"/>
    </style:style>
    <style:style style:name="T5" style:family="text">
      <style:text-properties officeooo:rsid="00148e5d"/>
    </style:style>
    <style:style style:name="T6" style:family="text">
      <style:text-properties officeooo:rsid="001594ae"/>
    </style:style>
    <style:style style:name="T7" style:family="text">
      <style:text-properties officeooo:rsid="001761f7"/>
    </style:style>
    <style:style style:name="T8" style:family="text">
      <style:text-properties officeooo:rsid="001798d0"/>
    </style:style>
    <style:style style:name="T9" style:family="text">
      <style:text-properties officeooo:rsid="0019c1ce"/>
    </style:style>
    <style:style style:name="T10" style:family="text">
      <style:text-properties officeooo:rsid="001b88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bNext As-Is Process:</text:p>
      <text:p text:style-name="P1"/>
      <text:p text:style-name="P1">1. When data comes from SAP, it contains</text:p>
      <text:p text:style-name="P1"><text:tab/>a. Array of Invoice Customer Details ( DEL_NO, MATNR, CAST_NO, LOT_NO )</text:p>
      <text:p text:style-name="P3"><text:span text:style-name="T1"><text:tab/>b. Mechanical Property Result ( MATNR )</text:span></text:p>
      <text:p text:style-name="P3"><text:span text:style-name="T1"><text:tab/>c. Customer Details ( Sold to Party Id )<text:tab/></text:span></text:p>
      <text:p text:style-name="P3"><text:span text:style-name="T1"><text:tab/>d. Material Spec Details ( INV_NO, SAL_NO, DEL_NO, CAST_NO, </text:span><text:span text:style-name="T2">LOT_NO, </text:span><text:span text:style-name="T3">CHARGE_VAL</text:span><text:span text:style-name="T1"> )</text:span></text:p>
      <text:p text:style-name="P1">As per understanding:</text:p>
      <text:p text:style-name="P1"><text:tab/>a. INV_NO, SAL_NO, DEL_NO is unique all the place for a invoice</text:p>
      <text:p text:style-name="P3"><text:span text:style-name="T1"><text:tab/>b. CAST_NO </text:span><text:span text:style-name="T2">and LOT_NO</text:span><text:span text:style-name="T1"> </text:span><text:span text:style-name="T2">signifies the Material Spec Details or Chemical Composition</text:span></text:p>
      <text:p text:style-name="P3"><text:span text:style-name="T2"><text:tab/>c. MATNR is unique to get the material description.</text:span></text:p>
      <text:p text:style-name="P3"/>
      <text:p text:style-name="P1"/>
      <text:p text:style-name="P2">2. <text:span text:style-name="T2">A record in the form of TC Master is saved into blockchain. TC Master stores the useful information in convenient place.</text:span></text:p>
      <text:p text:style-name="P4">3. Not only TC Master is saved, but also M<text:span text:style-name="T3">aterial Spec Details as CHEM_SPEC, TENSILE_TEST, TC_Material.</text:span></text:p>
      <text:p text:style-name="P5">4. <text:span text:style-name="T4">Some common properties,</text:span></text:p>
      <text:p text:style-name="P5"><text:span text:style-name="T4"><text:tab/>a. CHEM_SPEC ( LOT_NO, Cast_No as HEAT_NO )</text:span></text:p>
      <text:p text:style-name="P5"><text:tab/><text:span text:style-name="T4">b. TENSILE_TEST ( LOT_NO, Cast_No as HEAT_NO )</text:span></text:p>
      <text:p text:style-name="P5"><text:span text:style-name="T4"><text:tab/>c. TC_Material ( MATNR )</text:span></text:p>
      <text:p text:style-name="P6">5. STOCK is also created against ChallanNo, Material No, LotNo, SoldToPartyId.</text:p>
      <text:p text:style-name="P6"><text:tab/>a. LotNo is used for stock increasing and decreasing.</text:p>
      <text:p text:style-name="P6"><text:tab/><text:span text:style-name="T9">b. CHARGE_VAL is used to increase the stock.</text:span></text:p>
      <text:p text:style-name="P6">6. When order request comes, it first tries to decrease the stock by LotNo, then creates the ORF.</text:p>
      <text:p text:style-name="P7"><text:span text:style-name="T4"><text:tab/>a. ORF request fetches </text:span><text:span text:style-name="T5">the user details, then try to decrease the stock, if it success then creates the ORF using user provided informations.</text:span></text:p>
      <text:p text:style-name="P8">7. At the time of TC Request,</text:p>
      <text:p text:style-name="P8"><text:tab/>a. It fetches the ORF and use the infomations to create the TC.</text:p>
      <text:p text:style-name="P8">8. <text:span text:style-name="T6">Batch Program Fetches those TC Request and send the TC in pdf to buyers email.</text:span></text:p>
      <text:p text:style-name="P9"><text:span text:style-name="T8">9. Return Request contains Buyer, Seller, materialNo, lotNo, qnty.</text:span></text:p>
      <text:p text:style-name="P6"/>
      <text:p text:style-name="P6"/>
      <text:p text:style-name="P10">Solution:</text:p>
      <text:p text:style-name="P11"><text:span text:style-name="T7">1. Stocking should be done for LotNo+MatNo+</text:span><text:span text:style-name="T8">ChallanNo</text:span><text:span text:style-name="T7">+PartyId.</text:span></text:p>
      <text:p text:style-name="P12">2. As the product details of an order comes from Web, we need to change the payload as well.</text:p>
      <text:p text:style-name="P13"><text:span text:style-name="T8">3. Return request should also include the ChallanNo.</text:span></text:p>
      <text:p text:style-name="P14">4. After that, when a new TC request comes, then generate for every MatNo+LotNo+ChallanNo int the ORF.</text:p>
      <text:p text:style-name="P15">5. We need to store the details of MaterialDescription for the challan also.</text:p>
      <text:p text:style-name="P15">6. CHARGE_VAL can differ for a lot no in an invoice. So there is greater possibility of creaditing wrong quantity. <text:span text:style-name="T10">So, we need to have clear idea, how many qnty should be increased by reading the invoice details pushed from SAP.</text:span></text:p>
      <text:p text:style-name="P15">7. There is also a field NO_OF_TUBES in Mechanical_Property_Result, what is the use of this ?</text:p>
      <text:p text:style-name="P16">8. TC in the form of PDF may also be addres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5:14:44.914843443</meta:creation-date>
    <dc:date>2021-06-30T11:55:41.650714576</dc:date>
    <meta:editing-duration>PT19H38M1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398" meta:character-count="2300" meta:non-whitespace-character-count="1921"/>
  </office:meta>
</office:document-meta>
</file>