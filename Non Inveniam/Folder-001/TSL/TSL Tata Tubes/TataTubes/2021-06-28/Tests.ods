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42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8.878cm"/>
    </style:style>
    <style:style style:name="co7" style:family="table-column">
      <style:table-column-properties fo:break-before="auto" style:column-width="10.185cm"/>
    </style:style>
    <style:style style:name="co8" style:family="table-column">
      <style:table-column-properties fo:break-before="auto" style:column-width="9.095cm"/>
    </style:style>
    <style:style style:name="co9" style:family="table-column">
      <style:table-column-properties fo:break-before="auto" style:column-width="6.345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fo:background-color="#afd095"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b66c" fo:wrap-option="wrap" style:vertical-align="top"/>
    </style:style>
    <style:style style:name="ce29" style:family="table-cell" style:parent-style-name="Default">
      <style:table-cell-properties fo:background-color="#ffff00" fo:wrap-option="wrap" style:vertical-align="top"/>
    </style:style>
    <style:style style:name="ce30" style:family="table-cell" style:parent-style-name="Default">
      <style:table-cell-properties fo:background-color="#77bc65" fo:wrap-option="wrap" style:vertical-align="top"/>
    </style:style>
    <style:style style:name="ce31" style:family="table-cell" style:parent-style-name="Default">
      <style:table-cell-properties fo:background-color="#ffff00" fo:wrap-option="wrap" style:vertical-align="top"/>
      <style:text-properties style:font-name="Liberation Sans"/>
    </style:style>
    <style:style style:name="ce35" style:family="table-cell" style:parent-style-name="Default">
      <style:table-cell-properties fo:background-color="#729fcf" fo:border="0.06pt solid #000000"/>
    </style:style>
    <style:style style:name="ce36" style:family="table-cell" style:parent-style-name="Default">
      <style:table-cell-properties fo:background-color="#ffff00"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wrap-option="wrap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asian="DejaVu Sans" style:font-name-complex="DejaVu Sans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tributor Creation is requested with already exists User Phone Number</text:p>
          </table:table-cell>
          <table:table-cell office:value-type="string" calcext:value-type="string">
            <text:p>1. Success on creation</text:p>
            <text:p>2. While sign up, failed to sign up.</text:p>
            <text:p>3. Changed the phone number on WEB UI, but still it reads the old phone number by which it is created.</text:p>
          </table:table-cell>
          <table:table-cell office:value-type="string" calcext:value-type="string">
            <text:p>1. No Error</text:p>
            <text:p>2. Complains that “user already exists with phoneNo: 2233442233”</text:p>
            <text:p><text:span text:style-name="T1">3. Changed the phone number on WEB UI, but still it reads the old phone number by which it is created and complains</text:span> 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 is created with following credentials: </text:p>
            <text:p>SOLD TO PARTY ID:  U001</text:p>
            <text:p>PhoneNumber:  2223334441</text:p>
            <text:p>Email: <text:a xlink:href="mailto:u001@gmail.com" xlink:type="simple">u001@gmail.com</text:a></text:p>
            <text:p>RmEmail: <text:a xlink:href="mailto:testmanager1@gmail.com" xlink:type="simple">testmanager1@gmail.com</text:a></text:p>
            <text:p>RmPhone: 1112223331</text:p>
          </table:table-cell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ata is puhsed to U001 with following Credential:</text:p>
            <text:p>F1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style-name="ce2" office:value-type="string" calcext:value-type="string">
            <text:p>{ "row": { "Invoice_Customer_Detail": [ { "RM_CERT_NO": "451234", "RM_CERT_DATE": "21.06.2021", "DEL_NO": "1233023", "MATNR": "00111223300444441", "CAST_NO": "612394765", "FIN_LOT": "1234235124" }, { "RM_CERT_NO": "899416983", "RM_CERT_DATE": "2020134", "DEL_NO": "1233023", "MATNR": "00111223300444441", "CAST_NO": "D27348", "FIN_LOT": "B25C316" } ], "Mechanical_Property_Result": { "NO_OF_TUBES": "240", "MATNR": "00111223300444441", "THICKNESS": "3.50 mm", "WIDTH": "1,000.00 mm", "MAKTX": "Test Material 1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U001" }, "Material_Spec_Detail": [ { "SAL_NO": "9767934562", "DEL_NO": "1233023", "INV_NO": "44000000001", "INV_DATE": "20210131", "CAST_NO": "612394765", "SAL_ITEM": "4", "C": "0.059", "MN": "0.44", "SI": "0.013", "S": "0.005", "P": "0.022", "CHARGE": "B2141243", "FIN_LOT": "1234235124", "CHARGE_VAL": "96", "YST": "281", "TST": "354", "ELON": "40", "ELON1": "42" }, { "SAL_NO": "9767934562", "DEL_NO": "1233023", "INV_NO": "44000000001", "INV_DATE": "20210131", "CAST_NO": "612394765", "SAL_ITEM": "4", "C": "0.059", "MN": "0.44", "SI": "0.013", "S": "0.005", "P": "0.022", "CHARGE": "B2141243", "FIN_LOT": "1234235124", "CHARGE_VAL": "96", "YST": "278", "TST": "351", "ELON": "39", "ELON1": "41" }, { "SAL_NO": "9767934562", "DEL_NO": "1233023", "INV_NO": "44000000001", "INV_DATE": "20210131", "CAST_NO": "D27348", "SAL_ITEM": "4", "C": "0.058", "MN": "0.421", "SI": "0.022", "S": "0.004", "P": "0.017", "CHARGE": "B2523404", "FIN_LOT": "B25C316", "CHARGE_VAL": "144", "YST": "281", "TST": "354", "ELON": "43", "ELON1": "45" }, { "SAL_NO": "9767934562", "DEL_NO": "1233023", "INV_NO": "44000000001", "INV_DATE": "20210131", "CAST_NO": "D27348", "SAL_ITEM": "4", "C": "0.058", "MN": "0.421", "SI": "0.022", "S": "0.004", "P": "0.017", "CHARGE": "B25C05", "FIN_LOT": "B25C316", "CHARGE_VAL": "144", "YST": "303", "TST": "377", "ELON": "37", "ELON1": "39" }, { "SAL_NO": "9767934562", "DEL_NO": "1233023", "INV_NO": "44000000001", "INV_DATE": "20210131", "CAST_NO": "D27348", "SAL_ITEM": "4", "C": "0.058", "MN": "0.421", "SI": "0.022", "S": "0.004", "P": "0.017", "CHARGE": "B25C05", "FIN_LOT": "B25C316", "CHARGE_VAL": "144", "YST": "318", "TST": "392", "ELON": "35", "ELON1": "37" } ] }}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ata is puhsed to U001 with following Credential:</text:p>
            <text:p>F1</text:p>
            <text:p/>
            <text:p>Inv No: 44000000002</text:p>
            <text:p>Mat No: 00111223300444442</text:p>
            <text:p>MatK: Test Material 2</text:p>
            <text:p>Lot No: 1234235124</text:p>
            <text:p>Lot No: 4444333322221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ew Lot no is showing, but the old one is not showig. Quantity is increased in the earlier material no that is recorded with the same material no.</text:p>
          </table:table-cell>
          <table:table-cell/>
          <table:table-cell table:style-name="ce2" office:value-type="string" calcext:value-type="string">
            <text:p>{ "row": { "Invoice_Customer_Detail": [ { "RM_CERT_NO": "451234", "RM_CERT_DATE": "21.06.2021", "DEL_NO": "1233023", "MATNR": "00111223300444442", "CAST_NO": "612394765", "FIN_LOT": "1234235124" }, { "RM_CERT_NO": "899416983", "RM_CERT_DATE": "2020134", "DEL_NO": "1233023", "MATNR": "00111223300444442", "CAST_NO": "D27348", "FIN_LOT": "4444333322221" } ], "Mechanical_Property_Result": { "NO_OF_TUBES": "240", "MATNR": "00111223300444442", "THICKNESS": "3.50 mm", "WIDTH": "1,000.00 mm", "MAKTX": "Test Material 2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U001" }, "Material_Spec_Detail": [ { "SAL_NO": "9767934562", "DEL_NO": "1233023", "INV_NO": "44000000002", "INV_DATE": "20210131", "CAST_NO": "612394765", "SAL_ITEM": "4", "C": "0.059", "MN": "0.44", "SI": "0.013", "S": "0.005", "P": "0.022", "CHARGE": "B2141243", "FIN_LOT": "1234235124", "CHARGE_VAL": "96", "YST": "281", "TST": "354", "ELON": "40", "ELON1": "42" }, { "SAL_NO": "9767934562", "DEL_NO": "1233023", "INV_NO": "44000000002", "INV_DATE": "20210131", "CAST_NO": "612394765", "SAL_ITEM": "4", "C": "0.059", "MN": "0.44", "SI": "0.013", "S": "0.005", "P": "0.022", "CHARGE": "B2141243", "FIN_LOT": "1234235124", "CHARGE_VAL": "96", "YST": "278", "TST": "351", "ELON": "39", "ELON1": "41" }, { "SAL_NO": "9767934562", "DEL_NO": "1233023", "INV_NO": "44000000002", "INV_DATE": "20210131", "CAST_NO": "D27348", "SAL_ITEM": "4", "C": "0.058", "MN": "0.421", "SI": "0.022", "S": "0.004", "P": "0.017", "CHARGE": "B2523404", "FIN_LOT": "4444333322221", "CHARGE_VAL": "144", "YST": "281", "TST": "354", "ELON": "43", "ELON1": "45" }, { "SAL_NO": "9767934562", "DEL_NO": "1233023", "INV_NO": "44000000002", "INV_DATE": "20210131", "CAST_NO": "D27348", "SAL_ITEM": "4", "C": "0.058", "MN": "0.421", "SI": "0.022", "S": "0.004", "P": "0.017", "CHARGE": "B25C05", "FIN_LOT": "4444333322221", "CHARGE_VAL": "144", "YST": "303", "TST": "377", "ELON": "37", "ELON1": "39" }, { "SAL_NO": "9767934562", "DEL_NO": "1233023", "INV_NO": "44000000002", "INV_DATE": "20210131", "CAST_NO": "D27348", "SAL_ITEM": "4", "C": "0.058", "MN": "0.421", "SI": "0.022", "S": "0.004", "P": "0.017", "CHARGE": "B25C05", "FIN_LOT": "4444333322221", "CHARGE_VAL": "144", "YST": "318", "TST": "392", "ELON": "35", "ELON1": "37" } ] }}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Data is puhsed to U001 with following Credential:</text:p>
            <text:p>F1</text:p>
            <text:p/>
            <text:p>Inv No: 44000000003</text:p>
            <text:p>Mat No: 00111223300444443</text:p>
            <text:p>MatK: Test Material 3</text:p>
            <text:p><text:span text:style-name="T1">Lot No: 4444333322222</text:span></text:p>
            <text:p>Lot No: 444433332222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ata is not reflecting in the system</text:p>
          </table:table-cell>
          <table:table-cell/>
          <table:table-cell table:style-name="ce2" office:value-type="string" calcext:value-type="string">
            <text:p>{ "row": { "Invoice_Customer_Detail": [ { "RM_CERT_NO": "451234", "RM_CERT_DATE": "21.06.2021", "DEL_NO": "1233023", "MATNR": "00111223300444443", "CAST_NO": "612394765", "FIN_LOT": "4444333322223" }, { "RM_CERT_NO": "899416983", "RM_CERT_DATE": "2020134", "DEL_NO": "1233023", "MATNR": "00111223300444443", "CAST_NO": "D27348", "FIN_LOT": "4444333322222" } ], "Mechanical_Property_Result": { "NO_OF_TUBES": "240", "MATNR": "00111223300444443", "THICKNESS": "3.50 mm", "WIDTH": "1,000.00 mm", "MAKTX": "Test Material 3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U001" }, "Material_Spec_Detail": [ { "SAL_NO": "9767934562", "DEL_NO": "1233023", "INV_NO": "44000000003", "INV_DATE": "20210131", "CAST_NO": "612394765", "SAL_ITEM": "4", "C": "0.059", "MN": "0.44", "SI": "0.013", "S": "0.005", "P": "0.022", "CHARGE": "B2141243", "FIN_LOT": "1234235124", "CHARGE_VAL": "96", "YST": "281", "TST": "354", "ELON": "40", "ELON1": "42" }, { "SAL_NO": "9767934562", "DEL_NO": "1233023", "INV_NO": "44000000003", "INV_DATE": "20210131", "CAST_NO": "612394765", "SAL_ITEM": "4", "C": "0.059", "MN": "0.44", "SI": "0.013", "S": "0.005", "P": "0.022", "CHARGE": "B2141243", "FIN_LOT": "1234235124", "CHARGE_VAL": "96", "YST": "278", "TST": "351", "ELON": "39", "ELON1": "41" }, { "SAL_NO": "9767934562", "DEL_NO": "1233023", "INV_NO": "44000000003", "INV_DATE": "20210131", "CAST_NO": "D27348", "SAL_ITEM": "4", "C": "0.058", "MN": "0.421", "SI": "0.022", "S": "0.004", "P": "0.017", "CHARGE": "B2523404", "FIN_LOT": "4444333322221", "CHARGE_VAL": "144", "YST": "281", "TST": "354", "ELON": "43", "ELON1": "45" }, { "SAL_NO": "9767934562", "DEL_NO": "1233023", "INV_NO": "44000000003", "INV_DATE": "20210131", "CAST_NO": "D27348", "SAL_ITEM": "4", "C": "0.058", "MN": "0.421", "SI": "0.022", "S": "0.004", "P": "0.017", "CHARGE": "B25C05", "FIN_LOT": "4444333322221", "CHARGE_VAL": "144", "YST": "303", "TST": "377", "ELON": "37", "ELON1": "39" }, { "SAL_NO": "9767934562", "DEL_NO": "1233023", "INV_NO": "44000000003", "INV_DATE": "20210131", "CAST_NO": "D27348", "SAL_ITEM": "4", "C": "0.058", "MN": "0.421", "SI": "0.022", "S": "0.004", "P": "0.017", "CHARGE": "B25C05", "FIN_LOT": "4444333322221", "CHARGE_VAL": "144", "YST": "318", "TST": "392", "ELON": "35", "ELON1": "37" } ] }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ata is not reflecting</text:p>
          </table:table-cell>
          <table:table-cell/>
          <table:table-cell table:style-name="ce2" office:value-type="string" calcext:value-type="string">
            <text:p>{ "row": { "Invoice_Customer_Detail": [ { "RM_CERT_NO": "1238863200001", "RM_CERT_DATE": "21.06.2021", "DEL_NO": "123231200001", "MATNR": "00111223300444444", "CAST_NO": "77623321111", "FIN_LOT": "4444333322224" }, { "RM_CERT_NO": "1238863200002", "RM_CERT_DATE": "21.06.2021", "DEL_NO": "123231200001", "MATNR": "00111223300444444", "CAST_NO": "77623321112", "FIN_LOT": "4444333322225" } ], "Mechanical_Property_Result": { "NO_OF_TUBES": "240", "MATNR": "00111223300444444", "THICKNESS": "3.50 mm", "WIDTH": "1,000.00 mm", "MAKTX": "Test Material 3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U001" }, "Material_Spec_Detail": [ { "SAL_NO": "9767934562", "DEL_NO": "123231200001", "INV_NO": "44000000005", "INV_DATE": "20210131", "CAST_NO": "77623321111", "SAL_ITEM": "4", "C": "0.059", "MN": "0.44", "SI": "0.013", "S": "0.005", "P": "0.022", "CHARGE": "B2141243", "FIN_LOT": "1234235124", "CHARGE_VAL": "96", "YST": "281", "TST": "354", "ELON": "40", "ELON1": "42" }, { "SAL_NO": "9767934562", "DEL_NO": "123231200001", "INV_NO": "44000000005", "INV_DATE": "20210131", "CAST_NO": "77623321111", "SAL_ITEM": "4", "C": "0.059", "MN": "0.44", "SI": "0.013", "S": "0.005", "P": "0.022", "CHARGE": "B2141243", "FIN_LOT": "1234235124", "CHARGE_VAL": "96", "YST": "278", "TST": "351", "ELON": "39", "ELON1": "41" }, { "SAL_NO": "9767934562", "DEL_NO": "123231200001", "INV_NO": "44000000005", "INV_DATE": "20210131", "CAST_NO": "77623321112", "SAL_ITEM": "4", "C": "0.058", "MN": "0.421", "SI": "0.022", "S": "0.004", "P": "0.017", "CHARGE": "B2523404", "FIN_LOT": "4444333322221", "CHARGE_VAL": "144", "YST": "281", "TST": "354", "ELON": "43", "ELON1": "45" }, { "SAL_NO": "9767934562", "DEL_NO": "123231200001", "INV_NO": "44000000005", "INV_DATE": "20210131", "CAST_NO": "77623321112", "SAL_ITEM": "4", "C": "0.058", "MN": "0.421", "SI": "0.022", "S": "0.004", "P": "0.017", "CHARGE": "B25C05", "FIN_LOT": "4444333322221", "CHARGE_VAL": "144", "YST": "303", "TST": "377", "ELON": "37", "ELON1": "39" }, { "SAL_NO": "9767934562", "DEL_NO": "123231200001", "INV_NO": "44000000005", "INV_DATE": "20210131", "CAST_NO": "77623321112", "SAL_ITEM": "4", "C": "0.058", "MN": "0.421", "SI": "0.022", "S": "0.004", "P": "0.017", "CHARGE": "B25C05", "FIN_LOT": "4444333322221", "CHARGE_VAL": "144", "YST": "318", "TST": "392", "ELON": "35", "ELON1": "37" } ] }}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C Generate Experiments" table:style-name="ta1">
        <table:table-column table:style-name="co1" table:default-cell-style-name="Default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3" office:value-type="string" calcext:value-type="string">
            <text:p>Index</text:p>
          </table:table-cell>
          <table:table-cell table:style-name="ce5" office:value-type="string" calcext:value-type="string">
            <text:p>Scenario</text:p>
          </table:table-cell>
          <table:table-cell table:style-name="ce5" office:value-type="string" calcext:value-type="string">
            <text:p>Tests</text:p>
          </table:table-cell>
          <table:table-cell table:style-name="ce5" office:value-type="string" calcext:value-type="string">
            <text:p>Result</text:p>
          </table:table-cell>
          <table:table-cell table:style-name="ce3"/>
          <table:table-cell table:style-name="ce3" office:value-type="string" calcext:value-type="string">
            <text:p>Payload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tributor Creation is requested with already exists User Phone Number</text:p>
          </table:table-cell>
          <table:table-cell office:value-type="string" calcext:value-type="string">
            <text:p>1. Success on creation</text:p>
            <text:p>2. While sign up, failed to sign up.</text:p>
            <text:p>3. Changed the phone number on WEB UI, but still it reads the old phone number by which it is created.</text:p>
          </table:table-cell>
          <table:table-cell office:value-type="string" calcext:value-type="string">
            <text:p>1. No Error</text:p>
            <text:p>2. Complains that “user already exists with phoneNo: 2233442233”</text:p>
            <text:p><text:span text:style-name="T1">3. Changed the phone number on WEB UI, but still it reads the old phone number by which it is created and complains</text:span> 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 is created with following credentials: </text:p>
            <text:p>SOLD TO PARTY ID:  A001</text:p>
            <text:p>PhoneNumber:  9038928864</text:p>
            <text:p>Email: abhrajyoti.sen@varatechnology.com</text:p>
            <text:p>RmEmail: sanchari.chatterjee@varatechnology.com</text:p>
            <text:p>RmPhone: 8017039600</text:p>
          </table:table-cell>
          <table:table-cell office:value-type="string" calcext:value-type="string">
            <text:p>Success with following response</text:p>
            <text:p/>
          </table:table-cell>
          <table:table-cell table:style-name="ce7" office:value-type="string" calcext:value-type="string">
            <text:p>{ "message": "", "success": true}</text:p>
          </table:table-cell>
          <table:table-cell/>
          <table:table-cell table:style-name="ce2" office:value-type="string" calcext:value-type="string">
            <text:p>{ "soldToPartyID":"A001", "name":"Abhrajyoti Sen", "email":"abhrajyoti.sen@varatechnology.com", "phoneNo":"9038928864", "address":"Kolkata", "region":"East", "relationshipManagerName":"Sanchari Chatterjee", "relationshipManagerEmail":"sanchari.chatterjee@varatechnology.com", "relationshipManagerPhone":"8017039600"}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d User with email: <text:a xlink:href="mailto:md.jamil@varatechnology.com" xlink:type="simple">md.jamil@varatechnology.com</text:a> created.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3"/>
          <table:table-cell table:style-name="ce4"/>
          <table:table-cell table:style-name="ce9"/>
          <table:table-cell table:style-name="ce4"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is pushed to Party Id A001</text:p>
          </table:table-cell>
          <table:table-cell office:value-type="string" calcext:value-type="string">
            <text:p>1. Response success</text:p>
          </table:table-cell>
          <table:table-cell table:style-name="ce7" office:value-type="string" calcext:value-type="string">
            <text:p>1. { "record": { "message": "testing", "success": true }}</text:p>
          </table:table-cell>
          <table:table-cell/>
          <table:table-cell table:style-name="ce2" office:value-type="string" calcext:value-type="string">
            <text:p>{ "row": { "Invoice_Customer_Detail": [ { "RM_CERT_NO": "1000101", "RM_CERT_DATE": "16.11.2020", "DEL_NO": "3000101", "MATNR": "304400010101", "CAST_NO": "30440001010101", "FIN_LOT": "4000101" }, { "RM_CERT_NO": "1000102", "RM_CERT_DATE": "16.11.2020", "DEL_NO": "3000101", "MATNR": "304400010101", "CAST_NO": "30440001010102", "FIN_LOT": "4000102" } ], "Mechanical_Property_Result": { "NO_OF_TUBES": "240", "MATNR": "304400010101", "THICKNESS": "3.50 mm", "WIDTH": "1,000.00 mm", "MAKTX": "Test Materail 1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000A001" }, "Material_Spec_Detail": [ { "SAL_NO": "5000101", "DEL_NO": "3000101", "INV_NO": "44000101", "INV_DATE": "20210131", "CAST_NO": "30440001010101", "SAL_ITEM": "4", "C": "0.059", "MN": "0.44", "SI": "0.013", "S": "0.005", "P": "0.022", "CHARGE": "B2141243", "FIN_LOT": "4000101", "CHARGE_VAL": "96", "YST": "281", "TST": "354", "ELON": "40", "ELON1": "42" }, { "SAL_NO": "5000101", "DEL_NO": "3000101", "INV_NO": "44000101", "INV_DATE": "20210131", "CAST_NO": "30440001010101", "SAL_ITEM": "4", "C": "0.059", "MN": "0.44", "SI": "0.013", "S": "0.005", "P": "0.022", "CHARGE": "B2141243", "FIN_LOT": "4000101", "CHARGE_VAL": "96", "YST": "278", "TST": "351", "ELON": "39", "ELON1": "41" }, { "SAL_NO": "5000101", "DEL_NO": "3000101", "INV_NO": "44000101", "INV_DATE": "20210131", "CAST_NO": "30440001010102", "SAL_ITEM": "4", "C": "0.058", "MN": "0.421", "SI": "0.022", "S": "0.004", "P": "0.017", "CHARGE": "B2523404", "FIN_LOT": "4000102", "CHARGE_VAL": "144", "YST": "281", "TST": "354", "ELON": "43", "ELON1": "45" }, { "SAL_NO": "5000101", "DEL_NO": "3000101", "INV_NO": "44000101", "INV_DATE": "20210131", "CAST_NO": "30440001010102", "SAL_ITEM": "4", "C": "0.058", "MN": "0.421", "SI": "0.022", "S": "0.004", "P": "0.017", "CHARGE": "B25C05", "FIN_LOT": "4000102", "CHARGE_VAL": "144", "YST": "303", "TST": "377", "ELON": "37", "ELON1": "39" }, { "SAL_NO": "5000101", "DEL_NO": "3000101", "INV_NO": "44000101", "INV_DATE": "20210131", "CAST_NO": "30440001010102", "SAL_ITEM": "4", "C": "0.058", "MN": "0.421", "SI": "0.022", "S": "0.004", "P": "0.017", "CHARGE": "B25C05", "FIN_LOT": "4000102", "CHARGE_VAL": "144", "YST": "318", "TST": "392", "ELON": "35", "ELON1": "37" } ] }}</text:p>
          </table:table-cell>
          <table:table-cell table:number-columns-repeated="1018"/>
        </table:table-row>
        <table:table-row table:style-name="ro5">
          <table:table-cell office:value-type="float" office:value="4.1" calcext:value-type="float">
            <text:p>4.1</text:p>
          </table:table-cell>
          <table:table-cell office:value-type="string" calcext:value-type="string">
            <text:p>Couch Db</text:p>
          </table:table-cell>
          <table:table-cell table:style-name="Default"/>
          <table:table-cell office:value-type="string" calcext:value-type="string">
            <text:p>1. Tensile Records: 5</text:p>
            <text:p>2. Material: 1</text:p>
            <text:p>3. TC Master: 1</text:p>
            <text:p>4. Mat2Lot: 2</text:p>
            <text:p>5. ChemChomp: 2</text:p>
          </table:table-cell>
          <table:table-cell/>
          <table:table-cell table:style-name="ce2"/>
          <table:table-cell table:number-columns-repeated="1018"/>
        </table:table-row>
        <table:table-row table:style-name="ro3">
          <table:table-cell office:value-type="float" office:value="4.2" calcext:value-type="float">
            <text:p>4.2</text:p>
          </table:table-cell>
          <table:table-cell office:value-type="string" calcext:value-type="string">
            <text:p>TC generated using distributor screen.</text:p>
          </table:table-cell>
          <table:table-cell office:value-type="string" calcext:value-type="string">
            <text:p>1. One Lot for 1 Material</text:p>
          </table:table-cell>
          <table:table-cell office:value-type="string" calcext:value-type="string">
            <text:p>1. nTCReq: 1</text:p>
            <text:p>2. TACC-TCREQ-1624870569-44200.pdf</text:p>
          </table:table-cell>
          <table:table-cell/>
          <table:table-cell table:style-name="ce2"/>
          <table:table-cell table:number-columns-repeated="1018"/>
        </table:table-row>
        <table:table-row table:style-name="ro3">
          <table:table-cell office:value-type="float" office:value="4.3" calcext:value-type="float">
            <text:p>4.3</text:p>
          </table:table-cell>
          <table:table-cell office:value-type="string" calcext:value-type="string">
            <text:p>TC generated using distributor screen.</text:p>
          </table:table-cell>
          <table:table-cell office:value-type="string" calcext:value-type="string">
            <text:p>1. Two Lots for 1 Material</text:p>
          </table:table-cell>
          <table:table-cell office:value-type="string" calcext:value-type="string">
            <text:p>1. nTCReq: 2</text:p>
            <text:p>2. TACC-TCREQ-1624870876-42020.pdf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6" table:number-columns-repeated="3"/>
          <table:table-cell table:style-name="ce4"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Data is pushed to Party Id A001</text:p>
          </table:table-cell>
          <table:table-cell office:value-type="string" calcext:value-type="string">
            <text:p>1. MAKTX is not changed. Remained same as Index 4 payload</text:p>
          </table:table-cell>
          <table:table-cell office:value-type="string" calcext:value-type="string">
            <text:p>Data is correctly reflected</text:p>
          </table:table-cell>
          <table:table-cell/>
          <table:table-cell table:style-name="ce2" office:value-type="string" calcext:value-type="string">
            <text:p>{ "row": { "Invoice_Customer_Detail": [ { "RM_CERT_NO": "1000101", "RM_CERT_DATE": "16.11.2020", "DEL_NO": "3000201", "MATNR": "304400020201", "CAST_NO": "30440002020101", "FIN_LOT": "5000201" }, { "RM_CERT_NO": "1000102", "RM_CERT_DATE": "16.11.2020", "DEL_NO": "3000201", "MATNR": "304400020201", "CAST_NO": "30440002020102", "FIN_LOT": "5000202" } ], "Mechanical_Property_Result": { "NO_OF_TUBES": "240", "MATNR": "304400020201", "THICKNESS": "3.50 mm", "WIDTH": "1,000.00 mm", "MAKTX": "Test Materail 1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000A001" }, "Material_Spec_Detail": [ { "SAL_NO": "5000101", "DEL_NO": "3000201", "INV_NO": "44000102", "INV_DATE": "20210131", "CAST_NO": "30440002020101", "SAL_ITEM": "4", "C": "0.059", "MN": "0.44", "SI": "0.013", "S": "0.005", "P": "0.022", "CHARGE": "B2141243", "FIN_LOT": "5000201", "CHARGE_VAL": "96", "YST": "281", "TST": "354", "ELON": "40", "ELON1": "42" }, { "SAL_NO": "5000101", "DEL_NO": "3000201", "INV_NO": "44000102", "INV_DATE": "20210131", "CAST_NO": "30440002020101", "SAL_ITEM": "4", "C": "0.059", "MN": "0.44", "SI": "0.013", "S": "0.005", "P": "0.022", "CHARGE": "B2141243", "FIN_LOT": "5000201", "CHARGE_VAL": "96", "YST": "278", "TST": "351", "ELON": "39", "ELON1": "41" }, { "SAL_NO": "5000101", "DEL_NO": "3000201", "INV_NO": "44000102", "INV_DATE": "20210131", "CAST_NO": "30440002020102", "SAL_ITEM": "4", "C": "0.058", "MN": "0.421", "SI": "0.022", "S": "0.004", "P": "0.017", "CHARGE": "B2523404", "FIN_LOT": "5000202", "CHARGE_VAL": "144", "YST": "281", "TST": "354", "ELON": "43", "ELON1": "45" }, { "SAL_NO": "5000101", "DEL_NO": "3000201", "INV_NO": "44000102", "INV_DATE": "20210131", "CAST_NO": "30440002020102", "SAL_ITEM": "4", "C": "0.058", "MN": "0.421", "SI": "0.022", "S": "0.004", "P": "0.017", "CHARGE": "B25C05", "FIN_LOT": "5000202", "CHARGE_VAL": "144", "YST": "303", "TST": "377", "ELON": "37", "ELON1": "39" }, { "SAL_NO": "5000101", "DEL_NO": "3000201", "INV_NO": "44000102", "INV_DATE": "20210131", "CAST_NO": "30440002020102", "SAL_ITEM": "4", "C": "0.058", "MN": "0.421", "SI": "0.022", "S": "0.004", "P": "0.017", "CHARGE": "B25C05", "FIN_LOT": "5000202", "CHARGE_VAL": "144", "YST": "318", "TST": "392", "ELON": "35", "ELON1": "37" } ] }}</text:p>
          </table:table-cell>
          <table:table-cell table:number-columns-repeated="1018"/>
        </table:table-row>
        <table:table-row table:style-name="ro5">
          <table:table-cell office:value-type="float" office:value="5.1" calcext:value-type="float">
            <text:p>5.1</text:p>
          </table:table-cell>
          <table:table-cell office:value-type="string" calcext:value-type="string">
            <text:p>Couch Db</text:p>
          </table:table-cell>
          <table:table-cell/>
          <table:table-cell office:value-type="string" calcext:value-type="string">
            <text:p>1. Tensile Records: 10</text:p>
            <text:p>2. Material: 2</text:p>
            <text:p>3. TC Master: 2</text:p>
            <text:p>4. Mat2Lot: 4</text:p>
            <text:p>5. ChemChomp: 4</text:p>
          </table:table-cell>
          <table:table-cell table:number-columns-repeated="1020"/>
        </table:table-row>
        <table:table-row table:style-name="ro6">
          <table:table-cell office:value-type="float" office:value="5.2" calcext:value-type="float">
            <text:p>5.2</text:p>
          </table:table-cell>
          <table:table-cell office:value-type="string" calcext:value-type="string">
            <text:p>TC generated using distributor screen.</text:p>
          </table:table-cell>
          <table:table-cell office:value-type="string" calcext:value-type="string">
            <text:p>1. One Lot for 2 Material</text:p>
          </table:table-cell>
          <table:table-cell office:value-type="string" calcext:value-type="string">
            <text:p>1. nTCReq: 4</text:p>
            <text:p>2. TACC-TCREQ-1624872117-61791.pdf</text:p>
            <text:p>3. TACC-TCREQ-1624872117-88526.pdf</text:p>
          </table:table-cell>
          <table:table-cell table:number-columns-repeated="1020"/>
        </table:table-row>
        <table:table-row table:style-name="ro6">
          <table:table-cell office:value-type="float" office:value="5.3" calcext:value-type="float">
            <text:p>5.3</text:p>
          </table:table-cell>
          <table:table-cell office:value-type="string" calcext:value-type="string">
            <text:p>TC generated using distributor screen.</text:p>
          </table:table-cell>
          <table:table-cell office:value-type="string" calcext:value-type="string">
            <text:p>1. One Lot for 1 Material</text:p>
            <text:p>2. Two Lots for 1 Material</text:p>
          </table:table-cell>
          <table:table-cell office:value-type="string" calcext:value-type="string">
            <text:p>1. nTCReq: 6</text:p>
            <text:p>2. TACC-TCREQ-1624872516-16734.pdf</text:p>
            <text:p>3. TACC-TCREQ-1624872516-59585.pdf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6" table:number-columns-repeated="3"/>
          <table:table-cell table:style-name="ce4"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er is created with following credentials: </text:p>
            <text:p>SOLD TO PARTY ID:  A002</text:p>
            <text:p>PhoneNumber:  1234567890</text:p>
            <text:p>Email: <text:a xlink:href="mailto:a002@email.com" xlink:type="simple">a002@email.com</text:a></text:p>
            <text:p>RmEmail: sanchari.chatterjee@varatechnology.com</text:p>
            <text:p>RmPhone: 8017039600</text:p>
          </table:table-cell>
          <table:table-cell office:value-type="string" calcext:value-type="string">
            <text:p>Success with following response</text:p>
            <text:p/>
          </table:table-cell>
          <table:table-cell table:style-name="ce7" office:value-type="string" calcext:value-type="string">
            <text:p>{ "message": "", "success": true}</text:p>
          </table:table-cell>
          <table:table-cell/>
          <table:table-cell table:style-name="ce2" office:value-type="string" calcext:value-type="string">
            <text:p>{ "soldToPartyID":"A002", "name":"Dummy Distributor", "email":"a002@email.com", "phoneNo":"1234567890", "address":"Kolkata", "region":"East", "relationshipManagerName":"Sanchari Chatterjee", "relationshipManagerEmail":"sanchari.chatterjee@varatechnology.com", "relationshipManagerPhone":"8017039600"}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9"/>
          <table:table-cell table:style-name="ce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ata is pushed to Party Id A002</text:p>
          </table:table-cell>
          <table:table-cell office:value-type="string" calcext:value-type="string">
            <text:p>1. Payload is same as Index 5</text:p>
            <text:p>2. Same invoice is sent to A002</text:p>
          </table:table-cell>
          <table:table-cell table:style-name="ce7" office:value-type="string" calcext:value-type="string">
            <text:p>{ "record": { "message": "testing", "success": true }}</text:p>
          </table:table-cell>
          <table:table-cell/>
          <table:table-cell table:style-name="ce2" office:value-type="string" calcext:value-type="string">
            <text:p>{ "row": { "Invoice_Customer_Detail": [ { "RM_CERT_NO": "1000101", "RM_CERT_DATE": "16.11.2020", "DEL_NO": "3000201", "MATNR": "304400020201", "CAST_NO": "30440002020101", "FIN_LOT": "5000201" }, { "RM_CERT_NO": "1000102", "RM_CERT_DATE": "16.11.2020", "DEL_NO": "3000201", "MATNR": "304400020201", "CAST_NO": "30440002020102", "FIN_LOT": "5000202" } ], "Mechanical_Property_Result": { "NO_OF_TUBES": "240", "MATNR": "304400020201", "THICKNESS": "3.50 mm", "WIDTH": "1,000.00 mm", "MAKTX": "Test Materail 1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000A002" }, "Material_Spec_Detail": [ { "SAL_NO": "5000101", "DEL_NO": "3000201", "INV_NO": "44000102", "INV_DATE": "20210131", "CAST_NO": "30440002020101", "SAL_ITEM": "4", "C": "0.059", "MN": "0.44", "SI": "0.013", "S": "0.005", "P": "0.022", "CHARGE": "B2141243", "FIN_LOT": "5000201", "CHARGE_VAL": "96", "YST": "281", "TST": "354", "ELON": "40", "ELON1": "42" }, { "SAL_NO": "5000101", "DEL_NO": "3000201", "INV_NO": "44000102", "INV_DATE": "20210131", "CAST_NO": "30440002020101", "SAL_ITEM": "4", "C": "0.059", "MN": "0.44", "SI": "0.013", "S": "0.005", "P": "0.022", "CHARGE": "B2141243", "FIN_LOT": "5000201", "CHARGE_VAL": "96", "YST": "278", "TST": "351", "ELON": "39", "ELON1": "41" }, { "SAL_NO": "5000101", "DEL_NO": "3000201", "INV_NO": "44000102", "INV_DATE": "20210131", "CAST_NO": "30440002020102", "SAL_ITEM": "4", "C": "0.058", "MN": "0.421", "SI": "0.022", "S": "0.004", "P": "0.017", "CHARGE": "B2523404", "FIN_LOT": "5000202", "CHARGE_VAL": "144", "YST": "281", "TST": "354", "ELON": "43", "ELON1": "45" }, { "SAL_NO": "5000101", "DEL_NO": "3000201", "INV_NO": "44000102", "INV_DATE": "20210131", "CAST_NO": "30440002020102", "SAL_ITEM": "4", "C": "0.058", "MN": "0.421", "SI": "0.022", "S": "0.004", "P": "0.017", "CHARGE": "B25C05", "FIN_LOT": "5000202", "CHARGE_VAL": "144", "YST": "303", "TST": "377", "ELON": "37", "ELON1": "39" }, { "SAL_NO": "5000101", "DEL_NO": "3000201", "INV_NO": "44000102", "INV_DATE": "20210131", "CAST_NO": "30440002020102", "SAL_ITEM": "4", "C": "0.058", "MN": "0.421", "SI": "0.022", "S": "0.004", "P": "0.017", "CHARGE": "B25C05", "FIN_LOT": "5000202", "CHARGE_VAL": "144", "YST": "318", "TST": "392", "ELON": "35", "ELON1": "37" } ] }}</text:p>
          </table:table-cell>
          <table:table-cell table:number-columns-repeated="1018"/>
        </table:table-row>
        <table:table-row table:style-name="ro5">
          <table:table-cell office:value-type="float" office:value="7.1" calcext:value-type="float">
            <text:p>7.1</text:p>
          </table:table-cell>
          <table:table-cell office:value-type="string" calcext:value-type="string">
            <text:p>Couch Db</text:p>
          </table:table-cell>
          <table:table-cell/>
          <table:table-cell office:value-type="string" calcext:value-type="string">
            <text:p>1. Tensile Records: 15</text:p>
            <text:p>2. Material: 2</text:p>
            <text:p>3. TC Master: 3</text:p>
            <text:p>4. Mat2Lot: 4</text:p>
            <text:p>5. ChemChomp: 6</text:p>
          </table:table-cell>
          <table:table-cell table:number-columns-repeated="1020"/>
        </table:table-row>
        <table:table-row table:style-name="ro6">
          <table:table-cell office:value-type="float" office:value="7.2" calcext:value-type="float">
            <text:p>7.2</text:p>
          </table:table-cell>
          <table:table-cell office:value-type="string" calcext:value-type="string">
            <text:p>TC generated using distributor screen A002</text:p>
          </table:table-cell>
          <table:table-cell office:value-type="string" calcext:value-type="string">
            <text:p>1. One Lot for 1 Material</text:p>
          </table:table-cell>
          <table:table-cell office:value-type="string" calcext:value-type="string">
            <text:p>1. nTCReq: 7</text:p>
            <text:p><text:span text:style-name="T1">2. TACC-TCREQ-1624873629-89004.pdf</text:span></text:p>
            <text:p><text:span text:style-name="T1">3. Anomaly in TC Tensile Data</text:span></text:p>
          </table:table-cell>
          <table:table-cell/>
          <table:table-cell table:style-name="ce2"/>
          <table:table-cell table:number-columns-repeated="1018"/>
        </table:table-row>
        <table:table-row table:style-name="ro6">
          <table:table-cell office:value-type="float" office:value="7.3" calcext:value-type="float">
            <text:p>7.3</text:p>
          </table:table-cell>
          <table:table-cell office:value-type="string" calcext:value-type="string">
            <text:p>TC generated using distributor screen A002</text:p>
          </table:table-cell>
          <table:table-cell office:value-type="string" calcext:value-type="string">
            <text:p>1. Two Lots for 1 Material</text:p>
          </table:table-cell>
          <table:table-cell office:value-type="string" calcext:value-type="string">
            <text:p>1. nTCReq: 8</text:p>
            <text:p><text:span text:style-name="T1">2. TACC-TCREQ-1624873905-59996.pdf</text:span></text:p>
            <text:p><text:span text:style-name="T1">3. Anomaly in TC Tensile Data</text:span></text:p>
          </table:table-cell>
          <table:table-cell table:number-columns-repeated="1020"/>
        </table:table-row>
        <table:table-row table:style-name="ro6">
          <table:table-cell office:value-type="float" office:value="7.4" calcext:value-type="float">
            <text:p>7.4</text:p>
          </table:table-cell>
          <table:table-cell office:value-type="string" calcext:value-type="string">
            <text:p>TC generated using distributor screen A001</text:p>
          </table:table-cell>
          <table:table-cell office:value-type="string" calcext:value-type="string">
            <text:p>1. Two Lots for 1 Material</text:p>
            <text:p>2. Payload same as 7.3</text:p>
          </table:table-cell>
          <table:table-cell office:value-type="string" calcext:value-type="string">
            <text:p>1. nTCReq: 9</text:p>
            <text:p><text:span text:style-name="T1">2. TACC-TCREQ-1624874206-8356.pdf</text:span></text:p>
            <text:p><text:span text:style-name="T1">3. Anomaly in TC Tensile Data</text:span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6" table:number-columns-repeated="3"/>
          <table:table-cell table:style-name="ce4"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ata is pushed to Party Id A002</text:p>
          </table:table-cell>
          <table:table-cell office:value-type="string" calcext:value-type="string">
            <text:p>1. Material No Changed but Lot No remain unchanged.</text:p>
          </table:table-cell>
          <table:table-cell table:style-name="ce7" office:value-type="string" calcext:value-type="string">
            <text:p>{ "record": { "message": "testing", "success": true }}</text:p>
          </table:table-cell>
          <table:table-cell/>
          <table:table-cell table:style-name="ce2" office:value-type="string" calcext:value-type="string">
            <text:p>{ "row": { "Invoice_Customer_Detail": [ { "RM_CERT_NO": "1000201", "RM_CERT_DATE": "16.11.2020", "DEL_NO": "3000301", "MATNR": "304400020202", "CAST_NO": "30440002020201", "FIN_LOT": "5000201" }, { "RM_CERT_NO": "1000202", "RM_CERT_DATE": "16.11.2020", "DEL_NO": "3000301", "MATNR": "304400020202", "CAST_NO": "30440002020202", "FIN_LOT": "5000202" } ], "Mechanical_Property_Result": { "NO_OF_TUBES": "240", "MATNR": "304400020202", "THICKNESS": "3.50 mm", "WIDTH": "1,000.00 mm", "MAKTX": "Test Materail 2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000A002" }, "Material_Spec_Detail": [ { "SAL_NO": "5000102", "DEL_NO": "3000301", "INV_NO": "44000103", "INV_DATE": "20210131", "CAST_NO": "30440002020201", "SAL_ITEM": "4", "C": "0.059", "MN": "0.44", "SI": "0.013", "S": "0.005", "P": "0.022", "CHARGE": "B2141243", "FIN_LOT": "5000201", "CHARGE_VAL": "96", "YST": "281", "TST": "354", "ELON": "40", "ELON1": "42" }, { "SAL_NO": "5000102", "DEL_NO": "3000301", "INV_NO": "44000103", "INV_DATE": "20210131", "CAST_NO": "30440002020201", "SAL_ITEM": "4", "C": "0.059", "MN": "0.44", "SI": "0.013", "S": "0.005", "P": "0.022", "CHARGE": "B2141243", "FIN_LOT": "5000201", "CHARGE_VAL": "96", "YST": "278", "TST": "351", "ELON": "39", "ELON1": "41" }, { "SAL_NO": "5000102", "DEL_NO": "3000301", "INV_NO": "44000103", "INV_DATE": "20210131", "CAST_NO": "30440002020202", "SAL_ITEM": "4", "C": "0.058", "MN": "0.421", "SI": "0.022", "S": "0.004", "P": "0.017", "CHARGE": "B2523404", "FIN_LOT": "5000202", "CHARGE_VAL": "144", "YST": "281", "TST": "354", "ELON": "43", "ELON1": "45" }, { "SAL_NO": "5000102", "DEL_NO": "3000301", "INV_NO": "44000103", "INV_DATE": "20210131", "CAST_NO": "30440002020202", "SAL_ITEM": "4", "C": "0.058", "MN": "0.421", "SI": "0.022", "S": "0.004", "P": "0.017", "CHARGE": "B25C05", "FIN_LOT": "5000202", "CHARGE_VAL": "144", "YST": "303", "TST": "377", "ELON": "37", "ELON1": "39" }, { "SAL_NO": "5000102", "DEL_NO": "3000301", "INV_NO": "44000103", "INV_DATE": "20210131", "CAST_NO": "30440002020202", "SAL_ITEM": "4", "C": "0.058", "MN": "0.421", "SI": "0.022", "S": "0.004", "P": "0.017", "CHARGE": "B25C05", "FIN_LOT": "5000202", "CHARGE_VAL": "144", "YST": "318", "TST": "392", "ELON": "35", "ELON1": "37" } ] }}</text:p>
          </table:table-cell>
          <table:table-cell table:number-columns-repeated="1018"/>
        </table:table-row>
        <table:table-row table:style-name="ro5">
          <table:table-cell office:value-type="float" office:value="8.1" calcext:value-type="float">
            <text:p>8.1</text:p>
          </table:table-cell>
          <table:table-cell office:value-type="string" calcext:value-type="string">
            <text:p>Couch Db</text:p>
          </table:table-cell>
          <table:table-cell/>
          <table:table-cell office:value-type="string" calcext:value-type="string">
            <text:p>1. Tensile Records: 20</text:p>
            <text:p>2. Material: 3</text:p>
            <text:p>3. TC Master: 4</text:p>
            <text:p>4. Mat2Lot: 6</text:p>
            <text:p>5. ChemChomp: 8</text:p>
          </table:table-cell>
          <table:table-cell table:number-columns-repeated="1020"/>
        </table:table-row>
        <table:table-row table:style-name="ro3">
          <table:table-cell office:value-type="float" office:value="8.2" calcext:value-type="float">
            <text:p>8.2</text:p>
          </table:table-cell>
          <table:table-cell office:value-type="string" calcext:value-type="string">
            <text:p>Logged in as A002</text:p>
          </table:table-cell>
          <table:table-cell office:value-type="string" calcext:value-type="string">
            <text:p>1. Inventory Updated</text:p>
          </table:table-cell>
          <table:table-cell office:value-type="string" calcext:value-type="string">
            <text:p>1. No new material is showing on dashboard</text:p>
            <text:p>2. Inventory is updated for the lot no mentioned.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3"/>
          <table:table-cell table:style-name="ce4"/>
          <table:table-cell table:style-name="ce9"/>
          <table:table-cell table:style-name="ce4" table:number-columns-repeated="1018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Data is pushed to Party Id A002</text:p>
          </table:table-cell>
          <table:table-cell office:value-type="string" calcext:value-type="string">
            <text:p>1. Payload is same as Index 8.</text:p>
            <text:p>2. Material No Changed but this time Lot No changed.</text:p>
          </table:table-cell>
          <table:table-cell table:style-name="ce7" office:value-type="string" calcext:value-type="string">
            <text:p>{ "record": { "message": "testing", "success": true }}</text:p>
          </table:table-cell>
          <table:table-cell/>
          <table:table-cell table:style-name="ce2" office:value-type="string" calcext:value-type="string">
            <text:p>{ "row": { "Invoice_Customer_Detail": [ { "RM_CERT_NO": "1000201", "RM_CERT_DATE": "16.11.2020", "DEL_NO": "3000301", "MATNR": "304400020202", "CAST_NO": "30440002020201", "FIN_LOT": "5000301" }, { "RM_CERT_NO": "1000202", "RM_CERT_DATE": "16.11.2020", "DEL_NO": "3000301", "MATNR": "304400020202", "CAST_NO": "30440002020202", "FIN_LOT": "5000302" } ], "Mechanical_Property_Result": { "NO_OF_TUBES": "240", "MATNR": "304400020202", "THICKNESS": "3.50 mm", "WIDTH": "1,000.00 mm", "MAKTX": "Test Materail 2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000A002" }, "Material_Spec_Detail": [ { "SAL_NO": "5000102", "DEL_NO": "3000301", "INV_NO": "44000103", "INV_DATE": "20210131", "CAST_NO": "30440002020201", "SAL_ITEM": "4", "C": "0.059", "MN": "0.44", "SI": "0.013", "S": "0.005", "P": "0.022", "CHARGE": "B2141243", "FIN_LOT": "5000301", "CHARGE_VAL": "96", "YST": "281", "TST": "354", "ELON": "40", "ELON1": "42" }, { "SAL_NO": "5000102", "DEL_NO": "3000301", "INV_NO": "44000103", "INV_DATE": "20210131", "CAST_NO": "30440002020201", "SAL_ITEM": "4", "C": "0.059", "MN": "0.44", "SI": "0.013", "S": "0.005", "P": "0.022", "CHARGE": "B2141243", "FIN_LOT": "5000301", "CHARGE_VAL": "96", "YST": "278", "TST": "351", "ELON": "39", "ELON1": "41" }, { "SAL_NO": "5000102", "DEL_NO": "3000301", "INV_NO": "44000103", "INV_DATE": "20210131", "CAST_NO": "30440002020202", "SAL_ITEM": "4", "C": "0.058", "MN": "0.421", "SI": "0.022", "S": "0.004", "P": "0.017", "CHARGE": "B2523404", "FIN_LOT": "5000302", "CHARGE_VAL": "144", "YST": "281", "TST": "354", "ELON": "43", "ELON1": "45" }, { "SAL_NO": "5000102", "DEL_NO": "3000301", "INV_NO": "44000103", "INV_DATE": "20210131", "CAST_NO": "30440002020202", "SAL_ITEM": "4", "C": "0.058", "MN": "0.421", "SI": "0.022", "S": "0.004", "P": "0.017", "CHARGE": "B25C05", "FIN_LOT": "5000302", "CHARGE_VAL": "144", "YST": "303", "TST": "377", "ELON": "37", "ELON1": "39" }, { "SAL_NO": "5000102", "DEL_NO": "3000301", "INV_NO": "44000103", "INV_DATE": "20210131", "CAST_NO": "30440002020202", "SAL_ITEM": "4", "C": "0.058", "MN": "0.421", "SI": "0.022", "S": "0.004", "P": "0.017", "CHARGE": "B25C05", "FIN_LOT": "5000302", "CHARGE_VAL": "144", "YST": "318", "TST": "392", "ELON": "35", "ELON1": "37" } ] }}</text:p>
          </table:table-cell>
          <table:table-cell table:number-columns-repeated="1018"/>
        </table:table-row>
        <table:table-row table:style-name="ro5">
          <table:table-cell office:value-type="float" office:value="9.1" calcext:value-type="float">
            <text:p>9.1</text:p>
          </table:table-cell>
          <table:table-cell office:value-type="string" calcext:value-type="string">
            <text:p>Couch Db</text:p>
          </table:table-cell>
          <table:table-cell/>
          <table:table-cell office:value-type="string" calcext:value-type="string">
            <text:p>1. Tensile Records: 25</text:p>
            <text:p>2. Material: 3</text:p>
            <text:p>3. TC Master: 5</text:p>
            <text:p>4. Mat2Lot: 8</text:p>
            <text:p>5. ChemChomp: 10</text:p>
          </table:table-cell>
          <table:table-cell table:number-columns-repeated="1020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Logged in as A002</text:p>
          </table:table-cell>
          <table:table-cell office:value-type="string" calcext:value-type="string">
            <text:p>1. Inventory Updated</text:p>
          </table:table-cell>
          <table:table-cell office:value-type="string" calcext:value-type="string">
            <text:p>Inventory successfully updated</text:p>
          </table:table-cell>
          <table:table-cell/>
          <table:table-cell table:style-name="ce2"/>
          <table:table-cell table:number-columns-repeated="1018"/>
        </table:table-row>
        <table:table-row table:style-name="ro3">
          <table:table-cell office:value-type="float" office:value="9.3" calcext:value-type="float">
            <text:p>9.3</text:p>
          </table:table-cell>
          <table:table-cell office:value-type="string" calcext:value-type="string">
            <text:p>TC generated using distributor screen A002</text:p>
          </table:table-cell>
          <table:table-cell office:value-type="string" calcext:value-type="string">
            <text:p>1. One Lot for material in this invoice</text:p>
          </table:table-cell>
          <table:table-cell office:value-type="string" calcext:value-type="string">
            <text:p>1. nTCReq: 10</text:p>
            <text:p><text:span text:style-name="T1">2. TACC-TCREQ-1624879007-2267.pdf</text:span></text:p>
          </table:table-cell>
          <table:table-cell table:number-columns-repeated="1020"/>
        </table:table-row>
        <table:table-row table:style-name="ro6">
          <table:table-cell office:value-type="float" office:value="9.4" calcext:value-type="float">
            <text:p>9.4</text:p>
          </table:table-cell>
          <table:table-cell office:value-type="string" calcext:value-type="string">
            <text:p>TC generated using distributor screen A002</text:p>
          </table:table-cell>
          <table:table-cell office:value-type="string" calcext:value-type="string">
            <text:p><text:span text:style-name="T1">1. Two older Lots ( Which has Material No </text:span>) for 1 Material </text:p>
          </table:table-cell>
          <table:table-cell office:value-type="string" calcext:value-type="string">
            <text:p>1. nTCReq: 12</text:p>
            <text:p><text:span text:style-name="T1">2. TACC-TCREQ-1624879500-14739.pdf =&gt; C</text:span></text:p>
            <text:p><text:span text:style-name="T1">3. TACC-TCREQ-1624879500-22463.pdf =&gt; W</text:span></text:p>
          </table:table-cell>
          <table:table-cell table:number-columns-repeated="1020"/>
        </table:table-row>
        <table:table-row table:style-name="ro6">
          <table:table-cell office:value-type="float" office:value="9.5" calcext:value-type="float">
            <text:p>9.5</text:p>
          </table:table-cell>
          <table:table-cell office:value-type="string" calcext:value-type="string">
            <text:p>TC generated using distributor screen A001</text:p>
          </table:table-cell>
          <table:table-cell office:value-type="string" calcext:value-type="string">
            <text:p><text:span text:style-name="T1">1. Two older Lots ( Which has Material No </text:span>) for 1 Material </text:p>
          </table:table-cell>
          <table:table-cell office:value-type="string" calcext:value-type="string">
            <text:p>1. nTCReq: 14</text:p>
            <text:p><text:span text:style-name="T1">2. TACC-TCREQ-1624880515-357.pdf =&gt; C</text:span></text:p>
            <text:p><text:span text:style-name="T1">3. TACC-TCREQ-1624880515-11852.pdf =&gt; W</text:span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6" table:number-columns-repeated="3"/>
          <table:table-cell table:style-name="ce4" table:number-columns-repeated="1020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ata is pushed to Party Id A002</text:p>
          </table:table-cell>
          <table:table-cell office:value-type="string" calcext:value-type="string">
            <text:p>A new unique invoice is pushed</text:p>
          </table:table-cell>
          <table:table-cell table:style-name="ce7" office:value-type="string" calcext:value-type="string">
            <text:p>{ "record": { "message": "testing", "success": true }}</text:p>
          </table:table-cell>
          <table:table-cell/>
          <table:table-cell table:style-name="ce2" office:value-type="string" calcext:value-type="string">
            <text:p>{ "row": { "Invoice_Customer_Detail": [ { "RM_CERT_NO": "1000301", "RM_CERT_DATE": "16.11.2020", "DEL_NO": "3000401", "MATNR": "304400020203", "CAST_NO": "30440002020301", "FIN_LOT": "5000401" }, { "RM_CERT_NO": "1000302", "RM_CERT_DATE": "16.11.2020", "DEL_NO": "3000401", "MATNR": "304400020203", "CAST_NO": "30440002020302", "FIN_LOT": "5000402" } ], "Mechanical_Property_Result": { "NO_OF_TUBES": "240", "MATNR": "304400020203", "THICKNESS": "3.50 mm", "WIDTH": "1,000.00 mm", "MAKTX": "Test Materail 3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000A002" }, "Material_Spec_Detail": [ { "SAL_NO": "5000102", "DEL_NO": "3000401", "INV_NO": "44000104", "INV_DATE": "20210131", "CAST_NO": "30440002020301", "SAL_ITEM": "4", "C": "0.059", "MN": "0.44", "SI": "0.013", "S": "0.005", "P": "0.022", "CHARGE": "B2141243", "FIN_LOT": "5000401", "CHARGE_VAL": "96", "YST": "281", "TST": "354", "ELON": "40", "ELON1": "42" }, { "SAL_NO": "5000102", "DEL_NO": "3000401", "INV_NO": "44000104", "INV_DATE": "20210131", "CAST_NO": "30440002020301", "SAL_ITEM": "4", "C": "0.059", "MN": "0.44", "SI": "0.013", "S": "0.005", "P": "0.022", "CHARGE": "B2141243", "FIN_LOT": "5000401", "CHARGE_VAL": "96", "YST": "278", "TST": "351", "ELON": "39", "ELON1": "41" }, { "SAL_NO": "5000102", "DEL_NO": "3000401", "INV_NO": "44000104", "INV_DATE": "20210131", "CAST_NO": "30440002020302", "SAL_ITEM": "4", "C": "0.058", "MN": "0.421", "SI": "0.022", "S": "0.004", "P": "0.017", "CHARGE": "B2523404", "FIN_LOT": "5000402", "CHARGE_VAL": "144", "YST": "281", "TST": "354", "ELON": "43", "ELON1": "45" }, { "SAL_NO": "5000102", "DEL_NO": "3000401", "INV_NO": "44000104", "INV_DATE": "20210131", "CAST_NO": "30440002020302", "SAL_ITEM": "4", "C": "0.058", "MN": "0.421", "SI": "0.022", "S": "0.004", "P": "0.017", "CHARGE": "B25C05", "FIN_LOT": "5000402", "CHARGE_VAL": "144", "YST": "303", "TST": "377", "ELON": "37", "ELON1": "39" }, { "SAL_NO": "5000102", "DEL_NO": "3000401", "INV_NO": "44000104", "INV_DATE": "20210131", "CAST_NO": "30440002020302", "SAL_ITEM": "4", "C": "0.058", "MN": "0.421", "SI": "0.022", "S": "0.004", "P": "0.017", "CHARGE": "B25C05", "FIN_LOT": "5000402", "CHARGE_VAL": "144", "YST": "318", "TST": "392", "ELON": "35", "ELON1": "37" } ] }}</text:p>
          </table:table-cell>
          <table:table-cell table:number-columns-repeated="1018"/>
        </table:table-row>
        <table:table-row table:style-name="ro3">
          <table:table-cell office:value-type="float" office:value="10.2" calcext:value-type="float">
            <text:p>10.2</text:p>
          </table:table-cell>
          <table:table-cell office:value-type="string" calcext:value-type="string">
            <text:p>Data is pushed to Party Id A002</text:p>
          </table:table-cell>
          <table:table-cell office:value-type="string" calcext:value-type="string">
            <text:p>Same data with different material description, different lot no</text:p>
          </table:table-cell>
          <table:table-cell table:style-name="ce7" office:value-type="string" calcext:value-type="string">
            <text:p>{ "record": { "message": "testing", "success": true }}</text:p>
          </table:table-cell>
          <table:table-cell/>
          <table:table-cell table:style-name="ce2" office:value-type="string" calcext:value-type="string">
            <text:p>{ "row": { "Invoice_Customer_Detail": [ { "RM_CERT_NO": "1000311", "RM_CERT_DATE": "16.11.2020", "DEL_NO": "3000411", "MATNR": "304400020204", "CAST_NO": "30440002020301", "FIN_LOT": "5000401" }, { "RM_CERT_NO": "1000312", "RM_CERT_DATE": "16.11.2020", "DEL_NO": "3000411", "MATNR": "304400020204", "CAST_NO": "30440002020302", "FIN_LOT": "5000402" } ], "Mechanical_Property_Result": { "NO_OF_TUBES": "240", "MATNR": "304400020204", "THICKNESS": "3.50 mm", "WIDTH": "1,000.00 mm", "MAKTX": "Test Materail 4", "IS_SPEC": "BS 3059:1978 PT 1 ERW 320", "BND": "NA", "FLATT": "SATISFACTORY", "FLAR": "SATISFACTORY", "CRUSH": "NA", "FLANG": "NA", "HYDR_TEST": "110", "HYDR_UNIT": "kg/cm2", "HYDR_DATE": "20210130" }, "Customer_Details": { "NAME1": "testTC", "NAME2": "", "ORT01": "KOLKATA", "PSTLZ": "700072", "TELF1": "0", "CUSTOMER": "00000A002" }, "Material_Spec_Detail": [ { "SAL_NO": "5000102", "DEL_NO": "3000411", "INV_NO": "44000104", "INV_DATE": "20210131", "CAST_NO": "30440002020301", "SAL_ITEM": "4", "C": "0.059", "MN": "0.44", "SI": "0.013", "S": "0.005", "P": "0.022", "CHARGE": "B2141243", "FIN_LOT": "5000401", "CHARGE_VAL": "96", "YST": "281", "TST": "354", "ELON": "40", "ELON1": "42" }, { "SAL_NO": "5000102", "DEL_NO": "3000411", "INV_NO": "44000104", "INV_DATE": "20210131", "CAST_NO": "30440002020301", "SAL_ITEM": "4", "C": "0.059", "MN": "0.44", "SI": "0.013", "S": "0.005", "P": "0.022", "CHARGE": "B2141243", "FIN_LOT": "5000401", "CHARGE_VAL": "96", "YST": "278", "TST": "351", "ELON": "39", "ELON1": "41" }, { "SAL_NO": "5000102", "DEL_NO": "3000411", "INV_NO": "44000104", "INV_DATE": "20210131", "CAST_NO": "30440002020302", "SAL_ITEM": "4", "C": "0.058", "MN": "0.421", "SI": "0.022", "S": "0.004", "P": "0.017", "CHARGE": "B2523404", "FIN_LOT": "5000402", "CHARGE_VAL": "144", "YST": "281", "TST": "354", "ELON": "43", "ELON1": "45" }, { "SAL_NO": "5000102", "DEL_NO": "3000411", "INV_NO": "44000104", "INV_DATE": "20210131", "CAST_NO": "30440002020302", "SAL_ITEM": "4", "C": "0.058", "MN": "0.421", "SI": "0.022", "S": "0.004", "P": "0.017", "CHARGE": "B25C05", "FIN_LOT": "5000402", "CHARGE_VAL": "144", "YST": "303", "TST": "377", "ELON": "37", "ELON1": "39" }, { "SAL_NO": "5000102", "DEL_NO": "3000411", "INV_NO": "44000104", "INV_DATE": "20210131", "CAST_NO": "30440002020302", "SAL_ITEM": "4", "C": "0.058", "MN": "0.421", "SI": "0.022", "S": "0.004", "P": "0.017", "CHARGE": "B25C05", "FIN_LOT": "5000402", "CHARGE_VAL": "144", "YST": "318", "TST": "392", "ELON": "35", "ELON1": "37" } ] }}</text:p>
          </table:table-cell>
          <table:table-cell table:number-columns-repeated="1018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Couch Db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Inventory is doubled.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tion Review" table:style-name="ta1">
        <office:forms form:automatic-focus="false" form:apply-design-mode="false"/>
        <table:table-column table:style-name="co1" table:default-cell-style-name="ce11"/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1" table:number-columns-repeated="1020" table:default-cell-style-name="Default"/>
        <table:table-row table:style-name="ro1"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Fact</text:p>
          </table:table-cell>
          <table:table-cell table:style-name="ce10" office:value-type="string" calcext:value-type="string">
            <text:p>Observation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turning Product has implementation with poor detection.</text:p>
          </table:table-cell>
          <table:table-cell table:number-columns-repeated="102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C Master has ChallanNo, CertificateNo, CustomerOrderNo, tcDate, challanDate, noOfTubes, soldToPartyID etc important information</text:p>
          </table:table-cell>
          <table:table-cell office:value-type="string" calcext:value-type="string">
            <text:p>1. There is no check if there is already a TC Master with the same ChallanNo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CDate is hardcoded in blockchain with current time.</text:p>
          </table:table-cell>
          <table:table-cell office:value-type="string" calcext:value-type="string">
            <text:p>1. Clearity from business is required, because there is also a challan date available with TC Master.</text:p>
          </table:table-cell>
          <table:table-cell table:number-columns-repeated="1021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TC Material is saved with the information available in the SAP doc.</text:p>
          </table:table-cell>
          <table:table-cell office:value-type="string" calcext:value-type="string">
            <text:p>1. There is no connection made with the TC Master.</text:p>
            <text:p>2. Observation 1 is not required as it is suppossed to be universal for all type of TC.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terial2Lot struct has LotNo, MaterialNo, and ChallanNo.</text:p>
          </table:table-cell>
          <table:table-cell office:value-type="string" calcext:value-type="string">
            <text:p>1. Challan No may not be required as there is no connection is defined with the Party ID</text:p>
          </table:table-cell>
          <table:table-cell table:number-columns-repeated="102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hemical Composition for a Lot is saved. There is checking to confirm that the chemical composition is present for the Lot No that come along with the Invoice.</text:p>
          </table:table-cell>
          <table:table-cell office:value-type="string" calcext:value-type="string">
            <text:p>1. The chemical composition for a LotNo may be unique. So there should not be required to store everytime.</text:p>
          </table:table-cell>
          <table:table-cell table:number-columns-repeated="1021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Tensile Test for a Lot is saved. There is checking to confirm that the chemical composition is present for the Lot No that come along with the Invoice.</text:p>
          </table:table-cell>
          <table:table-cell office:value-type="string" calcext:value-type="string">
            <text:p>1. The tensile test for a LotNo may be unique. So there should not be required to store everytime.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1. AddStockForNewTC requires userID, userName, userEmail, sellerID, sellerName.</text:p>
          </table:table-cell>
          <table:table-cell office:value-type="string" calcext:value-type="string">
            <text:p>1. SellerID, sellerName is hardcoded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2. Material Spec Details contains the quantity against a LotNo.</text:p>
          </table:table-cell>
          <table:table-cell table:style-name="ce28" office:value-type="string" calcext:value-type="string">
            <text:p>1. According to the implementation, whatever the first qnty it finds, it will creadit that.</text:p>
            <text:p>2. There is no checking to ensure all the quantity for a lotNo is same.</text:p>
            <text:p>3. AddStock of OACC is used to increase the stock of the user.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Every TC Request has blank challan no. It is only written in every product details. </text:p>
          </table:table-cell>
          <table:table-cell table:style-name="ce29" office:value-type="string" calcext:value-type="string">
            <text:p>1. Challan No should no be blank for the TC Request.</text:p>
            <text:p>2. It may be a cause that, it fetches the product details at the time of HTML generation also that causes duplicate TCs that signifies problem with Batch Program. </text:p>
          </table:table-cell>
          <table:table-cell office:value-type="string" calcext:value-type="string">
            <text:p>1. O-124880097102128269</text:p>
          </table:table-cell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The Order generated has no challan id. It has only challan id in the product details.</text:p>
          </table:table-cell>
          <table:table-cell table:style-name="ce30" office:value-type="string" calcext:value-type="string">
            <text:p>1. Challan No should not be blank for the order generated.</text:p>
            <text:p>2. It is also true that an order can contain products that come from different challan no.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IncreaseInStock function is not using the material number.</text:p>
          </table:table-cell>
          <table:table-cell table:style-name="ce31" office:value-type="string" calcext:value-type="string">
            <text:p><text:span text:style-name="T2">1. </text:span><text:span text:style-name="T3">IncreaseInStock function need to use material no also to increase the accurate one.</text:span></text:p>
            <text:p><text:span text:style-name="T4">2. New stocks are added by means of new challanNo, so there is high chances to generate TC with wrong challanNo.</text:span>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DecreaseInStock function is not using the material number.</text:p>
          </table:table-cell>
          <table:table-cell office:value-type="string" calcext:value-type="string">
            <text:p>1. Same as above.</text:p>
          </table:table-cell>
          <table:table-cell table:number-columns-repeated="1021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Chemical Composition has only information about the lot no.</text:p>
          </table:table-cell>
          <table:table-cell table:style-name="ce29" office:value-type="string" calcext:value-type="string">
            <text:p>1. If checmical composition is related to LotNo, then there is a possibility of Material No. Hence, if having multiple material is possibility of a LotNot, then Checmical Composition will also be multiple.</text:p>
          </table:table-cell>
          <table:table-cell table:number-columns-repeated="1021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Create Chemical Comp function has no prior checking.</text:p>
          </table:table-cell>
          <table:table-cell office:value-type="string" calcext:value-type="string">
            <text:p>1. Multiple chemical composition is pushed into the system for same lot no.</text:p>
            <text:p>2. If it is related Material No, then it will also have 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turn Scenario" table:style-name="ta1">
        <office:forms form:automatic-focus="false" form:apply-design-mode="false"/>
        <table:table-column table:style-name="co10" table:default-cell-style-name="ce38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" table:number-columns-repeated="2" table:default-cell-style-name="ce38"/>
        <table:table-row table:style-name="ro1">
          <table:table-cell table:style-name="ce35" office:value-type="string" calcext:value-type="string">
            <text:p>Order Request</text:p>
          </table:table-cell>
          <table:table-cell table:style-name="ce35" table:number-columns-repeated="5"/>
        </table:table-row>
        <table:table-row table:style-name="ro1">
          <table:table-cell table:style-name="ce36" office:value-type="string" calcext:value-type="string">
            <text:p>Sold To Party Id</text:p>
          </table:table-cell>
          <table:table-cell table:style-name="ce36" office:value-type="string" calcext:value-type="string">
            <text:p>Challan No</text:p>
          </table:table-cell>
          <table:table-cell table:style-name="ce36" office:value-type="string" calcext:value-type="string">
            <text:p>Main Dimension</text:p>
          </table:table-cell>
          <table:table-cell table:style-name="ce36" office:value-type="string" calcext:value-type="string">
            <text:p>FinLot</text:p>
          </table:table-cell>
          <table:table-cell table:style-name="ce36" office:value-type="string" calcext:value-type="string">
            <text:p>Qty</text:p>
          </table:table-cell>
          <table:table-cell table:style-name="ce36" office:value-type="string" calcext:value-type="string">
            <text:p>OrderId</text:p>
          </table:table-cell>
        </table:table-row>
        <table:table-row table:style-name="ro1">
          <table:table-cell table:style-name="ce37" office:value-type="string" calcext:value-type="string">
            <text:p>S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1</text:p>
          </table:table-cell>
          <table:table-cell table:style-name="ce37" office:value-type="float" office:value="30" calcext:value-type="float">
            <text:p>30</text:p>
          </table:table-cell>
          <table:table-cell office:value-type="string" calcext:value-type="string">
            <text:p>Order_1</text:p>
          </table:table-cell>
        </table:table-row>
        <table:table-row table:style-name="ro1">
          <table:table-cell table:style-name="ce37"/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1</text:p>
          </table:table-cell>
          <table:table-cell table:style-name="ce37" office:value-type="float" office:value="50" calcext:value-type="float">
            <text:p>50</text:p>
          </table:table-cell>
          <table:table-cell office:value-type="string" calcext:value-type="string">
            <text:p>Order_1</text:p>
          </table:table-cell>
        </table:table-row>
        <table:table-row table:style-name="ro1" table:number-rows-repeated="2">
          <table:table-cell table:style-name="ce37"/>
          <table:table-cell table:number-columns-repeated="3"/>
          <table:table-cell table:style-name="ce37"/>
          <table:table-cell/>
        </table:table-row>
        <table:table-row table:style-name="ro1">
          <table:table-cell table:style-name="ce35" office:value-type="string" calcext:value-type="string">
            <text:p>Return Request</text:p>
          </table:table-cell>
          <table:table-cell table:style-name="ce3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OrderId</text:p>
          </table:table-cell>
          <table:table-cell table:style-name="ce36" office:value-type="string" calcext:value-type="string">
            <text:p>Main Dimension</text:p>
          </table:table-cell>
          <table:table-cell table:style-name="ce36" office:value-type="string" calcext:value-type="string">
            <text:p>FinLot</text:p>
          </table:table-cell>
          <table:table-cell table:style-name="ce36" office:value-type="string" calcext:value-type="string">
            <text:p>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_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2"/>
        </table:table-row>
        <table:table-row table:style-name="ro1">
          <table:table-cell/>
          <table:table-cell table:style-name="ce39" office:value-type="string" calcext:value-type="string">
            <text:p>Step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tes/Query</text:p>
          </table:table-cell>
          <table:table-cell table:number-columns-repeated="2"/>
        </table:table-row>
        <table:table-row table:style-name="ro6">
          <table:table-cell/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Using OrderID, we wil get correct Sold To Pary Id</text:p>
          </table:table-cell>
          <table:table-cell table:style-name="ce38"/>
          <table:table-cell table:number-columns-repeated="2"/>
        </table:table-row>
        <table:table-row table:style-name="ro8">
          <table:table-cell/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Should we increase the stock against Challan C1 or C2 ?</text:p>
          </table:table-cell>
          <table:table-cell table:style-name="ce41" office:value-type="string" calcext:value-type="string">
            <text:p>Challan no is important piece of information to get correct tensile test report.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1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ce1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6:37:17.947448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0:50:50.083115573</meta:creation-date>
    <dc:date>2021-07-20T16:56:57.397683852</dc:date>
    <meta:editing-duration>P1DT21M31S</meta:editing-duration>
    <meta:editing-cycles>11</meta:editing-cycles>
    <meta:generator>LibreOffice/6.4.7.2$Linux_X86_64 LibreOffice_project/40$Build-2</meta:generator>
    <meta:document-statistic meta:table-count="4" meta:cell-count="233" meta:object-count="0"/>
  </office:meta>
</office:document-meta>
</file>