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3.583cm"/>
    </style:style>
    <style:style style:name="co3" style:family="table-column">
      <style:table-column-properties fo:break-before="auto" style:column-width="4.128cm"/>
    </style:style>
    <style:style style:name="co4" style:family="table-column">
      <style:table-column-properties fo:break-before="auto" style:column-width="7.407cm"/>
    </style:style>
    <style:style style:name="co5" style:family="table-column">
      <style:table-column-properties fo:break-before="auto" style:column-width="5.554cm"/>
    </style:style>
    <style:style style:name="co6" style:family="table-column">
      <style:table-column-properties fo:break-before="auto" style:column-width="13.78cm"/>
    </style:style>
    <style:style style:name="co7" style:family="table-column">
      <style:table-column-properties fo:break-before="auto" style:column-width="9.613cm"/>
    </style:style>
    <style:style style:name="co8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6.14cm"/>
    </style:style>
    <style:style style:name="co10" style:family="table-column">
      <style:table-column-properties fo:break-before="auto" style:column-width="13.326cm"/>
    </style:style>
    <style:style style:name="co11" style:family="table-column">
      <style:table-column-properties fo:break-before="auto" style:column-width="6.853cm"/>
    </style:style>
    <style:style style:name="co12" style:family="table-column">
      <style:table-column-properties fo:break-before="auto" style:column-width="12.79cm"/>
    </style:style>
    <style:style style:name="co13" style:family="table-column">
      <style:table-column-properties fo:break-before="auto" style:column-width="2.59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false"/>
    </style:style>
    <style:style style:name="ro2" style:family="table-row">
      <style:table-row-properties style:row-height="3.76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5.265cm" fo:break-before="auto" style:use-optimal-row-height="true"/>
    </style:style>
    <style:style style:name="ro5" style:family="table-row">
      <style:table-row-properties style:row-height="4.316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Admin_5f_ICR_5f_Pass_20_Rules_20_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fo:wrap-option="wrap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5983b0" fo:wrap-option="wrap"/>
    </style:style>
    <style:style style:name="ce7" style:family="table-cell" style:parent-style-name="Default">
      <style:table-cell-properties fo:background-color="#ffaa95" fo:wrap-option="wrap"/>
    </style:style>
    <style:style style:name="ce8" style:family="table-cell" style:parent-style-name="Default">
      <style:table-cell-properties fo:background-color="#ff6d6d" fo:wrap-option="wrap"/>
    </style:style>
    <style:style style:name="ce3" style:family="table-cell" style:parent-style-name="Default">
      <style:table-cell-properties fo:background-color="#acb20c" fo:wrap-option="wrap"/>
    </style:style>
    <style:style style:name="ce10" style:family="table-cell" style:parent-style-name="Default">
      <style:table-cell-properties fo:background-color="#ffffff" fo:wrap-option="wrap"/>
    </style:style>
    <style:style style:name="ce1" style:family="table-cell" style:parent-style-name="Default">
      <style:table-cell-properties fo:background-color="#ffff00" fo:wrap-option="wrap"/>
    </style:style>
    <style:style style:name="ce12" style:family="table-cell" style:parent-style-name="Default">
      <style:table-cell-properties fo:background-color="#ffff6d" fo:wrap-option="wrap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background-color="#3465a4" fo:wrap-option="wrap"/>
    </style:style>
    <style:style style:name="ce15" style:family="table-cell" style:parent-style-name="Default">
      <style:table-cell-properties fo:background-color="transparent" fo:wrap-option="wrap" fo:border="none"/>
    </style:style>
    <style:style style:name="ce16" style:family="table-cell" style:parent-style-name="Default">
      <style:table-cell-properties fo:background-color="transparent" fo:border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fo:color="#000000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3" style:family="text">
      <style:text-properties fo:language="en" fo:country="IN" style:font-relief="none" style:font-style-complex="normal" style:font-weight-complex="normal" style:font-size-complex="11pt" style:font-name-complex="Calibri" style:language-complex="hi" style:country-complex="IN" fo:text-shadow="none" fo:font-style="normal" style:text-underline-style="none" style:text-underline-color="font-color" fo:font-size="11pt" fo:color="#000000" style:text-emphasize="none" style:font-name="Calibri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overline-style="none" style:text-overline-color="font-color"/>
    </style:style>
    <style:style style:name="T4" style:family="text">
      <style:text-properties style:font-weight-asian="normal" style:font-relief="none" style:font-style-complex="normal" style:font-weight-complex="normal" style:font-size-complex="11pt" style:font-name-complex="Calibri" style:language-complex="hi" style:country-complex="IN" fo:language="en" fo:country="IN" fo:text-shadow="none" fo:font-style="normal" style:text-underline-style="none" style:text-underline-color="font-color" fo:font-size="11pt" fo:color="#000000" style:font-size-asian="11pt" style:font-name-asian="Noto Sans CJK SC" style:language-asian="zh" style:country-asian="CN" style:text-line-through-mode="continuous" style:text-outline="false" style:text-line-through-type="none" fo:font-weight="normal" style:font-name="Calibri" style:font-style-asian="normal" style:text-emphasize="none" style:text-overline-style="none" style:text-overline-color="font-color"/>
    </style:style>
    <style:style style:name="T5" style:family="text">
      <style:text-properties style:font-name-complex="Calibri" style:font-relief="none" style:font-style-complex="normal" style:font-weight-complex="normal" style:font-size-complex="11pt" fo:color="#000000" fo:font-size="11pt" style:text-underline-style="none" style:text-underline-color="font-color" fo:font-style="normal" fo:text-shadow="none" fo:language="en" fo:country="IN" style:language-complex="hi" style:country-complex="IN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6" style:family="text">
      <style:text-properties style:language-asian="zh" style:country-asian="CN" style:font-relief="none" style:font-style-complex="normal" style:font-weight-complex="normal" style:font-size-complex="11pt" style:font-name-complex="Calibri" style:language-complex="hi" style:country-complex="IN" fo:language="en" fo:country="IN" fo:text-shadow="none" fo:font-style="normal" style:text-underline-style="none" style:text-underline-color="font-color" fo:font-size="11pt" fo:color="#000000" style:text-line-through-mode="continuous" style:text-outline="false" style:text-line-through-type="none" fo:font-weight="normal" style:font-name="Calibri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7" style:family="text">
      <style:text-properties style:text-emphasize="none" style:text-overline-style="none" style:text-overline-color="font-color" style:font-style-asian="normal" style:font-weight-asian="normal" style:font-size-asian="11pt" style:font-name-asian="Noto Sans CJK SC" style:language-asian="zh" style:country-asian="CN" style:text-line-through-mode="continuous" style:text-outline="false" style:text-line-through-type="none" fo:font-weight="normal" style:font-name="Calibri" fo:language="en" fo:country="IN" fo:color="#000000" fo:font-size="11pt" style:text-underline-style="none" style:text-underline-color="font-color" fo:font-style="normal" fo:text-shadow="none" style:language-complex="hi" style:country-complex="IN" style:font-name-complex="Calibri" style:font-size-complex="11pt" style:font-weight-complex="normal" style:font-style-complex="normal" style:font-relief="none"/>
    </style:style>
    <style:style style:name="T8" style:family="text">
      <style:text-properties fo:text-shadow="none" style:font-relief="none" style:font-style-complex="normal" style:font-weight-complex="normal" style:font-size-complex="11pt" style:font-name-complex="Calibri" style:language-complex="hi" style:country-complex="IN" fo:language="en" fo:country="IN" fo:font-style="normal" style:text-underline-style="none" style:text-underline-color="font-color" fo:font-size="11pt" fo:color="#000000" style:font-style-asian="normal" style:font-name="Calibri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text-emphasize="none" style:text-overline-style="none" style:text-overline-color="font-color"/>
    </style:style>
    <style:style style:name="T9" style:family="text">
      <style:text-properties style:font-size-asian="11pt" style:font-relief="none" style:font-style-complex="normal" style:font-weight-complex="normal" style:font-size-complex="11pt" style:font-name-complex="Calibri" style:language-complex="hi" style:country-complex="IN" fo:language="en" fo:country="IN" fo:text-shadow="none" fo:font-style="normal" style:text-underline-style="none" style:text-underline-color="font-color" fo:font-size="11pt" fo:color="#000000" style:font-name-asian="Noto Sans CJK SC" style:language-asian="zh" style:country-asian="CN" style:text-line-through-mode="continuous" style:text-outline="false" style:text-line-through-type="none" fo:font-weight="normal" style:font-name="Calibri" style:font-weight-asian="normal" style:font-style-asian="normal" style:text-emphasize="none" style:text-overline-style="none" style:text-overline-color="font-color"/>
    </style:style>
    <style:style style:name="T10" style:family="text">
      <style:text-properties style:font-weight-complex="normal" style:font-relief="none" style:font-style-complex="normal" style:font-size-complex="11pt" style:font-name-complex="Calibri" style:language-complex="hi" style:country-complex="IN" fo:language="en" fo:country="IN" fo:text-shadow="none" fo:font-style="normal" style:text-underline-style="none" style:text-underline-color="font-color" fo:font-size="11pt" fo:color="#000000" style:font-name-asian="Noto Sans CJK SC" style:font-name="Calibri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  <style:style style:name="T11" style:family="text">
      <style:text-properties style:font-name="Calibri" style:font-relief="none" style:font-style-complex="normal" style:font-weight-complex="normal" style:font-size-complex="11pt" style:font-name-complex="Calibri" style:language-complex="hi" style:country-complex="IN" fo:language="en" fo:country="IN" fo:text-shadow="none" fo:font-style="normal" style:text-underline-style="none" style:text-underline-color="font-color" fo:font-size="11pt" fo:color="#000000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12" style:family="text">
      <style:text-properties style:font-style-asian="normal" style:font-relief="none" style:font-style-complex="normal" style:font-weight-complex="normal" style:font-size-complex="11pt" style:font-name-complex="Calibri" style:language-complex="hi" style:country-complex="IN" fo:language="en" fo:country="IN" fo:text-shadow="none" fo:font-style="normal" style:text-underline-style="none" style:text-underline-color="font-color" fo:font-size="11pt" fo:color="#000000" style:font-weight-asian="normal" style:font-size-asian="11pt" style:font-name-asian="Noto Sans CJK SC" style:language-asian="zh" style:country-asian="CN" style:text-line-through-mode="continuous" style:text-outline="false" style:text-line-through-type="none" fo:font-weight="normal" style:font-name="Calibri" style:text-emphasize="none" style:text-overline-style="none" style:text-overline-color="font-color"/>
    </style:style>
    <style:style style:name="T13" style:family="text">
      <style:text-properties style:language-complex="hi" style:country-complex="IN" style:font-relief="none" style:font-style-complex="normal" style:font-weight-complex="normal" style:font-size-complex="11pt" style:font-name-complex="Calibri" fo:language="en" fo:country="IN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4" style:family="text">
      <style:text-properties fo:text-shadow="none" style:font-relief="none" style:font-style-complex="normal" style:font-weight-complex="normal" style:font-size-complex="11pt" style:font-name-complex="Calibri" style:language-complex="hi" style:country-complex="IN" fo:language="en" fo:country="IN" fo:color="#000000" fo:font-size="11pt" style:text-underline-style="none" style:text-underline-color="font-color" fo:font-style="normal" style:text-line-through-mode="continuous" style:font-name="Calibri" fo:font-weight="normal" style:text-line-through-type="none" style:text-outline="false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15" style:family="text">
      <style:text-properties style:font-name-complex="Calibri" style:font-relief="none" style:font-style-complex="normal" style:font-weight-complex="normal" style:font-size-complex="11pt" style:language-complex="hi" style:country-complex="IN" fo:language="en" fo:country="IN" fo:text-shadow="none" fo:font-style="normal" style:text-underline-style="none" style:text-underline-color="font-color" fo:font-size="11pt" fo:color="#000000" style:text-line-through-mode="continuous" style:font-name="Calibri" fo:font-weight="normal" style:text-line-through-type="none" style:text-outline="false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16" style:family="text">
      <style:text-properties style:text-line-through-type="none" style:font-relief="none" style:font-style-complex="normal" style:font-weight-complex="normal" style:font-size-complex="11pt" style:font-name-complex="Calibri" style:language-complex="hi" style:country-complex="IN" fo:language="en" fo:country="IN" fo:text-shadow="none" fo:font-style="normal" style:text-underline-style="none" style:text-underline-color="font-color" fo:font-size="11pt" fo:color="#000000" fo:font-weight="normal" style:font-name="Calibri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17" style:family="text">
      <style:text-properties fo:font-size="11pt" style:font-relief="none" style:font-style-complex="normal" style:font-weight-complex="normal" style:font-size-complex="11pt" style:font-name-complex="Calibri" style:language-complex="hi" style:country-complex="IN" fo:language="en" fo:country="IN" fo:text-shadow="none" fo:font-style="normal" style:text-underline-style="none" style:text-underline-color="font-color" fo:color="#000000" fo:font-weight="normal" style:font-name="Calibri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18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IN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9" style:family="text">
      <style:text-properties style:font-name-complex="Calibri" style:font-relief="none" style:font-style-complex="normal" style:font-weight-complex="normal" fo:color="#000000" fo:font-size="11pt" style:text-underline-style="none" style:text-underline-color="font-color" fo:font-style="normal" fo:text-shadow="none" fo:language="en" fo:country="IN" style:language-complex="hi" style:country-complex="IN" style:font-weight-asian="normal" style:font-size-complex="11pt" style:font-name="Calibri" fo:font-weight="normal" style:text-line-through-type="none" style:text-outline="false" style:text-line-through-mode="continuous" style:language-asian="zh" style:country-asian="CN" style:font-name-asian="Noto Sans CJK SC" style:font-size-asian="11pt" style:font-style-asian="normal" style:text-emphasize="none" style:text-overline-style="none" style:text-overline-color="font-color"/>
    </style:style>
    <style:style style:name="T20" style:family="text">
      <style:text-properties style:font-name-complex="Calibri" style:font-relief="none" style:font-style-complex="normal" style:font-weight-complex="normal" style:font-size-complex="11pt" style:language-complex="hi" style:country-complex="IN" fo:language="en" fo:country="IN" fo:text-shadow="none" fo:font-style="normal" style:text-underline-style="none" style:text-underline-color="font-color" fo:font-size="11pt" fo:color="#000000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Calibri" style:font-size-asian="11pt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min_ICR_Pass Rules Repor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2" table:default-cell-style-name="ce2"/>
        <table:table-row table:style-name="ro1">
          <table:table-cell table:style-name="ce4" office:value-type="string" calcext:value-type="string">
            <text:p>Match Set Group</text:p>
          </table:table-cell>
          <table:table-cell table:style-name="ce4" office:value-type="string" calcext:value-type="string">
            <text:p>Match Set</text:p>
          </table:table-cell>
          <table:table-cell table:style-name="ce4" office:value-type="string" calcext:value-type="string">
            <text:p>Data Source #</text:p>
          </table:table-cell>
          <table:table-cell table:style-name="ce4" office:value-type="string" calcext:value-type="string">
            <text:p>Data Source</text:p>
          </table:table-cell>
          <table:table-cell table:style-name="ce4" office:value-type="string" calcext:value-type="string">
            <text:p>Pass Rule #</text:p>
          </table:table-cell>
          <table:table-cell table:style-name="ce4" office:value-type="string" calcext:value-type="string">
            <text:p>Pass Rule</text:p>
          </table:table-cell>
          <table:table-cell table:style-name="ce4" office:value-type="string" calcext:value-type="string">
            <text:p>Pass Rule Active</text:p>
          </table:table-cell>
          <table:table-cell table:style-name="ce4" office:value-type="string" calcext:value-type="string">
            <text:p>Pass Rule Type</text:p>
          </table:table-cell>
          <table:table-cell table:style-name="ce4" office:value-type="string" calcext:value-type="string">
            <text:p>Pass Rule Description</text:p>
          </table:table-cell>
          <table:table-cell table:style-name="ce4" office:value-type="string" calcext:value-type="string">
            <text:p>Pass Rule Grouping</text:p>
          </table:table-cell>
          <table:table-cell table:style-name="ce4" office:value-type="string" calcext:value-type="string">
            <text:p>Pass Rule Filter</text:p>
          </table:table-cell>
          <table:table-cell table:style-name="ce4" office:value-type="string" calcext:value-type="string">
            <text:p>Pass Rule Mapping</text:p>
          </table:table-cell>
          <table:table-cell table:style-name="ce4" office:value-type="string" calcext:value-type="string">
            <text:p>Pass Rule Mapping Offset</text:p>
          </table:table-cell>
          <table:table-cell table:style-name="ce4" office:value-type="string" calcext:value-type="string">
            <text:p>Pass Rule Mapping Range</text:p>
          </table:table-cell>
          <table:table-cell table:style-name="ce1"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 A M:M AB-SAP Doc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INVERSE_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 A M:M AB-SAP Doc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A_M:M_WE RL -WL 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</text:p>
          </table:table-cell>
          <table:table-cell office:value-type="string" calcext:value-type="string">
            <text:p>Purchasing_Document, IsActive</text:p>
          </table:table-cell>
          <table:table-cell office:value-type="string" calcext:value-type="string">
            <text:p>zICR_CONSOL_GRIR.Document_Type = N'WL' OR zICR_CONSOL_GRIR.Document_Type = N'RE'</text:p>
          </table:table-cell>
          <table:table-cell office:value-type="string" calcext:value-type="string">
            <text:p>INVERSE_Amount_in_Local_Currency, Purchasing_Document, IsActiv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A_M:M_WE RL -WL 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</text:p>
          </table:table-cell>
          <table:table-cell office:value-type="string" calcext:value-type="string">
            <text:p>Purchasing_Document, IsActive</text:p>
          </table:table-cell>
          <table:table-cell office:value-type="string" calcext:value-type="string">
            <text:p>zICR_CONSOL_GRIR.Document_Type = N'RL' OR zICR_CONSOL_GRIR.Document_Type = N'WE'</text:p>
          </table:table-cell>
          <table:table-cell office:value-type="string" calcext:value-type="string">
            <text:p>Amount_in_Local_Currency, Purchasing_Document, IsActiv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Provision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PROVISION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A_M:M_Reversal of provision (PE-PR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Reversal of provision (PE-PR)</text:p>
          </table:table-cell>
          <table:table-cell office:value-type="string" calcext:value-type="string">
            <text:p>Reference, Document_Type, DocChq_Date</text:p>
          </table:table-cell>
          <table:table-cell office:value-type="string" calcext:value-type="string">
            <text:p>zICR_CONSOL_PROVISION_SAP.Document_Type LIKE N'%PE%' OR zICR_CONSOL_PROVISION_SAP.Document_Type LIKE N'%PR%'</text:p>
          </table:table-cell>
          <table:table-cell office:value-type="string" calcext:value-type="string">
            <text:p>INVERSE_Amount_in_Local_Currency, Reference, DocChq_Date</text:p>
          </table:table-cell>
          <table:table-cell office:value-type="string" calcext:value-type="string">
            <text:p>-1, -2</text:p>
          </table:table-cell>
          <table:table-cell office:value-type="string" calcext:value-type="string">
            <text:p>2, 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Provision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PROVISION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A_M:M_Reversal of provision (PE-PR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Reversal of provision (PE-PR)</text:p>
          </table:table-cell>
          <table:table-cell office:value-type="string" calcext:value-type="string">
            <text:p>Reference, Document_Type, DocChq_Date</text:p>
          </table:table-cell>
          <table:table-cell office:value-type="string" calcext:value-type="string">
            <text:p>zICR_CONSOL_PROVISION_SAP.Document_Type LIKE N'%PE%' OR zICR_CONSOL_PROVISION_SAP.Document_Type LIKE N'%PR%'</text:p>
          </table:table-cell>
          <table:table-cell office:value-type="string" calcext:value-type="string">
            <text:p>Amount_in_Local_Currency, Reference, DocChq_Date</text:p>
          </table:table-cell>
          <table:table-cell office:value-type="string" calcext:value-type="string">
            <text:p>-1, -2</text:p>
          </table:table-cell>
          <table:table-cell office:value-type="string" calcext:value-type="string">
            <text:p>2, 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 A M:M AB-SAP Doc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SAP_Doc_Number, INVERSE_Amount_in_Local_Currency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 A M:M AB-SAP Doc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Clearing_Doc, Amount_in_Local_Currency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table:style-name="ce6" office:value-type="string" calcext:value-type="string">
            <text:p>ICR - TSL Payable - Tata Bluescope Receivable</text:p>
          </table:table-cell>
          <table:table-cell table:style-name="ce6" office:value-type="string" calcext:value-type="string">
            <text:p>ICR 01 - TSL Payable - Tata Bluescope Receivable &gt; TSL Vendor - Tata Bluescope Custom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CR_CONSOL_CUSTOMER_SA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D_A_M:M_Ref-Date-Am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Automatic</text:p>
          </table:table-cell>
          <table:table-cell table:style-name="ce6" office:value-type="string" calcext:value-type="string">
            <text:p>Inv. No. Inv. Date, and Amount to match exactly. </text:p>
          </table:table-cell>
          <table:table-cell table:style-name="ce6" office:value-type="string" calcext:value-type="string">
            <text:p>SAP_Doc_Number, Reference, DocChq_Date</text:p>
          </table:table-cell>
          <table:table-cell table:style-name="ce6"/>
          <table:table-cell table:style-name="ce6" office:value-type="string" calcext:value-type="string">
            <text:p>Reference, DocChq_Date, INVERSE_Amount_in_Local_Currency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10"/>
        </table:table-row>
        <table:table-row table:style-name="ro2" table:visibility="filter">
          <table:table-cell table:style-name="ce6" office:value-type="string" calcext:value-type="string">
            <text:p>ICR - TSL Payable - Tata Bluescope Receivable</text:p>
          </table:table-cell>
          <table:table-cell table:style-name="ce6" office:value-type="string" calcext:value-type="string">
            <text:p>ICR 01 - TSL Payable - Tata Bluescope Receivable &gt; TSL Vendor - Tata Bluescope Custom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CR_CONSOL_VENDOR_SA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D_A_M:M_Ref-Date-Am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Automatic</text:p>
          </table:table-cell>
          <table:table-cell table:style-name="ce6" office:value-type="string" calcext:value-type="string">
            <text:p>Inv. No. Inv. Date, and Amount to match exactly. </text:p>
          </table:table-cell>
          <table:table-cell table:style-name="ce6" office:value-type="string" calcext:value-type="string">
            <text:p>SAP_Doc_Number, Reference, DocChq_Date</text:p>
          </table:table-cell>
          <table:table-cell table:style-name="ce6"/>
          <table:table-cell table:style-name="ce6" office:value-type="string" calcext:value-type="string">
            <text:p>Reference, DocChq_Date, Amount_in_Local_Currency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3 - TSL Payable - Tata Bluescope Receivable &gt; Provision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PROVISION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:M_S_Amount Provi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Amount and Provisions.</text:p>
          </table:table-cell>
          <table:table-cell table:number-columns-repeated="2"/>
          <table:table-cell office:value-type="string" calcext:value-type="string">
            <text:p>Net_Amoun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3 - TSL Payable - Tata Bluescope Receivable &gt; Provision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:M_S_Amount Provi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Amount and Provisions.</text:p>
          </table:table-cell>
          <table:table-cell office:value-type="string" calcext:value-type="string">
            <text:p>Document_Type</text:p>
          </table:table-cell>
          <table:table-cell office:value-type="string" calcext:value-type="string">
            <text:p>zICR_CONSOL_CUSTOMER_SAP.Document_Type LIKE N'%RV%'</text:p>
          </table:table-cell>
          <table:table-cell office:value-type="string" calcext:value-type="string">
            <text:p>Net_Amount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ICR - TSL Payable - Tata Bluescope Receivable</text:p>
          </table:table-cell>
          <table:table-cell table:style-name="ce7" office:value-type="string" calcext:value-type="string">
            <text:p>ICR 02 - TSL Payable - Tata Bluescope Receivable &gt; GRIR to Custom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CR_CONSOL_GRI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D_S_1:1 Ref Bill Doc Amount_NP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utomatic</text:p>
          </table:table-cell>
          <table:table-cell table:style-name="ce7" office:value-type="string" calcext:value-type="string">
            <text:p>Matching of Reference and Bill Doc No.with Amount.</text:p>
          </table:table-cell>
          <table:table-cell table:style-name="ce7"/>
          <table:table-cell table:style-name="ce7" office:value-type="string" calcext:value-type="string">
            <text:p>zICR_CONSOL_GRIR.Document_Type LIKE N'%WE%'</text:p>
          </table:table-cell>
          <table:table-cell table:style-name="ce7" office:value-type="string" calcext:value-type="string">
            <text:p>Reference, Amount_in_Local_Currency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1010"/>
        </table:table-row>
        <table:table-row table:style-name="ro2">
          <table:table-cell table:style-name="ce7" office:value-type="string" calcext:value-type="string">
            <text:p>ICR - TSL Payable - Tata Bluescope Receivable</text:p>
          </table:table-cell>
          <table:table-cell table:style-name="ce7" office:value-type="string" calcext:value-type="string">
            <text:p>ICR 02 - TSL Payable - Tata Bluescope Receivable &gt; GRIR to Custom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CR_CONSOL_CUSTOMER_SA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D_S_1:1 Ref Bill Doc Amount_NP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utomatic</text:p>
          </table:table-cell>
          <table:table-cell table:style-name="ce7" office:value-type="string" calcext:value-type="string">
            <text:p>Matching of Reference and Bill Doc No.with Amount.</text:p>
          </table:table-cell>
          <table:table-cell table:style-name="ce7"/>
          <table:table-cell table:style-name="ce7" office:value-type="string" calcext:value-type="string">
            <text:p>zICR_CONSOL_CUSTOMER_SAP.Document_Type LIKE N'%RV%'</text:p>
          </table:table-cell>
          <table:table-cell table:style-name="ce7" office:value-type="string" calcext:value-type="string">
            <text:p>Reference, Net_Amount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 A M:M AB-SAP Doc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INVERSE_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 A M:M AB-SAP Doc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A_M:M_WE RL -WL 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</text:p>
          </table:table-cell>
          <table:table-cell office:value-type="string" calcext:value-type="string">
            <text:p>Purchasing_Document, IsActive</text:p>
          </table:table-cell>
          <table:table-cell office:value-type="string" calcext:value-type="string">
            <text:p>zICR_CONSOL_GRIR.Document_Type = N'WL' OR zICR_CONSOL_GRIR.Document_Type = N'RE'</text:p>
          </table:table-cell>
          <table:table-cell office:value-type="string" calcext:value-type="string">
            <text:p>INVERSE_Amount_in_Local_Currency, Purchasing_Document, IsActiv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A_M:M_WE RL -WL 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</text:p>
          </table:table-cell>
          <table:table-cell office:value-type="string" calcext:value-type="string">
            <text:p>Purchasing_Document, IsActive</text:p>
          </table:table-cell>
          <table:table-cell office:value-type="string" calcext:value-type="string">
            <text:p>zICR_CONSOL_GRIR.Document_Type = N'RL' OR zICR_CONSOL_GRIR.Document_Type = N'WE'</text:p>
          </table:table-cell>
          <table:table-cell office:value-type="string" calcext:value-type="string">
            <text:p>Amount_in_Local_Currency, Purchasing_Document, IsActiv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Provision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PROVISION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A_M:M_Reversal of provision (PE-PR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Reversal of provision (PE-PR)</text:p>
          </table:table-cell>
          <table:table-cell office:value-type="string" calcext:value-type="string">
            <text:p>Reference, Document_Type, DocChq_Date</text:p>
          </table:table-cell>
          <table:table-cell office:value-type="string" calcext:value-type="string">
            <text:p>zICR_CONSOL_PROVISION_SAP.Document_Type LIKE N'%PE%' OR zICR_CONSOL_PROVISION_SAP.Document_Type LIKE N'%PR%'</text:p>
          </table:table-cell>
          <table:table-cell office:value-type="string" calcext:value-type="string">
            <text:p>INVERSE_Amount_in_Local_Currency, Reference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Provision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PROVISION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A_M:M_Reversal of provision (PE-PR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Reversal of provision (PE-PR)</text:p>
          </table:table-cell>
          <table:table-cell office:value-type="string" calcext:value-type="string">
            <text:p>Reference, Document_Type, DocChq_Date</text:p>
          </table:table-cell>
          <table:table-cell office:value-type="string" calcext:value-type="string">
            <text:p>zICR_CONSOL_PROVISION_SAP.Document_Type LIKE N'%PE%' OR zICR_CONSOL_PROVISION_SAP.Document_Type LIKE N'%PR%'</text:p>
          </table:table-cell>
          <table:table-cell office:value-type="string" calcext:value-type="string">
            <text:p>Amount_in_Local_Currency, Reference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3 - Tata Bluescope Payable - TSL Receivable &gt; Provision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PROVISION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:M_S_Amount Provi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Amount and Provisions.</text:p>
          </table:table-cell>
          <table:table-cell table:number-columns-repeated="2"/>
          <table:table-cell office:value-type="string" calcext:value-type="string">
            <text:p>Net_Amoun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3 - Tata Bluescope Payable - TSL Receivable &gt; Provision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:M_S_Amount Provi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Amount and Provisions.</text:p>
          </table:table-cell>
          <table:table-cell office:value-type="string" calcext:value-type="string">
            <text:p>Document_Type</text:p>
          </table:table-cell>
          <table:table-cell office:value-type="string" calcext:value-type="string">
            <text:p>zICR_CONSOL_CUSTOMER_SAP.Document_Type LIKE N'%RV%'</text:p>
          </table:table-cell>
          <table:table-cell office:value-type="string" calcext:value-type="string">
            <text:p>Net_Amoun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 A M:M AB-SAP Doc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SAP_Doc_Number, INVERSE_Amount_in_Local_Currency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 A M:M AB-SAP Doc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Document_Type LIKE N'%H%')</text:p>
          </table:table-cell>
          <table:table-cell office:value-type="string" calcext:value-type="string">
            <text:p>Clearing_Doc, Amount_in_Local_Currency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A_M:M_Ref-Date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nv. No. Inv. Date, and Amount to match exactly. </text:p>
          </table:table-cell>
          <table:table-cell office:value-type="string" calcext:value-type="string">
            <text:p>SAP_Doc_Number, Reference, DocChq_Date</text:p>
          </table:table-cell>
          <table:table-cell/>
          <table:table-cell office:value-type="string" calcext:value-type="string">
            <text:p>Reference, DocChq_Date, INVERSE_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A_M:M_Ref-Date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nv. No. Inv. Date, and Amount to match exactly. </text:p>
          </table:table-cell>
          <table:table-cell office:value-type="string" calcext:value-type="string">
            <text:p>SAP_Doc_Number, Reference, DocChq_Date</text:p>
          </table:table-cell>
          <table:table-cell/>
          <table:table-cell office:value-type="string" calcext:value-type="string">
            <text:p>Reference, DocChq_Date, 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2 - Tata Bluescope Payable - TSL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S_1:1 Ref Bill Doc Amount_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Reference and Bill Doc No.with Amount.</text:p>
          </table:table-cell>
          <table:table-cell/>
          <table:table-cell office:value-type="string" calcext:value-type="string">
            <text:p>zICR_CONSOL_GRIR.Document_Type LIKE N'%WE%'</text:p>
          </table:table-cell>
          <table:table-cell office:value-type="string" calcext:value-type="string">
            <text:p>Reference, Gross_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2 - Tata Bluescope Payable - TSL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S_1:1 Ref Bill Doc Amount_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Reference and Bill Doc No.with Amount.</text:p>
          </table:table-cell>
          <table:table-cell/>
          <table:table-cell office:value-type="string" calcext:value-type="string">
            <text:p>zICR_CONSOL_CUSTOMER_SAP.Document_Type LIKE N'%RV%'</text:p>
          </table:table-cell>
          <table:table-cell office:value-type="string" calcext:value-type="string">
            <text:p>Reference, INVERSE_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A M:M AB-Clearing Doc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INVERSE_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A M:M AB-Clearing Doc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_A_M:M_Branch All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</text:p>
          </table:table-cell>
          <table:table-cell office:value-type="string" calcext:value-type="string">
            <text:p>BranchAlloc, Purchasing_Document, IsActive</text:p>
          </table:table-cell>
          <table:table-cell office:value-type="string" calcext:value-type="string">
            <text:p>zICR_CONSOL_GRIR.Document_Type = N'WL' OR zICR_CONSOL_GRIR.Document_Type = N'RE'</text:p>
          </table:table-cell>
          <table:table-cell office:value-type="string" calcext:value-type="string">
            <text:p>INVERSE_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_A_M:M_Branch All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</text:p>
          </table:table-cell>
          <table:table-cell office:value-type="string" calcext:value-type="string">
            <text:p>BranchAlloc, Purchasing_Document, IsActive</text:p>
          </table:table-cell>
          <table:table-cell office:value-type="string" calcext:value-type="string">
            <text:p>zICR_CONSOL_GRIR.Document_Type = N'RL' OR zICR_CONSOL_GRIR.Document_Type = N'WE'</text:p>
          </table:table-cell>
          <table:table-cell office:value-type="string" calcext:value-type="string">
            <text:p>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A M:M AB-Clearing Doc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INVERSE_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A M:M AB-Clearing Doc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table:style-name="ce6" office:value-type="string" calcext:value-type="string">
            <text:p>ICR - TSL Payable - Tata Bluescope Receivable</text:p>
          </table:table-cell>
          <table:table-cell table:style-name="ce6" office:value-type="string" calcext:value-type="string">
            <text:p>ICR 01 - TSL Payable - Tata Bluescope Receivable &gt; TSL Vendor - Tata Bluescope Custom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CR_CONSOL_CUSTOMER_SAP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D_A_M:M_Ref-Am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Automatic</text:p>
          </table:table-cell>
          <table:table-cell table:style-name="ce6" office:value-type="string" calcext:value-type="string">
            <text:p>Inv. No. and Amount to match exactly. </text:p>
          </table:table-cell>
          <table:table-cell table:style-name="ce6" office:value-type="string" calcext:value-type="string">
            <text:p>SAP_Doc_Number, Reference</text:p>
          </table:table-cell>
          <table:table-cell table:style-name="ce6"/>
          <table:table-cell table:style-name="ce6" office:value-type="string" calcext:value-type="string">
            <text:p>Reference, INVERSE_Amount_in_Local_Currency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10"/>
        </table:table-row>
        <table:table-row table:style-name="ro2" table:visibility="filter">
          <table:table-cell table:style-name="ce6" office:value-type="string" calcext:value-type="string">
            <text:p>ICR - TSL Payable - Tata Bluescope Receivable</text:p>
          </table:table-cell>
          <table:table-cell table:style-name="ce6" office:value-type="string" calcext:value-type="string">
            <text:p>ICR 01 - TSL Payable - Tata Bluescope Receivable &gt; TSL Vendor - Tata Bluescope Custom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CR_CONSOL_VENDOR_SAP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D_A_M:M_Ref-Am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Automatic</text:p>
          </table:table-cell>
          <table:table-cell table:style-name="ce6" office:value-type="string" calcext:value-type="string">
            <text:p>Inv. No. and Amount to match exactly. </text:p>
          </table:table-cell>
          <table:table-cell table:style-name="ce6" office:value-type="string" calcext:value-type="string">
            <text:p>SAP_Doc_Number, Reference</text:p>
          </table:table-cell>
          <table:table-cell table:style-name="ce6"/>
          <table:table-cell table:style-name="ce6" office:value-type="string" calcext:value-type="string">
            <text:p>Reference, Amount_in_Local_Currency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M:M Ref Bill Doc Amount_Group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Reference and Bill Doc No.with Amount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GRIR.Document_Type LIKE N'%WE%'</text:p>
          </table:table-cell>
          <table:table-cell table:style-name="ce10" office:value-type="string" calcext:value-type="string">
            <text:p>Gross_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M:M Ref Bill Doc Amount_Group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Reference and Bill Doc No.with Amount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V%'</text:p>
          </table:table-cell>
          <table:table-cell table:style-name="ce10" office:value-type="string" calcext:value-type="string">
            <text:p>INVERSE_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A M:M AB-Clearing Doc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INVERSE_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A M:M AB-Clearing Doc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_A_M:M_Branch All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</text:p>
          </table:table-cell>
          <table:table-cell office:value-type="string" calcext:value-type="string">
            <text:p>BranchAlloc, Purchasing_Document, IsActive</text:p>
          </table:table-cell>
          <table:table-cell office:value-type="string" calcext:value-type="string">
            <text:p>zICR_CONSOL_GRIR.Document_Type = N'WL' OR zICR_CONSOL_GRIR.Document_Type = N'RE'</text:p>
          </table:table-cell>
          <table:table-cell office:value-type="string" calcext:value-type="string">
            <text:p>INVERSE_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_A_M:M_Branch All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</text:p>
          </table:table-cell>
          <table:table-cell office:value-type="string" calcext:value-type="string">
            <text:p>BranchAlloc, Purchasing_Document, IsActive</text:p>
          </table:table-cell>
          <table:table-cell office:value-type="string" calcext:value-type="string">
            <text:p>zICR_CONSOL_GRIR.Document_Type = N'RL' OR zICR_CONSOL_GRIR.Document_Type = N'WE'</text:p>
          </table:table-cell>
          <table:table-cell office:value-type="string" calcext:value-type="string">
            <text:p>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A M:M AB-Clearing Doc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INVERSE_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A M:M AB-Clearing Doc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learing Doc rule is applied for only auto clearing AB documents, wherein the SAP Doc Number will become the clearing doc for the other AB.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_A_M:M_Ref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nv. No. and Amount to match exactly. </text:p>
          </table:table-cell>
          <table:table-cell office:value-type="string" calcext:value-type="string">
            <text:p>SAP_Doc_Number, Reference</text:p>
          </table:table-cell>
          <table:table-cell/>
          <table:table-cell office:value-type="string" calcext:value-type="string">
            <text:p>Reference, INVERSE_Amount_in_Local_Currency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_A_M:M_Ref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nv. No. and Amount to match exactly. </text:p>
          </table:table-cell>
          <table:table-cell office:value-type="string" calcext:value-type="string">
            <text:p>SAP_Doc_Number, Reference</text:p>
          </table:table-cell>
          <table:table-cell/>
          <table:table-cell office:value-type="string" calcext:value-type="string">
            <text:p>Reference, Amount_in_Local_Currency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2 - Tata Bluescope Payable - TSL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M:M Ref Bill Doc Amount_Group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Reference and Bill Doc No.with Amount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GRIR.Document_Type LIKE N'%WE%'</text:p>
          </table:table-cell>
          <table:table-cell office:value-type="string" calcext:value-type="string">
            <text:p>Gross_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2 - Tata Bluescope Payable - TSL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M:M Ref Bill Doc Amount_Group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Reference and Bill Doc No.with Amount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V%'</text:p>
          </table:table-cell>
          <table:table-cell office:value-type="string" calcext:value-type="string">
            <text:p>INVERSE_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3 - Tata Bluescope Payable - TSL Receivable &gt; Provision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PROVISION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PROVISION_SAP.MatchID_copy IS NOT NULL OR zICR_CONSOL_PROVISION_SAP.MatchID_copy != ''</text:p>
          </table:table-cell>
          <table:table-cell office:value-type="string" calcext:value-type="string">
            <text:p>MatchID_copy, 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3 - Tata Bluescope Payable - TSL Receivable &gt; Provision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CUSTOMER_SAP.MatchID_copy IS NOT NULL OR zICR_CONSOL_CUSTOMER_SAP.MatchID_copy != ''</text:p>
          </table:table-cell>
          <table:table-cell office:value-type="string" calcext:value-type="string">
            <text:p>MatchID_copy, INVERSE_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3 - TSL Payable - Tata Bluescope Receivable &gt; Provision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PROVISION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 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PROVISION_SAP.MatchID_copy IS NOT NULL OR zICR_CONSOL_PROVISION_SAP.MatchID_copy != ''</text:p>
          </table:table-cell>
          <table:table-cell office:value-type="string" calcext:value-type="string">
            <text:p>MatchID_copy, 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3 - TSL Payable - Tata Bluescope Receivable &gt; Provision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 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CUSTOMER_SAP.MatchID_copy IS NOT NULL OR zICR_CONSOL_CUSTOMER_SAP.MatchID_copy != ''</text:p>
          </table:table-cell>
          <table:table-cell office:value-type="string" calcext:value-type="string">
            <text:p>MatchID_copy, INVERSE_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 A M:M AB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SAP Doc Number for AB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SAP_Doc_Number, INVERSE_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 A M:M AB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SAP Doc Number for AB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SAP_Doc_Number, 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_A_M:M_WE-RE clearing (SAP Doc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SAP Doc no</text:p>
          </table:table-cell>
          <table:table-cell office:value-type="string" calcext:value-type="string">
            <text:p>SAP_Doc_Number, Purchasing_Document, IsActive</text:p>
          </table:table-cell>
          <table:table-cell office:value-type="string" calcext:value-type="string">
            <text:p>zICR_CONSOL_GRIR.Document_Type = N'WL' OR zICR_CONSOL_GRIR.Document_Type = N'RE'</text:p>
          </table:table-cell>
          <table:table-cell office:value-type="string" calcext:value-type="string">
            <text:p>INVERSE_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_A_M:M_WE-RE clearing (SAP Doc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SAP Doc no</text:p>
          </table:table-cell>
          <table:table-cell office:value-type="string" calcext:value-type="string">
            <text:p>SAP_Doc_Number, Purchasing_Document, IsActive</text:p>
          </table:table-cell>
          <table:table-cell office:value-type="string" calcext:value-type="string">
            <text:p>zICR_CONSOL_GRIR.Document_Type = N'RL' OR zICR_CONSOL_GRIR.Document_Type = N'WE'</text:p>
          </table:table-cell>
          <table:table-cell office:value-type="string" calcext:value-type="string">
            <text:p>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 A M:M AB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SAP Doc Number for AB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INVERSE_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 A M:M AB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SAP Doc Number for AB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table:style-name="ce6" office:value-type="string" calcext:value-type="string">
            <text:p>ICR - TSL Payable - Tata Bluescope Receivable</text:p>
          </table:table-cell>
          <table:table-cell table:style-name="ce6" office:value-type="string" calcext:value-type="string">
            <text:p>ICR 01 - TSL Payable - Tata Bluescope Receivable &gt; TSL Vendor - Tata Bluescope Custom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CR_CONSOL_CUSTOMER_SA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D_A_1:1_Inv. Date and Amoun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Automatic</text:p>
          </table:table-cell>
          <table:table-cell table:style-name="ce6" office:value-type="string" calcext:value-type="string">
            <text:p>Inv. No. Inv. Date, and Amount to match with a variance of a day and INR 1.</text:p>
          </table:table-cell>
          <table:table-cell table:style-name="ce6"/>
          <table:table-cell table:style-name="ce6" office:value-type="string" calcext:value-type="string">
            <text:p>zICR_CONSOL_CUSTOMER_SAP.Reference != ''</text:p>
          </table:table-cell>
          <table:table-cell table:style-name="ce6" office:value-type="string" calcext:value-type="string">
            <text:p>INVERSE_Amount_in_Local_Currency, Reference, DocChq_Date</text:p>
          </table:table-cell>
          <table:table-cell table:style-name="ce6" office:value-type="string" calcext:value-type="string">
            <text:p>-1, -1</text:p>
          </table:table-cell>
          <table:table-cell table:style-name="ce6" office:value-type="string" calcext:value-type="string">
            <text:p>2, 2</text:p>
          </table:table-cell>
          <table:table-cell table:style-name="ce6" table:number-columns-repeated="1010"/>
        </table:table-row>
        <table:table-row table:style-name="ro2" table:visibility="filter">
          <table:table-cell table:style-name="ce6" office:value-type="string" calcext:value-type="string">
            <text:p>ICR - TSL Payable - Tata Bluescope Receivable</text:p>
          </table:table-cell>
          <table:table-cell table:style-name="ce6" office:value-type="string" calcext:value-type="string">
            <text:p>ICR 01 - TSL Payable - Tata Bluescope Receivable &gt; TSL Vendor - Tata Bluescope Custom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CR_CONSOL_VENDOR_SA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D_A_1:1_Inv. Date and Amoun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Automatic</text:p>
          </table:table-cell>
          <table:table-cell table:style-name="ce6" office:value-type="string" calcext:value-type="string">
            <text:p>Inv. No. Inv. Date, and Amount to match with a variance of a day and INR 1.</text:p>
          </table:table-cell>
          <table:table-cell table:style-name="ce6"/>
          <table:table-cell table:style-name="ce6" office:value-type="string" calcext:value-type="string">
            <text:p>zICR_CONSOL_VENDOR_SAP.Reference != ''</text:p>
          </table:table-cell>
          <table:table-cell table:style-name="ce6" office:value-type="string" calcext:value-type="string">
            <text:p>Amount_in_Local_Currency, Reference, DocChq_Date</text:p>
          </table:table-cell>
          <table:table-cell table:style-name="ce6" office:value-type="string" calcext:value-type="string">
            <text:p>-1, -1</text:p>
          </table:table-cell>
          <table:table-cell table:style-name="ce6" office:value-type="string" calcext:value-type="string">
            <text:p>2, 2</text:p>
          </table:table-cell>
          <table:table-cell table:style-name="ce6"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_S_1:1 Doc Chq <text:s/>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Branch Alloc - Indicator 1 with Amount.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GRIR.Document_Type LIKE N'%WE%'</text:p>
          </table:table-cell>
          <table:table-cell office:value-type="string" calcext:value-type="string">
            <text:p>Gross_Amount_In_Local_Currency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_S_1:1 Doc Chq <text:s/>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Branch Alloc - Indicator 1 with Amount.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CUSTOMER_SAP.Document_Type LIKE N'%RV%' OR zICR_CONSOL_CUSTOMER_SAP.Document_Type LIKE N'%DR%'</text:p>
          </table:table-cell>
          <table:table-cell office:value-type="string" calcext:value-type="string">
            <text:p>INVERSE_Amount_in_Local_Currency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 A M:M AB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SAP Doc Number for AB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SAP_Doc_Number, INVERSE_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 A M:M AB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SAP Doc Number for AB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SAP_Doc_Number, 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_A_M:M_WE-RE clearing (SAP Doc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SAP Doc no</text:p>
          </table:table-cell>
          <table:table-cell office:value-type="string" calcext:value-type="string">
            <text:p>SAP_Doc_Number, Purchasing_Document, IsActive</text:p>
          </table:table-cell>
          <table:table-cell office:value-type="string" calcext:value-type="string">
            <text:p>zICR_CONSOL_GRIR.Document_Type = N'WL' OR zICR_CONSOL_GRIR.Document_Type = N'RE'</text:p>
          </table:table-cell>
          <table:table-cell office:value-type="string" calcext:value-type="string">
            <text:p>INVERSE_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_A_M:M_WE-RE clearing (SAP Doc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SAP Doc no</text:p>
          </table:table-cell>
          <table:table-cell office:value-type="string" calcext:value-type="string">
            <text:p>SAP_Doc_Number, Purchasing_Document, IsActive</text:p>
          </table:table-cell>
          <table:table-cell office:value-type="string" calcext:value-type="string">
            <text:p>zICR_CONSOL_GRIR.Document_Type = N'RL' OR zICR_CONSOL_GRIR.Document_Type = N'WE'</text:p>
          </table:table-cell>
          <table:table-cell office:value-type="string" calcext:value-type="string">
            <text:p>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 A M:M AB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SAP Doc Number for AB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INVERSE_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 A M:M AB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SAP Doc Number for AB 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2 - Tata Bluescope Payable - TSL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_S_1:1 Doc Chq <text:s/>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Branch Alloc - Indicator 1 with Amount.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GRIR.Document_Type LIKE N'%WE%'</text:p>
          </table:table-cell>
          <table:table-cell office:value-type="string" calcext:value-type="string">
            <text:p>Gross_Amount_In_Local_Currency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2 - Tata Bluescope Payable - TSL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_S_1:1 Doc Chq <text:s/>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Branch Alloc - Indicator 1 with Amount.</text:p>
          </table:table-cell>
          <table:table-cell office:value-type="string" calcext:value-type="string">
            <text:p>SAP_Doc_Number</text:p>
          </table:table-cell>
          <table:table-cell office:value-type="string" calcext:value-type="string">
            <text:p>zICR_CONSOL_CUSTOMER_SAP.Document_Type LIKE N'%RV%' OR zICR_CONSOL_CUSTOMER_SAP.Document_Type LIKE N'%DR%'</text:p>
          </table:table-cell>
          <table:table-cell office:value-type="string" calcext:value-type="string">
            <text:p>INVERSE_Amount_in_Local_Currency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_A_M:M_Ref-Purchas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nv. No. and Amount to match exactly. </text:p>
          </table:table-cell>
          <table:table-cell office:value-type="string" calcext:value-type="string">
            <text:p>Document_Type, Purchasing_Document</text:p>
          </table:table-cell>
          <table:table-cell office:value-type="string" calcext:value-type="string">
            <text:p>zICR_CONSOL_CUSTOMER_SAP.Document_Type = N'RD'</text:p>
          </table:table-cell>
          <table:table-cell office:value-type="string" calcext:value-type="string">
            <text:p>INVERSE_Amount_in_Local_Currency, Purchasing_Document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_A_M:M_Ref-Purchas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nv. No. and Amount to match exactly. </text:p>
          </table:table-cell>
          <table:table-cell office:value-type="string" calcext:value-type="string">
            <text:p>Document_Type, Reference</text:p>
          </table:table-cell>
          <table:table-cell office:value-type="string" calcext:value-type="string">
            <text:p>zICR_CONSOL_VENDOR_SAP.Document_Type = N'K2'</text:p>
          </table:table-cell>
          <table:table-cell office:value-type="string" calcext:value-type="string">
            <text:p>Amount_in_Local_Currency, Reference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_A_M:M_WE-RE clearing_var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 Grouping done by <text:s/>purchasing document and <text:s/>Special GL ind</text:p>
          </table:table-cell>
          <table:table-cell office:value-type="string" calcext:value-type="string">
            <text:p>Purchasing_Document, IsActive</text:p>
          </table:table-cell>
          <table:table-cell office:value-type="string" calcext:value-type="string">
            <text:p>zICR_CONSOL_GRIR.Document_Type = N'WL' OR zICR_CONSOL_GRIR.Document_Type = N'RE'</text:p>
          </table:table-cell>
          <table:table-cell office:value-type="string" calcext:value-type="string">
            <text:p>INVERSE_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_A_M:M_WE-RE clearing_var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 Grouping done by <text:s/>purchasing document and <text:s/>Special GL ind</text:p>
          </table:table-cell>
          <table:table-cell office:value-type="string" calcext:value-type="string">
            <text:p>Purchasing_Document, IsActive</text:p>
          </table:table-cell>
          <table:table-cell office:value-type="string" calcext:value-type="string">
            <text:p>zICR_CONSOL_GRIR.Document_Type = N'RL' OR zICR_CONSOL_GRIR.Document_Type = N'WE'</text:p>
          </table:table-cell>
          <table:table-cell office:value-type="string" calcext:value-type="string">
            <text:p>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table:style-name="ce6" office:value-type="string" calcext:value-type="string">
            <text:p>ICR - TSL Payable - Tata Bluescope Receivable</text:p>
          </table:table-cell>
          <table:table-cell table:style-name="ce6" office:value-type="string" calcext:value-type="string">
            <text:p>ICR 01 - TSL Payable - Tata Bluescope Receivable &gt; TSL Vendor - Tata Bluescope Custom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CR_CONSOL_CUSTOMER_SAP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D_A_1:1 Bill Doc Ref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Automatic</text:p>
          </table:table-cell>
          <table:table-cell table:style-name="ce6" office:value-type="string" calcext:value-type="string">
            <text:p>Bill Doc and Reference to match alongwith Amount with a variance of INR 1.</text:p>
          </table:table-cell>
          <table:table-cell table:style-name="ce6" table:number-columns-repeated="2"/>
          <table:table-cell table:style-name="ce6" office:value-type="string" calcext:value-type="string">
            <text:p>INVERSE_Amount_in_Local_Currency, Reference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10"/>
        </table:table-row>
        <table:table-row table:style-name="ro2" table:visibility="filter">
          <table:table-cell table:style-name="ce6" office:value-type="string" calcext:value-type="string">
            <text:p>ICR - TSL Payable - Tata Bluescope Receivable</text:p>
          </table:table-cell>
          <table:table-cell table:style-name="ce6" office:value-type="string" calcext:value-type="string">
            <text:p>ICR 01 - TSL Payable - Tata Bluescope Receivable &gt; TSL Vendor - Tata Bluescope Custom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CR_CONSOL_VENDOR_SAP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D_A_1:1 Bill Doc Ref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Automatic</text:p>
          </table:table-cell>
          <table:table-cell table:style-name="ce6" office:value-type="string" calcext:value-type="string">
            <text:p>Bill Doc and Reference to match alongwith Amount with a variance of INR 1.</text:p>
          </table:table-cell>
          <table:table-cell table:style-name="ce6"/>
          <table:table-cell table:style-name="ce6" office:value-type="string" calcext:value-type="string">
            <text:p>zICR_CONSOL_VENDOR_SAP.Reference != ''</text:p>
          </table:table-cell>
          <table:table-cell table:style-name="ce6" office:value-type="string" calcext:value-type="string">
            <text:p>Amount_in_Local_Currency, Reference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M:M Filtered WE RV_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Branch Alloc - Indicator 1</text:p>
          </table:table-cell>
          <table:table-cell office:value-type="string" calcext:value-type="string">
            <text:p>SAP_Doc_Number, Delivery_Note</text:p>
          </table:table-cell>
          <table:table-cell office:value-type="string" calcext:value-type="string">
            <text:p>zICR_CONSOL_GRIR.Document_Type LIKE N'%WE%'</text:p>
          </table:table-cell>
          <table:table-cell office:value-type="string" calcext:value-type="string">
            <text:p>Net_Amount, Delivery_No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M:M Filtered WE RV_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Branch Alloc - Indicator 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V%'</text:p>
          </table:table-cell>
          <table:table-cell office:value-type="string" calcext:value-type="string">
            <text:p>Net_Amount, Referenc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_A_M:M_WE-RE clearing_var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 Grouping done by <text:s/>purchasing document and <text:s/>Special GL ind</text:p>
          </table:table-cell>
          <table:table-cell office:value-type="string" calcext:value-type="string">
            <text:p>Purchasing_Document, IsActive</text:p>
          </table:table-cell>
          <table:table-cell office:value-type="string" calcext:value-type="string">
            <text:p>zICR_CONSOL_GRIR.Document_Type = N'WL' OR zICR_CONSOL_GRIR.Document_Type = N'RE'</text:p>
          </table:table-cell>
          <table:table-cell office:value-type="string" calcext:value-type="string">
            <text:p>INVERSE_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_A_M:M_WE-RE clearing_var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M:M_WE-RE clearing <text:s/>through a unique matching key. Grouping done by <text:s/>purchasing document and <text:s/>Special GL ind</text:p>
          </table:table-cell>
          <table:table-cell office:value-type="string" calcext:value-type="string">
            <text:p>Purchasing_Document, IsActive</text:p>
          </table:table-cell>
          <table:table-cell office:value-type="string" calcext:value-type="string">
            <text:p>zICR_CONSOL_GRIR.Document_Type = N'RL' OR zICR_CONSOL_GRIR.Document_Type = N'WE'</text:p>
          </table:table-cell>
          <table:table-cell office:value-type="string" calcext:value-type="string">
            <text:p>Amount_in_Local_Currency, Purchasing_Document, IsActiv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2 - Tata Bluescope Payable - TSL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M:M Filtered WE RV_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Branch Alloc - Indicator 1</text:p>
          </table:table-cell>
          <table:table-cell office:value-type="string" calcext:value-type="string">
            <text:p>SAP_Doc_Number, Delivery_Note</text:p>
          </table:table-cell>
          <table:table-cell office:value-type="string" calcext:value-type="string">
            <text:p>zICR_CONSOL_GRIR.Document_Type LIKE N'%WE%'</text:p>
          </table:table-cell>
          <table:table-cell office:value-type="string" calcext:value-type="string">
            <text:p>Net_Amount, Delivery_Not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2 - Tata Bluescope Payable - TSL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M:M Filtered WE RV_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Branch Alloc - Indicator 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V%'</text:p>
          </table:table-cell>
          <table:table-cell office:value-type="string" calcext:value-type="string">
            <text:p>Net_Amount, Referenc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A M:M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Clearing Doc to Clearing Doc for AB, DP and DZ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INVERSE_Amount_in_Local_Currency, Clearing_Do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A M:M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Clearing Doc to Clearing Doc for AB, DP and DZ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Amount_in_Local_Currency, Clearing_Do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A M:M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Clearing Doc to Clearing Doc for AB, DP and DZ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INVERSE_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A M:M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Clearing Doc to Clearing Doc for AB, DP and DZ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A M:M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Clearing Doc to Clearing Doc for AB, DP and DZ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INVERSE_Amount_in_Local_Currency, Clearing_Do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A M:M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Clearing Doc to Clearing Doc for AB, DP and DZ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Amount_in_Local_Currency, Clearing_Do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A M:M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Clearing Doc to Clearing Doc for AB, DP and DZ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INVERSE_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 A M:M 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Clearing Doc to Clearing Doc for AB, DP and DZ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 A M:M RL RE DG R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for Document Type RL RE DG and RC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E%' OR zICR_CONSOL_CUSTOMER_SAP.Document_Type LIKE N'%RL%' OR zICR_CONSOL_CUSTOMER_SAP.Document_Type LIKE N'%DG%' OR zICR_CONSOL_CUSTOMER_SAP.Document_Type LIKE N'%RC%'</text:p>
          </table:table-cell>
          <table:table-cell office:value-type="string" calcext:value-type="string">
            <text:p>Reference, INVERSE_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 A M:M RL RE DG R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for Document Type RL RE DG and RC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E%' OR zICR_CONSOL_CUSTOMER_SAP.Document_Type LIKE N'%RL%' OR zICR_CONSOL_CUSTOMER_SAP.Document_Type LIKE N'%DG%' OR zICR_CONSOL_CUSTOMER_SAP.Document_Type LIKE N'%RC%'</text:p>
          </table:table-cell>
          <table:table-cell office:value-type="string" calcext:value-type="string">
            <text:p>Reference, 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_A_1:1_WE-RE clea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1:1_WE-RE clearing <text:s/>through a unique matching key.</text:p>
          </table:table-cell>
          <table:table-cell/>
          <table:table-cell office:value-type="string" calcext:value-type="string">
            <text:p>zICR_CONSOL_GRIR.Document_Type = N'WL' OR zICR_CONSOL_GRIR.Document_Type = N'RE'</text:p>
          </table:table-cell>
          <table:table-cell office:value-type="string" calcext:value-type="string">
            <text:p>INVERSE_Amount_in_Local_Currency, IsActive, Purchasing_Document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_A_1:1_WE-RE clea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1:1_WE-RE clearing <text:s/>through a unique matching key.</text:p>
          </table:table-cell>
          <table:table-cell/>
          <table:table-cell office:value-type="string" calcext:value-type="string">
            <text:p>zICR_CONSOL_GRIR.Document_Type = N'RL' OR zICR_CONSOL_GRIR.Document_Type = N'WE'</text:p>
          </table:table-cell>
          <table:table-cell office:value-type="string" calcext:value-type="string">
            <text:p>Amount_in_Local_Currency, IsActive, Purchasing_Document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 A M:M RL RE DG R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for Document Type RL RE DG and RC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VENDOR_SAP.Document_Type LIKE N'%RL%' OR zICR_CONSOL_VENDOR_SAP.Document_Type LIKE N'%RE%' OR zICR_CONSOL_VENDOR_SAP.Document_Type LIKE N'%DG%' OR zICR_CONSOL_VENDOR_SAP.Document_Type LIKE N'%RC%'</text:p>
          </table:table-cell>
          <table:table-cell office:value-type="string" calcext:value-type="string">
            <text:p>INVERSE_Amount_in_Local_Currency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 A M:M RL RE DG R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for Document Type RL RE DG and RC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VENDOR_SAP.Document_Type LIKE N'%RL%' OR zICR_CONSOL_VENDOR_SAP.Document_Type LIKE N'%RE%' OR zICR_CONSOL_VENDOR_SAP.Document_Type LIKE N'%DG%' OR zICR_CONSOL_VENDOR_SAP.Document_Type LIKE N'%RC%'</text:p>
          </table:table-cell>
          <table:table-cell office:value-type="string" calcext:value-type="string">
            <text:p>Amount_in_Local_Currency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table:style-name="ce8" office:value-type="string" calcext:value-type="string">
            <text:p>ICR - TSL Payable - Tata Bluescope Receivable</text:p>
          </table:table-cell>
          <table:table-cell table:style-name="ce8" office:value-type="string" calcext:value-type="string">
            <text:p>ICR 01 - TSL Payable - Tata Bluescope Receivable &gt; TSL Vendor - Tata Bluescope Custome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CR_CONSOL_CUSTOMER_SAP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SD_A_M:M Bill Doc Ref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Automatic</text:p>
          </table:table-cell>
          <table:table-cell table:style-name="ce8" office:value-type="string" calcext:value-type="string">
            <text:p>Bill Doc and Reference to match alongwith Amount with a variance of INR 1. Not matching is the Reference is empty.</text:p>
          </table:table-cell>
          <table:table-cell table:style-name="ce8" office:value-type="string" calcext:value-type="string">
            <text:p>Reference</text:p>
          </table:table-cell>
          <table:table-cell table:style-name="ce8"/>
          <table:table-cell table:style-name="ce8" office:value-type="string" calcext:value-type="string">
            <text:p>INVERSE_Amount_in_Local_Currency, Reference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0"/>
        </table:table-row>
        <table:table-row table:style-name="ro2" table:visibility="filter">
          <table:table-cell table:style-name="ce8" office:value-type="string" calcext:value-type="string">
            <text:p>ICR - TSL Payable - Tata Bluescope Receivable</text:p>
          </table:table-cell>
          <table:table-cell table:style-name="ce8" office:value-type="string" calcext:value-type="string">
            <text:p>ICR 01 - TSL Payable - Tata Bluescope Receivable &gt; TSL Vendor - Tata Bluescope Custome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CR_CONSOL_VENDOR_SAP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SD_A_M:M Bill Doc Ref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Automatic</text:p>
          </table:table-cell>
          <table:table-cell table:style-name="ce8" office:value-type="string" calcext:value-type="string">
            <text:p>Bill Doc and Reference to match alongwith Amount with a variance of INR 1. Not matching is the Reference is empty.</text:p>
          </table:table-cell>
          <table:table-cell table:style-name="ce8" office:value-type="string" calcext:value-type="string">
            <text:p>Reference</text:p>
          </table:table-cell>
          <table:table-cell table:style-name="ce8" office:value-type="string" calcext:value-type="string">
            <text:p>zICR_CONSOL_VENDOR_SAP.Reference != ''</text:p>
          </table:table-cell>
          <table:table-cell table:style-name="ce8" office:value-type="string" calcext:value-type="string">
            <text:p>Amount_in_Local_Currency, Reference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 A M:M RL RE DG R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for Document Type RL RE DG and RC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E%' OR zICR_CONSOL_CUSTOMER_SAP.Document_Type LIKE N'%RL%' OR zICR_CONSOL_CUSTOMER_SAP.Document_Type LIKE N'%DG%' OR zICR_CONSOL_CUSTOMER_SAP.Document_Type LIKE N'%RC%'</text:p>
          </table:table-cell>
          <table:table-cell office:value-type="string" calcext:value-type="string">
            <text:p>Reference, INVERSE_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 A M:M RL RE DG R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for Document Type RL RE DG and RC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E%' OR zICR_CONSOL_CUSTOMER_SAP.Document_Type LIKE N'%RL%' OR zICR_CONSOL_CUSTOMER_SAP.Document_Type LIKE N'%DG%' OR zICR_CONSOL_CUSTOMER_SAP.Document_Type LIKE N'%RC%'</text:p>
          </table:table-cell>
          <table:table-cell office:value-type="string" calcext:value-type="string">
            <text:p>Reference, 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_A_1:1_WE-RE clea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1:1_WE-RE clearing <text:s/>through a unique matching key.</text:p>
          </table:table-cell>
          <table:table-cell/>
          <table:table-cell office:value-type="string" calcext:value-type="string">
            <text:p>zICR_CONSOL_GRIR.Document_Type = N'WL' OR zICR_CONSOL_GRIR.Document_Type = N'RE'</text:p>
          </table:table-cell>
          <table:table-cell office:value-type="string" calcext:value-type="string">
            <text:p>INVERSE_Amount_in_Local_Currency, IsActive, Purchasing_Document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_A_1:1_WE-RE clea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D_A_1:1_WE-RE clearing <text:s/>through a unique matching key.</text:p>
          </table:table-cell>
          <table:table-cell/>
          <table:table-cell office:value-type="string" calcext:value-type="string">
            <text:p>zICR_CONSOL_GRIR.Document_Type = N'RL' OR zICR_CONSOL_GRIR.Document_Type = N'WE'</text:p>
          </table:table-cell>
          <table:table-cell office:value-type="string" calcext:value-type="string">
            <text:p>Amount_in_Local_Currency, IsActive, Purchasing_Document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 A M:M RL RE DG R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for Document Type RL RE DG and RC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VENDOR_SAP.Document_Type LIKE N'%RL%' OR zICR_CONSOL_VENDOR_SAP.Document_Type LIKE N'%RE%' OR zICR_CONSOL_VENDOR_SAP.Document_Type LIKE N'%DG%' OR zICR_CONSOL_VENDOR_SAP.Document_Type LIKE N'%RC%'</text:p>
          </table:table-cell>
          <table:table-cell office:value-type="string" calcext:value-type="string">
            <text:p>INVERSE_Amount_in_Local_Currency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 A M:M RL RE DG R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for Document Type RL RE DG and RC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VENDOR_SAP.Document_Type LIKE N'%RL%' OR zICR_CONSOL_VENDOR_SAP.Document_Type LIKE N'%RE%' OR zICR_CONSOL_VENDOR_SAP.Document_Type LIKE N'%DG%' OR zICR_CONSOL_VENDOR_SAP.Document_Type LIKE N'%RC%'</text:p>
          </table:table-cell>
          <table:table-cell office:value-type="string" calcext:value-type="string">
            <text:p>Amount_in_Local_Currency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 M:M Branch Alloc - Indicator 1 Amount_Group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Branch Alloc - Indicator 1</text:p>
          </table:table-cell>
          <table:table-cell office:value-type="string" calcext:value-type="string">
            <text:p>Delivery_Note</text:p>
          </table:table-cell>
          <table:table-cell office:value-type="string" calcext:value-type="string">
            <text:p>zICR_CONSOL_GRIR.Document_Type LIKE N'%RV%'</text:p>
          </table:table-cell>
          <table:table-cell office:value-type="string" calcext:value-type="string">
            <text:p>Delivery_No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 M:M Branch Alloc - Indicator 1 Amount_Group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Branch Alloc - Indicator 1</text:p>
          </table:table-cell>
          <table:table-cell office:value-type="string" calcext:value-type="string">
            <text:p>BranchAlloc</text:p>
          </table:table-cell>
          <table:table-cell office:value-type="string" calcext:value-type="string">
            <text:p>zICR_CONSOL_CUSTOMER_SAP.SAP_Doc_Number LIKE N'%WE%'</text:p>
          </table:table-cell>
          <table:table-cell office:value-type="string" calcext:value-type="string">
            <text:p>BranchAllo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2 - Tata Bluescope Payable - TSL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GRIR.Company_Code IS NOT NULL OR zICR_CONSOL_GRIR.Company_Code != ''</text:p>
          </table:table-cell>
          <table:table-cell office:value-type="string" calcext:value-type="string">
            <text:p>MatchID_copy, 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2 - Tata Bluescope Payable - TSL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CUSTOMER_SAP.MatchID_copy IS NOT NULL OR zICR_CONSOL_CUSTOMER_SAP.MatchID_copy != ''</text:p>
          </table:table-cell>
          <table:table-cell office:value-type="string" calcext:value-type="string">
            <text:p>MatchID_copy, INVERSE_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_A_M:M_Ref-Purchasing Doc_RV-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RV RE by <text:s/>matching Purchasing doc and reference</text:p>
          </table:table-cell>
          <table:table-cell office:value-type="string" calcext:value-type="string">
            <text:p>Document_Type, Purchasing_Document</text:p>
          </table:table-cell>
          <table:table-cell office:value-type="string" calcext:value-type="string">
            <text:p>zICR_CONSOL_CUSTOMER_SAP.Document_Type = N'RV'</text:p>
          </table:table-cell>
          <table:table-cell office:value-type="string" calcext:value-type="string">
            <text:p>INVERSE_Amount_in_Local_Currency, Purchasing_Document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_A_M:M_Ref-Purchasing Doc_RV-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RV RE by <text:s/>matching Purchasing doc and reference</text:p>
          </table:table-cell>
          <table:table-cell office:value-type="string" calcext:value-type="string">
            <text:p>Document_Type, Reference</text:p>
          </table:table-cell>
          <table:table-cell office:value-type="string" calcext:value-type="string">
            <text:p>zICR_CONSOL_VENDOR_SAP.Document_Type = N'RE'</text:p>
          </table:table-cell>
          <table:table-cell office:value-type="string" calcext:value-type="string">
            <text:p>Amount_in_Local_Currency, Reference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V DR RD 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in Customer Books 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V%' OR zICR_CONSOL_CUSTOMER_SAP.Document_Type LIKE N'%DR%' OR zICR_CONSOL_CUSTOMER_SAP.Document_Type LIKE N'%RD%' OR zICR_CONSOL_CUSTOMER_SAP.Document_Type LIKE N'%DA%'</text:p>
          </table:table-cell>
          <table:table-cell office:value-type="string" calcext:value-type="string">
            <text:p>Reference, INVERSE_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V DR RD 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in Customer Books 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V%' OR zICR_CONSOL_CUSTOMER_SAP.Document_Type LIKE N'%DR%' OR zICR_CONSOL_CUSTOMER_SAP.Document_Type LIKE N'%RD%' OR zICR_CONSOL_CUSTOMER_SAP.Document_Type LIKE N'%DA%'</text:p>
          </table:table-cell>
          <table:table-cell office:value-type="string" calcext:value-type="string">
            <text:p>Reference, 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evers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</text:p>
          </table:table-cell>
          <table:table-cell office:value-type="string" calcext:value-type="string">
            <text:p>SAP_Doc_Number, Reference, Document_Type</text:p>
          </table:table-cell>
          <table:table-cell office:value-type="string" calcext:value-type="string">
            <text:p>zICR_CONSOL_GRIR.Amount_in_Local_Currency &gt; 0</text:p>
          </table:table-cell>
          <table:table-cell office:value-type="string" calcext:value-type="string">
            <text:p>INVERSE_Amount_in_Local_Currency, Document_Type, Referenc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evers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</text:p>
          </table:table-cell>
          <table:table-cell office:value-type="string" calcext:value-type="string">
            <text:p>SAP_Doc_Number, Reference, Document_Type</text:p>
          </table:table-cell>
          <table:table-cell office:value-type="string" calcext:value-type="string">
            <text:p>zICR_CONSOL_GRIR.Amount_in_Local_Currency &lt; 0</text:p>
          </table:table-cell>
          <table:table-cell office:value-type="string" calcext:value-type="string">
            <text:p>Amount_in_Local_Currency, Document_Type, Referenc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V DR RD 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in vendor book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VENDOR_SAP.Document_Type LIKE N'%RV%' OR zICR_CONSOL_VENDOR_SAP.Document_Type LIKE N'%RD%' OR zICR_CONSOL_VENDOR_SAP.Document_Type LIKE N'%DR%' OR zICR_CONSOL_VENDOR_SAP.Document_Type LIKE N'%DA%'</text:p>
          </table:table-cell>
          <table:table-cell office:value-type="string" calcext:value-type="string">
            <text:p>INVERSE_Amount_in_Local_Currency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V DR RD 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in vendor book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VENDOR_SAP.Document_Type LIKE N'%RV%' OR zICR_CONSOL_VENDOR_SAP.Document_Type LIKE N'%RD%' OR zICR_CONSOL_VENDOR_SAP.Document_Type LIKE N'%DR%' OR zICR_CONSOL_VENDOR_SAP.Document_Type LIKE N'%DA%'</text:p>
          </table:table-cell>
          <table:table-cell office:value-type="string" calcext:value-type="string">
            <text:p>Amount_in_Local_Currency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_S_M:M_Doc Chq_G_S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Doc Chq match for transactions grouped by SAP Doc Number, Type and Date to be matched with amount.</text:p>
          </table:table-cell>
          <table:table-cell office:value-type="string" calcext:value-type="string">
            <text:p>SAP_Doc_Number, Document_Type, DocChq_Date</text:p>
          </table:table-cell>
          <table:table-cell/>
          <table:table-cell office:value-type="string" calcext:value-type="string">
            <text:p>INVERSE_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_S_M:M_Doc Chq_G_S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Doc Chq match for transactions grouped by SAP Doc Number, Type and Date to be matched with amount.</text:p>
          </table:table-cell>
          <table:table-cell office:value-type="string" calcext:value-type="string">
            <text:p>SAP_Doc_Number, Document_Type, DocChq_Date</text:p>
          </table:table-cell>
          <table:table-cell/>
          <table:table-cell office:value-type="string" calcext:value-type="string">
            <text:p>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V DR RD 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in Customer Books 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V%' OR zICR_CONSOL_CUSTOMER_SAP.Document_Type LIKE N'%DR%' OR zICR_CONSOL_CUSTOMER_SAP.Document_Type LIKE N'%RD%' OR zICR_CONSOL_CUSTOMER_SAP.Document_Type LIKE N'%DA%'</text:p>
          </table:table-cell>
          <table:table-cell office:value-type="string" calcext:value-type="string">
            <text:p>Reference, INVERSE_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V DR RD 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in Customer Books 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V%' OR zICR_CONSOL_CUSTOMER_SAP.Document_Type LIKE N'%DR%' OR zICR_CONSOL_CUSTOMER_SAP.Document_Type LIKE N'%RD%' OR zICR_CONSOL_CUSTOMER_SAP.Document_Type LIKE N'%DA%'</text:p>
          </table:table-cell>
          <table:table-cell office:value-type="string" calcext:value-type="string">
            <text:p>Reference, 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evers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</text:p>
          </table:table-cell>
          <table:table-cell office:value-type="string" calcext:value-type="string">
            <text:p>SAP_Doc_Number, Reference, Document_Type</text:p>
          </table:table-cell>
          <table:table-cell office:value-type="string" calcext:value-type="string">
            <text:p>zICR_CONSOL_GRIR.Amount_in_Local_Currency &gt; 0</text:p>
          </table:table-cell>
          <table:table-cell office:value-type="string" calcext:value-type="string">
            <text:p>INVERSE_Amount_in_Local_Currency, Document_Type, Referenc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GRI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GR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evers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</text:p>
          </table:table-cell>
          <table:table-cell office:value-type="string" calcext:value-type="string">
            <text:p>SAP_Doc_Number, Reference, Document_Type</text:p>
          </table:table-cell>
          <table:table-cell office:value-type="string" calcext:value-type="string">
            <text:p>zICR_CONSOL_GRIR.Amount_in_Local_Currency &lt; 0</text:p>
          </table:table-cell>
          <table:table-cell office:value-type="string" calcext:value-type="string">
            <text:p>Amount_in_Local_Currency, Document_Type, Reference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V DR RD 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in vendor book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VENDOR_SAP.Document_Type LIKE N'%RV%' OR zICR_CONSOL_VENDOR_SAP.Document_Type LIKE N'%RD%' OR zICR_CONSOL_VENDOR_SAP.Document_Type LIKE N'%DR%' OR zICR_CONSOL_VENDOR_SAP.Document_Type LIKE N'%DA%'</text:p>
          </table:table-cell>
          <table:table-cell office:value-type="string" calcext:value-type="string">
            <text:p>INVERSE_Amount_in_Local_Currency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 A M:M RV DR RD 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in vendor book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VENDOR_SAP.Document_Type LIKE N'%RV%' OR zICR_CONSOL_VENDOR_SAP.Document_Type LIKE N'%RD%' OR zICR_CONSOL_VENDOR_SAP.Document_Type LIKE N'%DR%' OR zICR_CONSOL_VENDOR_SAP.Document_Type LIKE N'%DA%'</text:p>
          </table:table-cell>
          <table:table-cell office:value-type="string" calcext:value-type="string">
            <text:p>Amount_in_Local_Currency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_S_Reference and 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Custom pass rule for matching reference field in TSL books with text in TSBSL books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, Gross_Amount_In_Local_Currency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_S_Reference and 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Custom pass rule for matching reference field in TSL books with text in TSBSL books</text:p>
          </table:table-cell>
          <table:table-cell office:value-type="string" calcext:value-type="string">
            <text:p>Text_</text:p>
          </table:table-cell>
          <table:table-cell office:value-type="string" calcext:value-type="string">
            <text:p>zICR_CONSOL_CUSTOMER_SAP.Document_Type LIKE N'%RV%'</text:p>
          </table:table-cell>
          <table:table-cell office:value-type="string" calcext:value-type="string">
            <text:p>Text_, INVERSE_Amount_in_Local_Currency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_A_M:M_Ref-Branch Allocati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ference and Branch allocation to matc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= N'RD'</text:p>
          </table:table-cell>
          <table:table-cell office:value-type="string" calcext:value-type="string">
            <text:p>INVERSE_Amount_in_Local_Currency, Reference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D_A_M:M_Ref-Branch Allocati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ference and Branch allocation to match</text:p>
          </table:table-cell>
          <table:table-cell office:value-type="string" calcext:value-type="string">
            <text:p>BranchAlloc</text:p>
          </table:table-cell>
          <table:table-cell office:value-type="string" calcext:value-type="string">
            <text:p>zICR_CONSOL_VENDOR_SAP.Document_Type = N'K2'</text:p>
          </table:table-cell>
          <table:table-cell office:value-type="string" calcext:value-type="string">
            <text:p>Amount_in_Local_Currency, BranchAlloc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 A M:M PR 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due to provisions, should be redundant if the respective parties use Trading Partner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PR%' OR zICR_CONSOL_CUSTOMER_SAP.Document_Type LIKE N'%PE%'</text:p>
          </table:table-cell>
          <table:table-cell office:value-type="string" calcext:value-type="string">
            <text:p>Reference, INVERSE_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 A M:M PR 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due to provisions, should be redundant if the respective parties use Trading Partner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PR%' OR zICR_CONSOL_CUSTOMER_SAP.Document_Type LIKE N'%PE%'</text:p>
          </table:table-cell>
          <table:table-cell office:value-type="string" calcext:value-type="string">
            <text:p>Reference, 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SAP_Doc_Number, Document_Type</text:p>
          </table:table-cell>
          <table:table-cell/>
          <table:table-cell office:value-type="string" calcext:value-type="string">
            <text:p>INVERSE_Amount_in_Local_Currency, SAP_Doc_Number, Document_Typ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Clearing_Doc, Document_Type</text:p>
          </table:table-cell>
          <table:table-cell/>
          <table:table-cell office:value-type="string" calcext:value-type="string">
            <text:p>Amount_in_Local_Currency, Clearing_Doc, Document_Typ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_S_1:M Doc Chq_DZ_K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Inv. No. Inv. Date, and Amount to match exactly. </text:p>
          </table:table-cell>
          <table:table-cell/>
          <table:table-cell office:value-type="string" calcext:value-type="string">
            <text:p>zICR_CONSOL_CUSTOMER_SAP.Document_Type LIKE N'%DZ%' OR zICR_CONSOL_CUSTOMER_SAP.Document_Type LIKE N'%DP%'</text:p>
          </table:table-cell>
          <table:table-cell office:value-type="string" calcext:value-type="string">
            <text:p>INVERSE_Amount_in_Local_Currency, DocChq_Date</text:p>
          </table:table-cell>
          <table:table-cell office:value-type="string" calcext:value-type="string">
            <text:p>-1, -3</text:p>
          </table:table-cell>
          <table:table-cell office:value-type="string" calcext:value-type="string">
            <text:p>2, 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_S_1:M Doc Chq_DZ_K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Inv. No. Inv. Date, and Amount to match exactly. </text:p>
          </table:table-cell>
          <table:table-cell/>
          <table:table-cell office:value-type="string" calcext:value-type="string">
            <text:p>zICR_CONSOL_VENDOR_SAP.Document_Type LIKE N'%KZ%'</text:p>
          </table:table-cell>
          <table:table-cell office:value-type="string" calcext:value-type="string">
            <text:p>Amount_in_Local_Currency, DocChq_Date</text:p>
          </table:table-cell>
          <table:table-cell office:value-type="string" calcext:value-type="string">
            <text:p>-1, -3</text:p>
          </table:table-cell>
          <table:table-cell office:value-type="string" calcext:value-type="string">
            <text:p>2, 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 A M:M PR 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due to provisions, should be redundant if the respective parties use Trading Partner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PR%' OR zICR_CONSOL_CUSTOMER_SAP.Document_Type LIKE N'%PE%'</text:p>
          </table:table-cell>
          <table:table-cell office:value-type="string" calcext:value-type="string">
            <text:p>Reference, INVERSE_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 A M:M PR 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due to provisions, should be redundant if the respective parties use Trading Partner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PR%' OR zICR_CONSOL_CUSTOMER_SAP.Document_Type LIKE N'%PE%'</text:p>
          </table:table-cell>
          <table:table-cell office:value-type="string" calcext:value-type="string">
            <text:p>Reference, 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SAP_Doc_Number, Document_Type</text:p>
          </table:table-cell>
          <table:table-cell/>
          <table:table-cell office:value-type="string" calcext:value-type="string">
            <text:p>INVERSE_Amount_in_Local_Currency, SAP_Doc_Number, Document_Typ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Clearing_Doc, Document_Type</text:p>
          </table:table-cell>
          <table:table-cell/>
          <table:table-cell office:value-type="string" calcext:value-type="string">
            <text:p>Amount_in_Local_Currency, Clearing_Doc, Document_Typ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_A_1:1_Inv. Date and 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nv. No. Inv. Date, and Amount to match with a variance of a day and INR 1.</text:p>
          </table:table-cell>
          <table:table-cell/>
          <table:table-cell office:value-type="string" calcext:value-type="string">
            <text:p>zICR_CONSOL_CUSTOMER_SAP.Reference != ''</text:p>
          </table:table-cell>
          <table:table-cell office:value-type="string" calcext:value-type="string">
            <text:p>INVERSE_Amount_in_Local_Currency, Reference, DocChq_Date</text:p>
          </table:table-cell>
          <table:table-cell office:value-type="string" calcext:value-type="string">
            <text:p>-1, -1</text:p>
          </table:table-cell>
          <table:table-cell office:value-type="string" calcext:value-type="string">
            <text:p>2, 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_A_1:1_Inv. Date and 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nv. No. Inv. Date, and Amount to match with a variance of a day and INR 1.</text:p>
          </table:table-cell>
          <table:table-cell/>
          <table:table-cell office:value-type="string" calcext:value-type="string">
            <text:p>zICR_CONSOL_VENDOR_SAP.Reference != ''</text:p>
          </table:table-cell>
          <table:table-cell office:value-type="string" calcext:value-type="string">
            <text:p>Amount_in_Local_Currency, Reference, DocChq_Date</text:p>
          </table:table-cell>
          <table:table-cell office:value-type="string" calcext:value-type="string">
            <text:p>-1, -1</text:p>
          </table:table-cell>
          <table:table-cell office:value-type="string" calcext:value-type="string">
            <text:p>2, 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 M:M WE RV_Reference_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GRIR invoices with RP books, that are booked with GST in the TSL books</text:p>
          </table:table-cell>
          <table:table-cell/>
          <table:table-cell office:value-type="string" calcext:value-type="string">
            <text:p>zICR_CONSOL_GRIR.Document_Type LIKE N'%WE%'</text:p>
          </table:table-cell>
          <table:table-cell office:value-type="string" calcext:value-type="string">
            <text:p>Reference, INVERSE_Amount_in_Local_Currency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 M:M WE RV_Reference_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Matching of GRIR invoices with RP books, that are booked with GST in the TSL books</text:p>
          </table:table-cell>
          <table:table-cell/>
          <table:table-cell office:value-type="string" calcext:value-type="string">
            <text:p>zICR_CONSOL_CUSTOMER_SAP.Document_Type LIKE N'%RV%'</text:p>
          </table:table-cell>
          <table:table-cell office:value-type="string" calcext:value-type="string">
            <text:p>Reference, Amount_in_Local_Currency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SAP_Doc_Number, Document_Type</text:p>
          </table:table-cell>
          <table:table-cell/>
          <table:table-cell office:value-type="string" calcext:value-type="string">
            <text:p>INVERSE_Amount_in_Local_Currency, SAP_Doc_Number, Document_Typ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Clearing_Doc, Document_Type</text:p>
          </table:table-cell>
          <table:table-cell/>
          <table:table-cell office:value-type="string" calcext:value-type="string">
            <text:p>Amount_in_Local_Currency, Clearing_Doc, Document_Typ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SAP_Doc_Number, Document_Type</text:p>
          </table:table-cell>
          <table:table-cell/>
          <table:table-cell office:value-type="string" calcext:value-type="string">
            <text:p>INVERSE_Amount_in_Local_Currency, SAP_Doc_Number, Document_Typ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Clearing_Doc, Document_Type</text:p>
          </table:table-cell>
          <table:table-cell/>
          <table:table-cell office:value-type="string" calcext:value-type="string">
            <text:p>Amount_in_Local_Currency, Clearing_Doc, Document_Typ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_S_1:M DR 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/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CUSTOMER_SAP.Document_Type LIKE N'%DR%'</text:p>
          </table:table-cell>
          <table:table-cell office:value-type="string" calcext:value-type="string">
            <text:p>INVERSE_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_S_1:M DR 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/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VENDOR_SAP.Document_Type LIKE N'%KR%'</text:p>
          </table:table-cell>
          <table:table-cell office:value-type="string" calcext:value-type="string">
            <text:p>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SAP_Doc_Number, Document_Type</text:p>
          </table:table-cell>
          <table:table-cell/>
          <table:table-cell office:value-type="string" calcext:value-type="string">
            <text:p>INVERSE_Amount_in_Local_Currency, SAP_Doc_Number, Document_Typ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Clearing_Doc, Document_Type</text:p>
          </table:table-cell>
          <table:table-cell/>
          <table:table-cell office:value-type="string" calcext:value-type="string">
            <text:p>Amount_in_Local_Currency, Clearing_Doc, Document_Typ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SAP_Doc_Number, Document_Type</text:p>
          </table:table-cell>
          <table:table-cell/>
          <table:table-cell office:value-type="string" calcext:value-type="string">
            <text:p>INVERSE_Amount_in_Local_Currency, SAP_Doc_Number, Document_Typ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Clearing_Doc, Document_Type</text:p>
          </table:table-cell>
          <table:table-cell/>
          <table:table-cell office:value-type="string" calcext:value-type="string">
            <text:p>Amount_in_Local_Currency, Clearing_Doc, Document_Typ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_A_1:1 Bill Doc Re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ll Doc and Reference to match alongwith Amount with a variance of INR 1.</text:p>
          </table:table-cell>
          <table:table-cell table:number-columns-repeated="2"/>
          <table:table-cell office:value-type="string" calcext:value-type="string">
            <text:p>INVERSE_Amount_in_Local_Currency, Referenc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_A_1:1 Bill Doc Re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ll Doc and Reference to match alongwith Amount with a variance of INR 1.</text:p>
          </table:table-cell>
          <table:table-cell/>
          <table:table-cell office:value-type="string" calcext:value-type="string">
            <text:p>zICR_CONSOL_VENDOR_SAP.Reference != ''</text:p>
          </table:table-cell>
          <table:table-cell office:value-type="string" calcext:value-type="string">
            <text:p>Amount_in_Local_Currency, Referenc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 A M:M WE RV_Reference_Amount_Vendor/ Customer 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WE and RV by same reference number specially for Vendor Code T040 and Customer code 312193 <text:s/>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GRIR.Document_Type LIKE N'%WE%' AND zICR_CONSOL_GRIR.VendorCustomer LIKE N'%T040%'</text:p>
          </table:table-cell>
          <table:table-cell office:value-type="string" calcext:value-type="string">
            <text:p>Reference, INVERSE_Amount_in_Local_Currenc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 A M:M WE RV_Reference_Amount_Vendor/ Customer 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atching of WE and RV by same reference number specially for Vendor Code T040 and Customer code 312193 <text:s/>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CUSTOMER_SAP.Document_Type LIKE N'%RV%' AND zICR_CONSOL_CUSTOMER_SAP.VendorCustomer LIKE N'%312193%'</text:p>
          </table:table-cell>
          <table:table-cell office:value-type="string" calcext:value-type="string">
            <text:p>Reference, Amount_in_Local_Currenc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Clearing_Doc, Document_Type</text:p>
          </table:table-cell>
          <table:table-cell/>
          <table:table-cell office:value-type="string" calcext:value-type="string">
            <text:p>INVERSE_Amount_in_Local_Currency, Document_Type, Clearing_Do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SAP_Doc_Number, Document_Type</text:p>
          </table:table-cell>
          <table:table-cell/>
          <table:table-cell office:value-type="string" calcext:value-type="string">
            <text:p>Amount_in_Local_Currency, Document_Type, SAP_Doc_Number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 A M:M Reversals within Same Doc Type_Bill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Reference, Document_Type</text:p>
          </table:table-cell>
          <table:table-cell/>
          <table:table-cell office:value-type="string" calcext:value-type="string">
            <text:p>INVERSE_Amount_in_Local_Currency, Document_Type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 A M:M Reversals within Same Doc Type_Bill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Reference, Document_Type</text:p>
          </table:table-cell>
          <table:table-cell/>
          <table:table-cell office:value-type="string" calcext:value-type="string">
            <text:p>Amount_in_Local_Currency, Document_Type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_S_M:M_Payment receipt match (DZ/DP-KZ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SAP Doc Number is grouped so as to enable TDS matching if any.</text:p>
          </table:table-cell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CUSTOMER_SAP.Document_Type = N'DZ' OR zICR_CONSOL_CUSTOMER_SAP.Document_Type = N'DP'</text:p>
          </table:table-cell>
          <table:table-cell office:value-type="string" calcext:value-type="string">
            <text:p>INVERSE_Amount_in_Local_Currency, DocChq_Date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_S_M:M_Payment receipt match (DZ/DP-KZ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SAP Doc Number is grouped so as to enable TDS matching if any.</text:p>
          </table:table-cell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VENDOR_SAP.Document_Type = N'KZ'</text:p>
          </table:table-cell>
          <table:table-cell office:value-type="string" calcext:value-type="string">
            <text:p>Amount_in_Local_Currency, DocChq_Date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Clearing_Doc, Document_Type</text:p>
          </table:table-cell>
          <table:table-cell/>
          <table:table-cell office:value-type="string" calcext:value-type="string">
            <text:p>INVERSE_Amount_in_Local_Currency, Document_Type, Clearing_Do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 A M:M Reversals within Same Doc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SAP_Doc_Number, Document_Type</text:p>
          </table:table-cell>
          <table:table-cell/>
          <table:table-cell office:value-type="string" calcext:value-type="string">
            <text:p>Amount_in_Local_Currency, Document_Type, SAP_Doc_Number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 A M:M Reversals within Same Doc Type_Bill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Reference, Document_Type</text:p>
          </table:table-cell>
          <table:table-cell/>
          <table:table-cell office:value-type="string" calcext:value-type="string">
            <text:p>INVERSE_Amount_in_Local_Currency, Document_Type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 A M:M Reversals within Same Doc Type_Bill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Reference, Document_Type</text:p>
          </table:table-cell>
          <table:table-cell/>
          <table:table-cell office:value-type="string" calcext:value-type="string">
            <text:p>Amount_in_Local_Currency, Document_Type, Referenc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_A_M:M Bill Doc Re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ll Doc and Reference to match alongwith Amount with a variance of INR 1. Not matching is the Reference is empty.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INVERSE_Amount_in_Local_Currency, Referenc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_A_M:M Bill Doc Re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ll Doc and Reference to match alongwith Amount with a variance of INR 1. Not matching is the Reference is empty.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zICR_CONSOL_VENDOR_SAP.Reference != ''</text:p>
          </table:table-cell>
          <table:table-cell office:value-type="string" calcext:value-type="string">
            <text:p>Amount_in_Local_Currency, Referenc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GR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GRIR.MatchID_copy IS NOT NULL OR zICR_CONSOL_GRIR.MatchID_copy != ''</text:p>
          </table:table-cell>
          <table:table-cell office:value-type="string" calcext:value-type="string">
            <text:p>MatchID_copy, 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2 - TSL Payable - Tata Bluescope Receivable &gt; GRIR to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CUSTOMER_SAP.MatchID_copy IS NOT NULL OR zICR_CONSOL_CUSTOMER_SAP.MatchID_copy != ''</text:p>
          </table:table-cell>
          <table:table-cell office:value-type="string" calcext:value-type="string">
            <text:p>MatchID_copy, INVERSE_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visibility="filter">
          <table:table-cell table:style-name="ce3" office:value-type="string" calcext:value-type="string">
            <text:p>ICR - TSL Payable - Tata Bluescope Receivable</text:p>
          </table:table-cell>
          <table:table-cell table:style-name="ce3" office:value-type="string" calcext:value-type="string">
            <text:p>ICR 00 - TSL Payable - Tata Bluescope Receivable &gt; Tata Bluescope Customer Reversals (BG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R_CONSOL_CUSTOMER_SAP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D A M:M Reversals within Same Doc Type_Bill Do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utomatic</text:p>
          </table:table-cell>
          <table:table-cell table:style-name="ce3" office:value-type="string" calcext:value-type="string">
            <text:p>Reversals within same document type.</text:p>
          </table:table-cell>
          <table:table-cell table:style-name="ce3"/>
          <table:table-cell table:style-name="ce3" office:value-type="string" calcext:value-type="string">
            <text:p>zICR_CONSOL_CUSTOMER_SAP.Document_Type LIKE N'%DR%' OR zICR_CONSOL_CUSTOMER_SAP.Document_Type LIKE N'%RV%' OR zICR_CONSOL_CUSTOMER_SAP.Document_Type LIKE N'%DA%'</text:p>
          </table:table-cell>
          <table:table-cell table:style-name="ce3" office:value-type="string" calcext:value-type="string">
            <text:p>INVERSE_Amount_in_Local_Currency, Document_Type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10"/>
        </table:table-row>
        <table:table-row table:style-name="ro2" table:visibility="filter">
          <table:table-cell table:style-name="ce3" office:value-type="string" calcext:value-type="string">
            <text:p>ICR - TSL Payable - Tata Bluescope Receivable</text:p>
          </table:table-cell>
          <table:table-cell table:style-name="ce3" office:value-type="string" calcext:value-type="string">
            <text:p>ICR 00 - TSL Payable - Tata Bluescope Receivable &gt; Tata Bluescope Customer Reversals (BG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CR_CONSOL_CUSTOMER_SAP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D A M:M Reversals within Same Doc Type_Bill Do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utomatic</text:p>
          </table:table-cell>
          <table:table-cell table:style-name="ce3" office:value-type="string" calcext:value-type="string">
            <text:p>Reversals within same document type.</text:p>
          </table:table-cell>
          <table:table-cell table:style-name="ce3"/>
          <table:table-cell table:style-name="ce3" office:value-type="string" calcext:value-type="string">
            <text:p>zICR_CONSOL_CUSTOMER_SAP.Document_Type LIKE N'%DA%'</text:p>
          </table:table-cell>
          <table:table-cell table:style-name="ce3" office:value-type="string" calcext:value-type="string">
            <text:p>Amount_in_Local_Currency, Document_Type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 A M:M Reversal Indicator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SAP_Doc_Number</text:p>
          </table:table-cell>
          <table:table-cell/>
          <table:table-cell office:value-type="string" calcext:value-type="string">
            <text:p>INVERSE_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 A M:M Reversal Indicator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Reversal_Indicator</text:p>
          </table:table-cell>
          <table:table-cell/>
          <table:table-cell office:value-type="string" calcext:value-type="string">
            <text:p>Amount_in_Local_Currency, Reversal_Indicato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_S_1:M DR 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SAP Doc Number is grouped for <text:s/>matching TDS transactions.</text:p>
          </table:table-cell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CUSTOMER_SAP.Document_Type = N'DR'</text:p>
          </table:table-cell>
          <table:table-cell office:value-type="string" calcext:value-type="string">
            <text:p>INVERSE_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_S_1:M DR 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SAP Doc Number is grouped for <text:s/>matching TDS transactions.</text:p>
          </table:table-cell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VENDOR_SAP.Document_Type = N'KR'</text:p>
          </table:table-cell>
          <table:table-cell office:value-type="string" calcext:value-type="string">
            <text:p>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 A M:M Reversals within Same Doc Type_Bill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Reference, Document_Type</text:p>
          </table:table-cell>
          <table:table-cell/>
          <table:table-cell office:value-type="string" calcext:value-type="string">
            <text:p>INVERSE_Amount_in_Local_Currency, Document_Type, Referenc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 A M:M Reversals within Same Doc Type_Bill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s within same document type.</text:p>
          </table:table-cell>
          <table:table-cell office:value-type="string" calcext:value-type="string">
            <text:p>Reference, Document_Type</text:p>
          </table:table-cell>
          <table:table-cell/>
          <table:table-cell office:value-type="string" calcext:value-type="string">
            <text:p>Amount_in_Local_Currency, Document_Type, Referenc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 A M:M Reversal Indicator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SAP_Doc_Number</text:p>
          </table:table-cell>
          <table:table-cell/>
          <table:table-cell office:value-type="string" calcext:value-type="string">
            <text:p>INVERSE_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 A M:M Reversal Indicator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Reversal_Indicator</text:p>
          </table:table-cell>
          <table:table-cell/>
          <table:table-cell office:value-type="string" calcext:value-type="string">
            <text:p>Amount_in_Local_Currency, Reversal_Indicato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_S_M:M_Doc Chq_G_S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Doc Chq match for transactions grouped by SAP Doc Number, Type and Date to be matched with amount.</text:p>
          </table:table-cell>
          <table:table-cell office:value-type="string" calcext:value-type="string">
            <text:p>SAP_Doc_Number, Document_Type, DocChq_Date</text:p>
          </table:table-cell>
          <table:table-cell/>
          <table:table-cell office:value-type="string" calcext:value-type="string">
            <text:p>INVERSE_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_S_M:M_Doc Chq_G_S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Doc Chq match for transactions grouped by SAP Doc Number, Type and Date to be matched with amount.</text:p>
          </table:table-cell>
          <table:table-cell office:value-type="string" calcext:value-type="string">
            <text:p>SAP_Doc_Number, Document_Type, DocChq_Date</text:p>
          </table:table-cell>
          <table:table-cell/>
          <table:table-cell office:value-type="string" calcext:value-type="string">
            <text:p>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 A M:M Reversal Indicator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SAP_Doc_Number</text:p>
          </table:table-cell>
          <table:table-cell/>
          <table:table-cell office:value-type="string" calcext:value-type="string">
            <text:p>INVERSE_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 A M:M Reversal Indicator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Reversal_Indicator</text:p>
          </table:table-cell>
          <table:table-cell/>
          <table:table-cell office:value-type="string" calcext:value-type="string">
            <text:p>Amount_in_Local_Currency, Reversal_Indicato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 A M:M Reversal Indicator S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Reversal_Indicator</text:p>
          </table:table-cell>
          <table:table-cell/>
          <table:table-cell office:value-type="string" calcext:value-type="string">
            <text:p>INVERSE_Amount_in_Local_Currency, Reversal_Indicato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0 - TSL Payable - Tata Bluescope Receivable &gt; TSL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 A M:M Reversal Indicator S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SAP_Doc_Number</text:p>
          </table:table-cell>
          <table:table-cell/>
          <table:table-cell office:value-type="string" calcext:value-type="string">
            <text:p>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_S_M:M_Ref-Date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Inv. No. Inv. Date, and Amount to match exactly. </text:p>
          </table:table-cell>
          <table:table-cell office:value-type="string" calcext:value-type="string">
            <text:p>SAP_Doc_Number, Reference, DocChq_Date</text:p>
          </table:table-cell>
          <table:table-cell/>
          <table:table-cell office:value-type="string" calcext:value-type="string">
            <text:p>Reference, INVERSE_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_S_M:M_Ref-Date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Inv. No. Inv. Date, and Amount to match exactly. </text:p>
          </table:table-cell>
          <table:table-cell office:value-type="string" calcext:value-type="string">
            <text:p>SAP_Doc_Number, Reference, DocChq_Date</text:p>
          </table:table-cell>
          <table:table-cell/>
          <table:table-cell office:value-type="string" calcext:value-type="string">
            <text:p>Reference, 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 A M:M Reversal Indicator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SAP_Doc_Number</text:p>
          </table:table-cell>
          <table:table-cell/>
          <table:table-cell office:value-type="string" calcext:value-type="string">
            <text:p>INVERSE_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 A M:M Reversal Indicator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Reversal_Indicator</text:p>
          </table:table-cell>
          <table:table-cell/>
          <table:table-cell office:value-type="string" calcext:value-type="string">
            <text:p>Amount_in_Local_Currency, Reversal_Indicato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VENDO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 A M:M Reversal Indicator S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Reversal_Indicator</text:p>
          </table:table-cell>
          <table:table-cell/>
          <table:table-cell office:value-type="string" calcext:value-type="string">
            <text:p>INVERSE_Amount_in_Local_Currency, Reversal_Indicato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TSL Receivable &gt; Tata Bluescope Vendo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 A M:M Reversal Indicator S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SAP_Doc_Number</text:p>
          </table:table-cell>
          <table:table-cell/>
          <table:table-cell office:value-type="string" calcext:value-type="string">
            <text:p>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_S_1:M DR 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/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CUSTOMER_SAP.Document_Type LIKE N'%DR%'</text:p>
          </table:table-cell>
          <table:table-cell office:value-type="string" calcext:value-type="string">
            <text:p>INVERSE_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_S_1:M DR 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/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VENDOR_SAP.Document_Type LIKE N'%KR%'</text:p>
          </table:table-cell>
          <table:table-cell office:value-type="string" calcext:value-type="string">
            <text:p>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_S_M:M_Ref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Inv. No. and Amount to match exactly. 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, INVERSE_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_S_M:M_Ref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Inv. No. and Amount to match exactly. 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, 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D A M:M Reversal Indicator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Reversal_Indicator</text:p>
          </table:table-cell>
          <table:table-cell/>
          <table:table-cell office:value-type="string" calcext:value-type="string">
            <text:p>INVERSE_Amount_in_Local_Currency, Reversal_Indicato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D A M:M Reversal Indicator SAP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versal match for SAP Doc and Reversal Indicator.</text:p>
          </table:table-cell>
          <table:table-cell office:value-type="string" calcext:value-type="string">
            <text:p>SAP_Doc_Number</text:p>
          </table:table-cell>
          <table:table-cell/>
          <table:table-cell office:value-type="string" calcext:value-type="string">
            <text:p>Amount_in_Local_Currency, SAP_Doc_Number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D_S_M:M_Payment receipt match (DZ/DP-KZ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SAP Doc Number is grouped so as to enable TDS matching if any.</text:p>
          </table:table-cell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CUSTOMER_SAP.Document_Type = N'DZ' OR zICR_CONSOL_CUSTOMER_SAP.Document_Type = N'DP'</text:p>
          </table:table-cell>
          <table:table-cell office:value-type="string" calcext:value-type="string">
            <text:p>INVERSE_Amount_in_Local_Currency, DocChq_Date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D_S_M:M_Payment receipt match (DZ/DP-KZ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SAP Doc Number is grouped so as to enable TDS matching if any.</text:p>
          </table:table-cell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VENDOR_SAP.Document_Type = N'KZ'</text:p>
          </table:table-cell>
          <table:table-cell office:value-type="string" calcext:value-type="string">
            <text:p>Amount_in_Local_Currency, DocChq_Date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D_S_1:M DR 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SAP Doc Number is grouped for <text:s/>matching TDS transactions.</text:p>
          </table:table-cell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CUSTOMER_SAP.Document_Type = N'DR'</text:p>
          </table:table-cell>
          <table:table-cell office:value-type="string" calcext:value-type="string">
            <text:p>INVERSE_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D_S_1:M DR 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SAP Doc Number is grouped for <text:s/>matching TDS transactions.</text:p>
          </table:table-cell>
          <table:table-cell office:value-type="string" calcext:value-type="string">
            <text:p>DocChq_Date, SAP_Doc_Number</text:p>
          </table:table-cell>
          <table:table-cell office:value-type="string" calcext:value-type="string">
            <text:p>zICR_CONSOL_VENDOR_SAP.Document_Type = N'KR'</text:p>
          </table:table-cell>
          <table:table-cell office:value-type="string" calcext:value-type="string">
            <text:p>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_S_Reference and Hdr_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TSL reference field matches with customer Hdr_Text</text:p>
          </table:table-cell>
          <table:table-cell office:value-type="string" calcext:value-type="string">
            <text:p>Text_</text:p>
          </table:table-cell>
          <table:table-cell/>
          <table:table-cell office:value-type="string" calcext:value-type="string">
            <text:p>Text_, INVERSE_Amount_in_Local_Currency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_S_Reference and Hdr_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TSL reference field matches with customer Hdr_Text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, Amount_in_Local_Currency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D S 1:M AB DZ-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Clearing Doc rule is applied for only auto clearing AB documents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AB%'</text:p>
          </table:table-cell>
          <table:table-cell office:value-type="string" calcext:value-type="string">
            <text:p>INVERSE_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D S 1:M AB DZ-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Clearing Doc rule is applied for only auto clearing AB documents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DZ%'</text:p>
          </table:table-cell>
          <table:table-cell office:value-type="string" calcext:value-type="string">
            <text:p>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_S_M:M_Ref-Date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Inv. No. Inv. Date, and Amount to match exactly. </text:p>
          </table:table-cell>
          <table:table-cell office:value-type="string" calcext:value-type="string">
            <text:p>SAP_Doc_Number, Reference, DocChq_Date</text:p>
          </table:table-cell>
          <table:table-cell/>
          <table:table-cell office:value-type="string" calcext:value-type="string">
            <text:p>Reference, INVERSE_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_S_M:M_Ref-Date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Inv. No. Inv. Date, and Amount to match exactly. </text:p>
          </table:table-cell>
          <table:table-cell office:value-type="string" calcext:value-type="string">
            <text:p>SAP_Doc_Number, Reference, DocChq_Date</text:p>
          </table:table-cell>
          <table:table-cell/>
          <table:table-cell office:value-type="string" calcext:value-type="string">
            <text:p>Reference, Amount_in_Local_Currency, DocChq_Da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CUSTOMER_SAP.MatchID_copy IS NOT NULL OR zICR_CONSOL_CUSTOMER_SAP.MatchID_copy != ''</text:p>
          </table:table-cell>
          <table:table-cell office:value-type="string" calcext:value-type="string">
            <text:p>MatchID_copy, 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SL Payable - Tata Bluescope Receivable</text:p>
          </table:table-cell>
          <table:table-cell office:value-type="string" calcext:value-type="string">
            <text:p>ICR 01 - TSL Payable - Tata Bluescope Receivable &gt; TSL Vendor - Tata Bluescope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VENDOR_SAP.MatchID_copy IS NOT NULL OR zICR_CONSOL_VENDOR_SAP.MatchID_copy != ''</text:p>
          </table:table-cell>
          <table:table-cell office:value-type="string" calcext:value-type="string">
            <text:p>MatchID_copy, INVERSE_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D S M:M AB DZ-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Clearing Doc rule is applied for only auto clearing AB documents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DZ%' OR zICR_CONSOL_CUSTOMER_SAP.Document_Type LIKE N'%AB%'</text:p>
          </table:table-cell>
          <table:table-cell office:value-type="string" calcext:value-type="string">
            <text:p>INVERSE_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0 - Tata Bluescope Payable - <text:s/>TSL Receivable &gt; TSL Customer Reversals (B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CUSTOMER_SA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D S M:M AB DZ-Clearing D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Clearing Doc rule is applied for only auto clearing AB documents</text:p>
          </table:table-cell>
          <table:table-cell office:value-type="string" calcext:value-type="string">
            <text:p>Clearing_Doc</text:p>
          </table:table-cell>
          <table:table-cell office:value-type="string" calcext:value-type="string">
            <text:p>zICR_CONSOL_CUSTOMER_SAP.Document_Type LIKE N'%AB%' OR zICR_CONSOL_CUSTOMER_SAP.Document_Type LIKE N'%DZ%'</text:p>
          </table:table-cell>
          <table:table-cell office:value-type="string" calcext:value-type="string">
            <text:p>Amount_in_Local_Currency, Clearing_Doc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_S_M:M_Ref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Inv. No. and Amount to match exactly. 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, INVERSE_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_S_M:M_Ref-A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gested</text:p>
          </table:table-cell>
          <table:table-cell office:value-type="string" calcext:value-type="string">
            <text:p>Inv. No. and Amount to match exactly. 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, Amount_in_Local_Currenc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R_CONSOL_CUSTOMER_SA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CUSTOMER_SAP.MatchID_copy IS NOT NULL OR zICR_CONSOL_CUSTOMER_SAP.MatchID_copy != ''</text:p>
          </table:table-cell>
          <table:table-cell office:value-type="string" calcext:value-type="string">
            <text:p>MatchID_copy, 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ICR - Tata Bluescope Payable - TSL Receivable</text:p>
          </table:table-cell>
          <table:table-cell office:value-type="string" calcext:value-type="string">
            <text:p>ICR 01 - Tata Bluescope Payable - TSL Receivable &gt; Tata Bluescope Vendor - TSL Custo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_CONSOL_VENDOR_SA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D_A_MatchID Cop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Pass rule for matching transactions which were matched earlier using MatchID Copy</text:p>
          </table:table-cell>
          <table:table-cell office:value-type="string" calcext:value-type="string">
            <text:p>MatchID_copy</text:p>
          </table:table-cell>
          <table:table-cell office:value-type="string" calcext:value-type="string">
            <text:p>zICR_CONSOL_VENDOR_SAP.MatchID_copy IS NOT NULL OR zICR_CONSOL_VENDOR_SAP.MatchID_copy != ''</text:p>
          </table:table-cell>
          <table:table-cell office:value-type="string" calcext:value-type="string">
            <text:p>MatchID_copy, INVERSE_Amount_in_Local_Currency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Admin_ICR_Pass Rules Report'.$A$1" table:cell-range-address="$'Admin_ICR_Pass Rules Report'.$A$1:.$N$217"/>
        </table:named-expressions>
      </table:table>
      <table:table table:name="Sheet2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3"/>
        <table:table-column table:style-name="co14" table:number-columns-repeated="1018" table:default-cell-style-name="ce13"/>
        <table:table-row table:style-name="ro3">
          <table:table-cell table:style-name="Default" office:value-type="string" calcext:value-type="string">
            <text:p>Match Set</text:p>
          </table:table-cell>
          <table:table-cell table:style-name="Default" office:value-type="string" calcext:value-type="string">
            <text:p>Data Source</text:p>
          </table:table-cell>
          <table:table-cell table:style-name="Default" office:value-type="string" calcext:value-type="string">
            <text:p>Filters</text:p>
          </table:table-cell>
          <table:table-cell table:style-name="Default" office:value-type="string" calcext:value-type="string">
            <text:p>Grouping</text:p>
          </table:table-cell>
          <table:table-cell table:style-name="Default" office:value-type="string" calcext:value-type="string">
            <text:p>Mapping</text:p>
          </table:table-cell>
          <table:table-cell table:style-name="Default" office:value-type="string" calcext:value-type="string">
            <text:p>Our System</text:p>
          </table:table-cell>
          <table:table-cell table:style-name="Default" table:number-columns-repeated="1018"/>
        </table:table-row>
        <table:table-row table:style-name="ro4">
          <table:table-cell office:value-type="string" calcext:value-type="string">
            <text:p>ICR 00 - TSL Payable - Tata Bluescope Receivable &gt; Tata Bluescope Customer Reversals (BG)</text:p>
          </table:table-cell>
          <table:table-cell office:value-type="string" calcext:value-type="string">
            <text:p>ICR_CONSOL_CUSTOMER_SAP,</text:p>
            <text:p><text:span text:style-name="T1">ICR_CONSOL_CUSTOMER_SAP</text:span></text:p>
          </table:table-cell>
          <table:table-cell office:value-type="string" calcext:value-type="string">
            <text:p>zICR_CONSOL_CUSTOMER_SAP.Document_Type LIKE N'%AB%' OR zICR_CONSOL_CUSTOMER_SAP.Document_Type LIKE N'%DP%' OR (zICR_CONSOL_CUSTOMER_SAP.Document_Type LIKE N'%DZ%' <text:s/>AND zICR_CONSOL_CUSTOMER_SAP.Special_GL_Ind LIKE N'%H%')</text:p>
          </table:table-cell>
          <table:table-cell office:value-type="string" calcext:value-type="string">
            <text:p>SAP_Doc_Number,</text:p>
            <text:p><text:span text:style-name="T1">Clearing_Doc</text:span></text:p>
            <text:p><text:span text:style-name="T1"/></text:p>
            <text:p><text:span text:style-name="T10">Clearing_Doc,</text:span></text:p>
            <text:p><text:span text:style-name="T11">SAP_Doc_Number</text:span></text:p>
            <text:p><text:span text:style-name="T11"/></text:p>
            <text:p><text:span text:style-name="T12">SAP_Doc_Number</text:span></text:p>
            <text:p><text:span text:style-name="T12"/></text:p>
            <text:p><text:span text:style-name="T13">Clearing_Doc</text:span></text:p>
          </table:table-cell>
          <table:table-cell office:value-type="string" calcext:value-type="string">
            <text:p>INVERSE_Amount_in_Local_Currency, SAP_Doc_Number</text:p>
            <text:p><text:span text:style-name="T1">Amount_in_Local_Currency, Clearing_Doc</text:span></text:p>
            <text:p><text:span text:style-name="T1"/></text:p>
            <text:p><text:span text:style-name="T3">INVERSE_Amount_in_Local_Currency, Clearing_Doc</text:span></text:p>
            <text:p><text:span text:style-name="T4">Amount_in_Local_Currency, SAP_Doc_Number</text:span></text:p>
            <text:p><text:span text:style-name="T4"/></text:p>
            <text:p><text:span text:style-name="T5">SAP_Doc_Number, INVERSE_Amount_in_Local_Currency</text:span></text:p>
            <text:p><text:span text:style-name="T6">SAP_Doc_Number, Amount_in_Local_Currency</text:span></text:p>
            <text:p><text:span text:style-name="T6"/></text:p>
            <text:p><text:span text:style-name="T11">Clearing_Doc, INVERSE_Amount_in_Local_Currency</text:span></text:p>
            <text:p><text:span text:style-name="T11">Clearing_Doc, Amount_in_Local_Currency</text:span></text:p>
          </table:table-cell>
          <table:table-cell table:style-name="ce2" table:number-columns-repeated="1019"/>
        </table:table-row>
        <table:table-row table:style-name="ro5">
          <table:table-cell table:style-name="ce12" office:value-type="string" calcext:value-type="string">
            <text:p>ICR 00 - TSL Payable - Tata Bluescope Receivable &gt; Tata Bluescope Customer Reversals (BG)</text:p>
          </table:table-cell>
          <table:table-cell table:style-name="ce12" office:value-type="string" calcext:value-type="string">
            <text:p>ICR_CONSOL_CUSTOMER_SAP,</text:p>
            <text:p><text:span text:style-name="T1">ICR_CONSOL_CUSTOMER_SAP</text:span></text:p>
          </table:table-cell>
          <table:table-cell table:style-name="ce12" office:value-type="string" calcext:value-type="string">
            <text:p>zICR_CONSOL_CUSTOMER_SAP.Document_Type LIKE N'%RE%' OR zICR_CONSOL_CUSTOMER_SAP.Document_Type LIKE N'%RL%' OR zICR_CONSOL_CUSTOMER_SAP.Document_Type LIKE N'%DG%' OR zICR_CONSOL_CUSTOMER_SAP.Document_Type LIKE N'%RC%'</text:p>
            <text:p/>
            <text:p><text:span text:style-name="T1">zICR_CONSOL_CUSTOMER_SAP.Document_Type LIKE N'%RV%' OR zICR_CONSOL_CUSTOMER_SAP.Document_Type LIKE N'%DR%' OR zICR_CONSOL_CUSTOMER_SAP.Document_Type LIKE N'%RD%' OR zICR_CONSOL_CUSTOMER_SAP.Document_Type LIKE N'%DA%'</text:span></text:p>
          </table:table-cell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Reference, INVERSE_Amount_in_Local_Currency</text:p>
            <text:p><text:span text:style-name="T1">Reference, Amount_in_Local_Currency</text:span></text:p>
            <text:p><text:span text:style-name="T1"/></text:p>
            <text:p><text:span text:style-name="T3">Reference, INVERSE_Amount_in_Local_Currency</text:span></text:p>
            <text:p><text:span text:style-name="T10">Reference, Amount_in_Local_Currency</text:span></text:p>
          </table:table-cell>
          <table:table-cell table:style-name="ce12" office:value-type="string" calcext:value-type="string">
            <text:p>Only RE and RL</text:p>
          </table:table-cell>
          <table:table-cell table:style-name="ce12" table:number-columns-repeated="1018"/>
        </table:table-row>
        <table:table-row table:style-name="ro6">
          <table:table-cell table:style-name="ce13" office:value-type="string" calcext:value-type="string">
            <text:p>ICR 00 - TSL Payable - Tata Bluescope Receivable &gt; Tata Bluescope Customer Reversals (BG)</text:p>
          </table:table-cell>
          <table:table-cell table:style-name="ce13" office:value-type="string" calcext:value-type="string">
            <text:p>ICR_CONSOL_CUSTOMER_SAP,</text:p>
            <text:p><text:span text:style-name="T1">ICR_CONSOL_CUSTOMER_SAP</text:span></text:p>
          </table:table-cell>
          <table:table-cell table:style-name="ce13" office:value-type="string" calcext:value-type="string">
            <text:p><text:span text:style-name="T2">zICR_CONSOL_CUSTOMER_SAP.Document_Type LIKE N'%PR%' OR zICR_CONSOL_CUSTOMER_SAP.Document_Type LIKE N'%PE%'</text:span></text:p>
            <text:p><text:span text:style-name="T3"/></text:p>
            <text:p><text:span text:style-name="T4">zICR_CONSOL_CUSTOMER_SAP.Document_Type LIKE N'%DR%' OR zICR_CONSOL_CUSTOMER_SAP.Document_Type LIKE N'%RV%' OR zICR_CONSOL_CUSTOMER_SAP.Document_Type LIKE N'%DA%'</text:span></text:p>
            <text:p><text:span text:style-name="T5">zICR_CONSOL_CUSTOMER_SAP.Document_Type LIKE N'%DA%'</text:span></text:p>
          </table:table-cell>
          <table:table-cell table:style-name="ce13" office:value-type="string" calcext:value-type="string">
            <text:p>Reference</text:p>
            <text:p/>
            <text:p>Empty</text:p>
          </table:table-cell>
          <table:table-cell table:style-name="ce13" office:value-type="string" calcext:value-type="string">
            <text:p><text:span text:style-name="T10">Reference, INVERSE_Amount_in_Local_Currency</text:span></text:p>
            <text:p><text:span text:style-name="T15">Reference, Amount_in_Local_Currency</text:span></text:p>
            <text:p><text:span text:style-name="T15"/></text:p>
            <text:p><text:span text:style-name="T16">INVERSE_Amount_in_Local_Currency, Document_Type</text:span></text:p>
            <text:p><text:span text:style-name="T17">Amount_in_Local_Currency, Document_Type</text:span>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ICR 00 - TSL Payable - Tata Bluescope Receivable &gt; Tata Bluescope Customer Reversals (BG)</text:p>
          </table:table-cell>
          <table:table-cell table:style-name="ce13" office:value-type="string" calcext:value-type="string">
            <text:p>ICR_CONSOL_CUSTOMER_SAP,</text:p>
            <text:p><text:span text:style-name="T1">ICR_CONSOL_CUSTOMER_SAP</text:span></text:p>
          </table:table-cell>
          <table:table-cell table:style-name="ce13"/>
          <table:table-cell office:value-type="string" calcext:value-type="string">
            <text:p>SAP_Doc_Number, Document_Type,</text:p>
            <text:p><text:span text:style-name="T1">Clearing_Doc, Document_Type</text:span></text:p>
            <text:p><text:span text:style-name="T1"/></text:p>
            <text:p><text:span text:style-name="T3">SAP_Doc_Number</text:span></text:p>
            <text:p><text:span text:style-name="T4">Reversal_Indicator</text:span></text:p>
          </table:table-cell>
          <table:table-cell office:value-type="string" calcext:value-type="string">
            <text:p>INVERSE_Amount_in_Local_Currency, SAP_Doc_Number, Document_Type</text:p>
            <text:p><text:span text:style-name="T1">Amount_in_Local_Currency, Clearing_Doc, Document_Type</text:span></text:p>
            <text:p><text:span text:style-name="T1"/></text:p>
            <text:p><text:span text:style-name="T3">INVERSE_Amount_in_Local_Currency, SAP_Doc_Number</text:span></text:p>
            <text:p><text:span text:style-name="T4">Amount_in_Local_Currency, Reversal_Indicator</text:span></text:p>
          </table:table-cell>
          <table:table-cell table:number-columns-repeated="1019"/>
        </table:table-row>
        <table:table-row table:style-name="ro3">
          <table:table-cell table:style-name="ce14" table:number-columns-repeated="1024"/>
        </table:table-row>
        <table:table-row table:style-name="ro6">
          <table:table-cell office:value-type="string" calcext:value-type="string">
            <text:p>ICR 00 - TSL Payable - Tata Bluescope Receivable &gt; TSL GRIR Reversals (BG)</text:p>
          </table:table-cell>
          <table:table-cell office:value-type="string" calcext:value-type="string">
            <text:p>ICR_CONSOL_GRIR</text:p>
          </table:table-cell>
          <table:table-cell table:style-name="ce13" office:value-type="string" calcext:value-type="string">
            <text:p>zICR_CONSOL_GRIR.Document_Type = N'WL' OR zICR_CONSOL_GRIR.Document_Type = N'RE'</text:p>
            <text:p><text:span text:style-name="T1">zICR_CONSOL_GRIR.Document_Type = N'RL' OR zICR_CONSOL_GRIR.Document_Type = N'WE'</text:span></text:p>
          </table:table-cell>
          <table:table-cell office:value-type="string" calcext:value-type="string">
            <text:p>Purchasing_Document, IsActive</text:p>
            <text:p/>
            <text:p><text:span text:style-name="T1">BranchAlloc, Purchasing_Document, IsActive</text:span></text:p>
            <text:p><text:span text:style-name="T1"/></text:p>
            <text:p><text:span text:style-name="T3">SAP_Doc_Number, Purchasing_Document, IsActive</text:span></text:p>
          </table:table-cell>
          <table:table-cell office:value-type="string" calcext:value-type="string">
            <text:p>INVERSE_Amount_in_Local_Currency, Purchasing_Document, IsActive</text:p>
            <text:p><text:span text:style-name="T1">Amount_in_Local_Currency, Purchasing_Document, IsActive</text:span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ICR 00 - TSL Payable - Tata Bluescope Receivable &gt; TSL GRIR Reversals (BG)</text:p>
          </table:table-cell>
          <table:table-cell office:value-type="string" calcext:value-type="string">
            <text:p>ICR_CONSOL_GRIR</text:p>
          </table:table-cell>
          <table:table-cell office:value-type="string" calcext:value-type="string">
            <text:p>zICR_CONSOL_GRIR.Amount_in_Local_Currency &gt; 0</text:p>
            <text:p><text:span text:style-name="T1">zICR_CONSOL_GRIR.Amount_in_Local_Currency &lt; 0</text:span></text:p>
          </table:table-cell>
          <table:table-cell office:value-type="string" calcext:value-type="string">
            <text:p>SAP_Doc_Number, Reference, Document_Type</text:p>
          </table:table-cell>
          <table:table-cell office:value-type="string" calcext:value-type="string">
            <text:p>INVERSE_Amount_in_Local_Currency, Document_Type, Reference</text:p>
            <text:p><text:span text:style-name="T1">Amount_in_Local_Currency, Document_Type, Reference</text:span></text:p>
          </table:table-cell>
          <table:table-cell table:number-columns-repeated="1019"/>
        </table:table-row>
        <table:table-row table:style-name="ro3">
          <table:table-cell table:style-name="ce14" table:number-columns-repeated="1024"/>
        </table:table-row>
        <table:table-row table:style-name="ro7">
          <table:table-cell office:value-type="string" calcext:value-type="string">
            <text:p>ICR 00 - TSL Payable - Tata Bluescope Receivable &gt; TSL Provision Reversals (BG)</text:p>
          </table:table-cell>
          <table:table-cell office:value-type="string" calcext:value-type="string">
            <text:p>ICR_CONSOL_PROVISION_SAP</text:p>
          </table:table-cell>
          <table:table-cell office:value-type="string" calcext:value-type="string">
            <text:p>zICR_CONSOL_PROVISION_SAP.Document_Type LIKE N'%PE%' OR zICR_CONSOL_PROVISION_SAP.Document_Type LIKE N'%PR%'</text:p>
          </table:table-cell>
          <table:table-cell office:value-type="string" calcext:value-type="string">
            <text:p>Reference, Document_Type, DocChq_Date</text:p>
          </table:table-cell>
          <table:table-cell office:value-type="string" calcext:value-type="string">
            <text:p>INVERSE_Amount_in_Local_Currency, Reference, DocChq_Date</text:p>
            <text:p><text:span text:style-name="T1">Amount_in_Local_Currency, Reference, DocChq_Date</text:span></text:p>
          </table:table-cell>
          <table:table-cell table:number-columns-repeated="1019"/>
        </table:table-row>
        <table:table-row table:style-name="ro3">
          <table:table-cell table:style-name="ce14" table:number-columns-repeated="1024"/>
        </table:table-row>
        <table:table-row table:style-name="ro8">
          <table:table-cell office:value-type="string" calcext:value-type="string">
            <text:p>ICR 00 - TSL Payable - Tata Bluescope Receivable &gt; TSL Vendor Reversals (BG)</text:p>
          </table:table-cell>
          <table:table-cell office:value-type="string" calcext:value-type="string">
            <text:p>ICR_CONSOL_VENDOR_SAP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SAP_Doc_Number</text:p>
            <text:p><text:span text:style-name="T1">Clearing_Doc</text:span></text:p>
            <text:p><text:span text:style-name="T1"/></text:p>
            <text:p><text:span text:style-name="T3">Clearing_Doc</text:span></text:p>
            <text:p><text:span text:style-name="T7">SAP_Doc_Number</text:span></text:p>
          </table:table-cell>
          <table:table-cell office:value-type="string" calcext:value-type="string">
            <text:p><text:span text:style-name="T1">SAP_Doc_Number, INVERSE_Amount_in_Local_Currency</text:span></text:p>
            <text:p>Clearing_Doc, Amount_in_Local_Currency</text:p>
            <text:p/>
            <text:p><text:span text:style-name="T11">Clearing_Doc, INVERSE_Amount_in_Local_Currency</text:span></text:p>
            <text:p><text:span text:style-name="T8">SAP_Doc_Number, Amount_in_Local_Currency</text:span>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CR 00 - TSL Payable - Tata Bluescope Receivable &gt; TSL Vendor Reversals (BG)</text:p>
          </table:table-cell>
          <table:table-cell office:value-type="string" calcext:value-type="string">
            <text:p>ICR_CONSOL_VENDOR_SAP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SAP_Doc_Number</text:p>
            <text:p/>
            <text:p><text:span text:style-name="T1">Clearing_Doc</text:span></text:p>
          </table:table-cell>
          <table:table-cell office:value-type="string" calcext:value-type="string">
            <text:p><text:span text:style-name="T1">SAP_Doc_Number, INVERSE_Amount_in_Local_Currency</text:span></text:p>
            <text:p><text:span text:style-name="T18">SAP_Doc_Number</text:span>, Amount_in_Local_Currency</text:p>
            <text:p/>
            <text:p><text:span text:style-name="T12">Clearing_Doc, INVERSE_Amount_in_Local_Currency</text:span></text:p>
            <text:p><text:span text:style-name="T9">Clearing_Doc, Amount_in_Local_Currency</text:span>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CR 00 - TSL Payable - Tata Bluescope Receivable &gt; TSL Vendor Reversals (BG)</text:p>
          </table:table-cell>
          <table:table-cell office:value-type="string" calcext:value-type="string">
            <text:p>ICR_CONSOL_VENDOR_SAP</text:p>
          </table:table-cell>
          <table:table-cell office:value-type="string" calcext:value-type="string">
            <text:p>zICR_CONSOL_VENDOR_SAP.Document_Type LIKE N'%AB%' OR zICR_CONSOL_VENDOR_SAP.Document_Type LIKE N'%DP%' OR (zICR_CONSOL_VENDOR_SAP.Document_Type LIKE N'%DZ%' <text:s/>AND zICR_CONSOL_VENDOR_SAP.Special_GL_Ind LIKE N'%H%')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pan text:style-name="T3">Reference, INVERSE_Amount_in_Local_Currency</text:span></text:p>
            <text:p><text:span text:style-name="T1">Reference</text:span>, Amount_in_Local_Currency</text:p>
            <text:p/>
            <text:p><text:span text:style-name="T12">Reference, INVERSE_Amount_in_Local_Currency</text:span></text:p>
            <text:p><text:span text:style-name="T9">Reference, Amount_in_Local_Currency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ICR 00 - TSL Payable - Tata Bluescope Receivable &gt; TSL Vendor Reversals (BG)</text:p>
          </table:table-cell>
          <table:table-cell office:value-type="string" calcext:value-type="string">
            <text:p>ICR_CONSOL_VENDOR_SAP</text:p>
          </table:table-cell>
          <table:table-cell/>
          <table:table-cell office:value-type="string" calcext:value-type="string">
            <text:p>SAP_Doc_Number, Document_Type</text:p>
            <text:p><text:span text:style-name="T1">Clearing_Doc, Document_Type</text:span></text:p>
            <text:p><text:span text:style-name="T1"/></text:p>
            <text:p><text:span text:style-name="T3">Reference, Document_Type</text:span></text:p>
          </table:table-cell>
          <table:table-cell office:value-type="string" calcext:value-type="string">
            <text:p>INVERSE_Amount_in_Local_Currency, SAP_Doc_Number, Document_Type</text:p>
            <text:p><text:span text:style-name="T1">Amount_in_Local_Currency, Clearing_Doc, Document_Type</text:span></text:p>
            <text:p><text:span text:style-name="T1"/></text:p>
            <text:p><text:span text:style-name="T3">INVERSE_Amount_in_Local_Currency, Document_Type, Reference</text:span></text:p>
            <text:p><text:span text:style-name="T4">Amount_in_Local_Currency, Document_Type, Reference</text:span>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CR 00 - TSL Payable - Tata Bluescope Receivable &gt; TSL Vendor Reversals (BG)</text:p>
          </table:table-cell>
          <table:table-cell office:value-type="string" calcext:value-type="string">
            <text:p>ICR_CONSOL_VENDOR_SAP</text:p>
          </table:table-cell>
          <table:table-cell/>
          <table:table-cell office:value-type="string" calcext:value-type="string">
            <text:p>SAP_Doc_Number</text:p>
            <text:p><text:span text:style-name="T1">Reversal_Indicator</text:span></text:p>
            <text:p><text:span text:style-name="T1"/></text:p>
            <text:p><text:span text:style-name="T3">Reversal_Indicator</text:span></text:p>
            <text:p><text:span text:style-name="T4">SAP_Doc_Number</text:span></text:p>
          </table:table-cell>
          <table:table-cell office:value-type="string" calcext:value-type="string">
            <text:p>INVERSE_Amount_in_Local_Currency, SAP_Doc_Number Amount_in_Local_Currency, Reversal_Indicator</text:p>
            <text:p/>
            <text:p><text:span text:style-name="T18">INVERSE_Amount_in_Local_Currency, Reversal_Indicator</text:span></text:p>
            <text:p><text:span text:style-name="T6">Amount_in_Local_Currency, SAP_Doc_Number</text:span></text:p>
          </table:table-cell>
          <table:table-cell table:number-columns-repeated="1019"/>
        </table:table-row>
        <table:table-row table:style-name="ro3">
          <table:table-cell table:style-name="ce14" table:number-columns-repeated="1024"/>
        </table:table-row>
        <table:table-row table:style-name="ro8">
          <table:table-cell table:style-name="ce13" office:value-type="string" calcext:value-type="string">
            <text:p>ICR 01 - TSL Payable - Tata Bluescope Receivable &gt; TSL Vendor - Tata Bluescope Customer</text:p>
          </table:table-cell>
          <table:table-cell table:style-name="ce13" office:value-type="string" calcext:value-type="string">
            <text:p>ICR_CONSOL_CUSTOMER_SAP</text:p>
            <text:p><text:span text:style-name="T1">ICR_CONSOL_VENDOR_SAP</text:span></text:p>
          </table:table-cell>
          <table:table-cell table:style-name="ce13"/>
          <table:table-cell table:style-name="ce13" office:value-type="string" calcext:value-type="string">
            <text:p>SAP_Doc_Number, Reference, DocChq_Date</text:p>
            <text:p/>
            <text:p><text:span text:style-name="T1">SAP_Doc_Number, Reference</text:span></text:p>
          </table:table-cell>
          <table:table-cell table:style-name="ce13" office:value-type="string" calcext:value-type="string">
            <text:p>Reference, DocChq_Date, INVERSE_Amount_in_Local_Currency</text:p>
            <text:p><text:span text:style-name="T1">Reference, DocChq_Date, Amount_in_Local_Currency</text:span></text:p>
            <text:p><text:span text:style-name="T1"/></text:p>
            <text:p><text:span text:style-name="T3">Reference, INVERSE_Amount_in_Local_Currency</text:span></text:p>
            <text:p><text:span text:style-name="T4">Reference, Amount_in_Local_Currency</text:span>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8">
          <table:table-cell table:style-name="ce13" office:value-type="string" calcext:value-type="string">
            <text:p>ICR 01 - TSL Payable - Tata Bluescope Receivable &gt; TSL Vendor - Tata Bluescope Customer</text:p>
          </table:table-cell>
          <table:table-cell table:style-name="ce13" office:value-type="string" calcext:value-type="string">
            <text:p>ICR_CONSOL_CUSTOMER_SAP</text:p>
            <text:p><text:span text:style-name="T1">ICR_CONSOL_VENDOR_SAP</text:span></text:p>
          </table:table-cell>
          <table:table-cell table:style-name="ce13" office:value-type="string" calcext:value-type="string">
            <text:p>zICR_CONSOL_CUSTOMER_SAP.Reference != ''</text:p>
            <text:p><text:span text:style-name="T1">zICR_CONSOL_VENDOR_SAP.Reference != ''</text:span></text:p>
          </table:table-cell>
          <table:table-cell table:style-name="ce13"/>
          <table:table-cell table:style-name="ce13" office:value-type="string" calcext:value-type="string">
            <text:p>INVERSE_Amount_in_Local_Currency, Reference, DocChq_Date</text:p>
            <text:p><text:span text:style-name="T1">Amount_in_Local_Currency, Reference, DocChq_Date</text:span>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8">
          <table:table-cell table:style-name="ce13" office:value-type="string" calcext:value-type="string">
            <text:p>ICR 01 - TSL Payable - Tata Bluescope Receivable &gt; TSL Vendor - Tata Bluescope Customer</text:p>
          </table:table-cell>
          <table:table-cell table:style-name="ce13" office:value-type="string" calcext:value-type="string">
            <text:p>ICR_CONSOL_CUSTOMER_SAP</text:p>
            <text:p><text:span text:style-name="T1">ICR_CONSOL_VENDOR_SAP</text:span></text:p>
          </table:table-cell>
          <table:table-cell table:style-name="ce13" office:value-type="string" calcext:value-type="string">
            <text:p>Empty</text:p>
            <text:p><text:span text:style-name="T1">zICR_CONSOL_VENDOR_SAP.Reference != ''</text:span></text:p>
          </table:table-cell>
          <table:table-cell table:style-name="ce13" office:value-type="string" calcext:value-type="string">
            <text:p>Empty</text:p>
            <text:p>Empty</text:p>
            <text:p/>
            <text:p><text:span text:style-name="T1">Reference</text:span></text:p>
          </table:table-cell>
          <table:table-cell table:style-name="ce13" office:value-type="string" calcext:value-type="string">
            <text:p>INVERSE_Amount_in_Local_Currency, Reference</text:p>
            <text:p><text:span text:style-name="T1">Amount_in_Local_Currency, Reference</text:span></text:p>
            <text:p><text:span text:style-name="T1"/></text:p>
            <text:p><text:span text:style-name="T3">INVERSE_Amount_in_Local_Currency, Reference</text:span></text:p>
            <text:p><text:span text:style-name="T4">Amount_in_Local_Currency, Reference</text:span>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8">
          <table:table-cell table:style-name="ce13" office:value-type="string" calcext:value-type="string">
            <text:p>ICR 01 - TSL Payable - Tata Bluescope Receivable &gt; TSL Vendor - Tata Bluescope Customer</text:p>
          </table:table-cell>
          <table:table-cell table:style-name="ce13" office:value-type="string" calcext:value-type="string">
            <text:p>ICR_CONSOL_CUSTOMER_SAP</text:p>
            <text:p><text:span text:style-name="T1">ICR_CONSOL_VENDOR_SAP</text:span></text:p>
          </table:table-cell>
          <table:table-cell table:style-name="ce13" office:value-type="string" calcext:value-type="string">
            <text:p>Empty</text:p>
            <text:p/>
            <text:p><text:span text:style-name="T1">zICR_CONSOL_CUSTOMER_SAP.Document_Type LIKE N'%DZ%' OR zICR_CONSOL_CUSTOMER_SAP.Document_Type LIKE N'%DP%'</text:span></text:p>
            <text:p><text:span text:style-name="T3">zICR_CONSOL_VENDOR_SAP.Document_Type LIKE N'%KZ%'</text:span></text:p>
          </table:table-cell>
          <table:table-cell office:value-type="string" calcext:value-type="string">
            <text:p>SAP_Doc_Number, Document_Type, DocChq_Date</text:p>
            <text:p/>
            <text:p>Empty</text:p>
          </table:table-cell>
          <table:table-cell table:style-name="ce13" office:value-type="string" calcext:value-type="string">
            <text:p>INVERSE_Amount_in_Local_Currency, DocChq_Date</text:p>
            <text:p><text:span text:style-name="T1">Amount_in_Local_Currency, DocChq_Date</text:span></text:p>
            <text:p><text:span text:style-name="T1"/></text:p>
            <text:p><text:span text:style-name="T3">INVERSE_Amount_in_Local_Currency, DocChq_Date</text:span></text:p>
            <text:p><text:span text:style-name="T4">Amount_in_Local_Currency, DocChq_Date</text:span>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ICR 01 - TSL Payable - Tata Bluescope Receivable &gt; TSL Vendor - Tata Bluescope Customer</text:p>
          </table:table-cell>
          <table:table-cell table:style-name="ce13" office:value-type="string" calcext:value-type="string">
            <text:p>ICR_CONSOL_CUSTOMER_SAP</text:p>
            <text:p><text:span text:style-name="T1">ICR_CONSOL_VENDOR_SAP</text:span></text:p>
          </table:table-cell>
          <table:table-cell office:value-type="string" calcext:value-type="string">
            <text:p>zICR_CONSOL_CUSTOMER_SAP.Document_Type LIKE N'%DR%'</text:p>
            <text:p><text:span text:style-name="T1">zICR_CONSOL_VENDOR_SAP.Document_Type LIKE N'%KR%'</text:span></text:p>
            <text:p><text:span text:style-name="T1"/></text:p>
            <text:p><text:span text:style-name="T3">zICR_CONSOL_CUSTOMER_SAP.Document_Type = N'DZ' OR zICR_CONSOL_CUSTOMER_SAP.Document_Type = N'DP'</text:span></text:p>
            <text:p><text:span text:style-name="T4">zICR_CONSOL_VENDOR_SAP.Document_Type = N'KZ'</text:span></text:p>
            <text:p><text:span text:style-name="T4"/></text:p>
            <text:p><text:span text:style-name="T5">zICR_CONSOL_CUSTOMER_SAP.Document_Type = N'DR'</text:span></text:p>
            <text:p><text:span text:style-name="T6">zICR_CONSOL_VENDOR_SAP.Document_Type = N'KR'</text:span></text:p>
          </table:table-cell>
          <table:table-cell office:value-type="string" calcext:value-type="string">
            <text:p>DocChq_Date, SAP_Doc_Number</text:p>
          </table:table-cell>
          <table:table-cell table:style-name="ce13" office:value-type="string" calcext:value-type="string">
            <text:p>INVERSE_Amount_in_Local_Currency, DocChq_Date</text:p>
            <text:p><text:span text:style-name="T1">Amount_in_Local_Currency, DocChq_Date</text:span></text:p>
          </table:table-cell>
          <table:table-cell office:value-type="string" calcext:value-type="string">
            <text:p>Payment Done (KZ,DZ)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ICR 01 - TSL Payable - Tata Bluescope Receivable &gt; TSL Vendor - Tata Bluescope Customer</text:p>
          </table:table-cell>
          <table:table-cell table:style-name="ce13" office:value-type="string" calcext:value-type="string">
            <text:p>ICR_CONSOL_CUSTOMER_SAP</text:p>
            <text:p><text:span text:style-name="T1">ICR_CONSOL_VENDOR_SAP</text:span></text:p>
          </table:table-cell>
          <table:table-cell office:value-type="string" calcext:value-type="string">
            <text:p>Empty</text:p>
            <text:p/>
            <text:p>Empty</text:p>
            <text:p/>
            <text:p>Empty</text:p>
            <text:p/>
            <text:p><text:span text:style-name="T1">zICR_CONSOL_CUSTOMER_SAP.MatchID_copy IS NOT NULL OR zICR_CONSOL_CUSTOMER_SAP.MatchID_copy != ''</text:span></text:p>
            <text:p><text:span text:style-name="T3">zICR_CONSOL_VENDOR_SAP.MatchID_copy IS NOT NULL OR zICR_CONSOL_VENDOR_SAP.MatchID_copy != ''</text:span></text:p>
          </table:table-cell>
          <table:table-cell office:value-type="string" calcext:value-type="string">
            <text:p>SAP_Doc_Number, Reference, DocChq_Date</text:p>
            <text:p/>
            <text:p><text:span text:style-name="T1">Reference</text:span></text:p>
            <text:p><text:span text:style-name="T1"/></text:p>
            <text:p><text:span text:style-name="T3">Text_</text:span></text:p>
            <text:p><text:span text:style-name="T4">Reference</text:span></text:p>
            <text:p><text:span text:style-name="T4"/></text:p>
            <text:p><text:span text:style-name="T5">MatchID_copy</text:span></text:p>
          </table:table-cell>
          <table:table-cell table:style-name="ce13" office:value-type="string" calcext:value-type="string">
            <text:p>Reference, INVERSE_Amount_in_Local_Currency, DocChq_Date</text:p>
            <text:p><text:span text:style-name="T1">Reference, Amount_in_Local_Currency, DocChq_Date</text:span></text:p>
            <text:p><text:span text:style-name="T1"/></text:p>
            <text:p><text:span text:style-name="T3">Reference, INVERSE_Amount_in_Local_Currency</text:span></text:p>
            <text:p><text:span text:style-name="T4">Reference, Amount_in_Local_Currency</text:span></text:p>
            <text:p><text:span text:style-name="T4"/></text:p>
            <text:p><text:span text:style-name="T5">Text_, INVERSE_Amount_in_Local_Currency</text:span></text:p>
            <text:p><text:span text:style-name="T6">Reference, Amount_in_Local_Currency</text:span></text:p>
            <text:p><text:span text:style-name="T6"/></text:p>
            <text:p><text:span text:style-name="T14">MatchID_copy, Amount_in_Local_Currency</text:span></text:p>
            <text:p><text:span text:style-name="T16">MatchID_copy, INVERSE_Amount_in_Local_Currency</text:span></text:p>
          </table:table-cell>
          <table:table-cell table:number-columns-repeated="1019"/>
        </table:table-row>
        <table:table-row table:style-name="ro3">
          <table:table-cell table:style-name="ce14" table:number-columns-repeated="1024"/>
        </table:table-row>
        <table:table-row table:style-name="ro4">
          <table:table-cell table:style-name="ce15" office:value-type="string" calcext:value-type="string">
            <text:p>ICR 02 - TSL Payable - Tata Bluescope Receivable &gt; GRIR to Customer</text:p>
          </table:table-cell>
          <table:table-cell table:style-name="ce15" office:value-type="string" calcext:value-type="string">
            <text:p>ICR_CONSOL_GRIR, ICR_CONSOL_CUSTOMER_SAP,</text:p>
            <text:p/>
          </table:table-cell>
          <table:table-cell table:style-name="ce15" office:value-type="string" calcext:value-type="string">
            <text:p>zICR_CONSOL_GRIR.Document_Type LIKE N'%WE%'</text:p>
            <text:p><text:span text:style-name="T1">zICR_CONSOL_CUSTOMER_SAP.Document_Type LIKE N'%RV%'</text:span></text:p>
            <text:p><text:span text:style-name="T3"/></text:p>
            <text:p><text:span text:style-name="T7">ZICR_CONSOL_CUSTOMER_SAP.Document_Type LIKE N'%RV%' OR zICR_CONSOL_CUSTOMER_SAP.Document_Type LIKE N'%DR%'</text:span></text:p>
            <text:p><text:span text:style-name="T7"/></text:p>
            <text:p><text:span text:style-name="T8">zICR_CONSOL_CUSTOMER_SAP.MatchID_copy IS NOT NULL OR zICR_CONSOL_CUSTOMER_SAP.MatchID_copy != ''</text:span></text:p>
            <text:p><text:span text:style-name="T8"/></text:p>
            <text:p><text:span text:style-name="T9">zICR_CONSOL_GRIR.Document_Type LIKE N'%WE%' AND zICR_CONSOL_GRIR.VendorCustomer LIKE N'%T040%'</text:span></text:p>
          </table:table-cell>
          <table:table-cell table:style-name="ce16" office:value-type="string" calcext:value-type="string">
            <text:p>EMPTY,</text:p>
            <text:p><text:span text:style-name="T1">Reference,</text:span></text:p>
            <text:p><text:span text:style-name="T3">SAP_Doc_Number,</text:span></text:p>
            <text:p><text:span text:style-name="T4">Delivery_Note,</text:span></text:p>
            <text:p><text:span text:style-name="T5">BranchAlloc,</text:span></text:p>
            <text:p><text:span text:style-name="T6">Text_,</text:span></text:p>
            <text:p><text:span text:style-name="T14">MatchID_copy</text:span></text:p>
          </table:table-cell>
          <table:table-cell table:style-name="ce16" office:value-type="string" calcext:value-type="string">
            <text:p>Reference, Amount_in_Local_Currency</text:p>
            <text:p><text:span text:style-name="T1">Reference, Net_Amount</text:span></text:p>
            <text:p><text:span text:style-name="T3">Gross_Amount_In_Local_Currency</text:span></text:p>
            <text:p><text:span text:style-name="T4">INVERSE_Amount_in_Local_Currency</text:span></text:p>
            <text:p><text:span text:style-name="T5">Net_Amount, Delivery_Note</text:span></text:p>
            <text:p><text:span text:style-name="T11">Delivery_Note</text:span></text:p>
            <text:p><text:span text:style-name="T12">BranchAlloc</text:span></text:p>
            <text:p><text:span text:style-name="T19">Reference, Gross_Amount_In_Local_Currency</text:span></text:p>
            <text:p><text:span text:style-name="T20">Text_, INVERSE_Amount_in_Local_Currency</text:span></text:p>
            <text:p><text:span text:style-name="T20"/></text:p>
          </table:table-cell>
          <table:table-cell table:style-name="ce16" table:number-columns-repeated="1019"/>
        </table:table-row>
        <table:table-row table:style-name="ro3">
          <table:table-cell table:style-name="ce14" table:number-columns-repeated="1024"/>
        </table:table-row>
        <table:table-row table:style-name="ro10">
          <table:table-cell office:value-type="string" calcext:value-type="string">
            <text:p>ICR 03 - TSL Payable - Tata Bluescope Receivable &gt; Provision to Customer</text:p>
          </table:table-cell>
          <table:table-cell office:value-type="string" calcext:value-type="string">
            <text:p>ICR_CONSOL_PROVISION_SAP</text:p>
            <text:p><text:span text:style-name="T1">ICR_CONSOL_CUSTOMER_SAP</text:span></text:p>
          </table:table-cell>
          <table:table-cell office:value-type="string" calcext:value-type="string">
            <text:p>zICR_CONSOL_CUSTOMER_SAP.Document_Type LIKE N'%RV%'</text:p>
            <text:p/>
            <text:p><text:span text:style-name="T1">zICR_CONSOL_PROVISION_SAP.MatchID_copy IS NOT NULL OR zICR_CONSOL_PROVISION_SAP.MatchID_copy != ''</text:span></text:p>
            <text:p><text:span text:style-name="T3">zICR_CONSOL_CUSTOMER_SAP.MatchID_copy IS NOT NULL OR zICR_CONSOL_CUSTOMER_SAP.MatchID_copy != ''</text:span></text:p>
          </table:table-cell>
          <table:table-cell office:value-type="string" calcext:value-type="string">
            <text:p>Document_Type,</text:p>
            <text:p><text:span text:style-name="T1">MatchID_copy</text:span></text:p>
          </table:table-cell>
          <table:table-cell office:value-type="string" calcext:value-type="string">
            <text:p>Net_Amount</text:p>
            <text:p><text:span text:style-name="T1">MatchID_copy, Amount_in_Local_Currency</text:span></text:p>
            <text:p><text:span text:style-name="T3">MatchID_copy, INVERSE_Amount_in_Local_Currency</text:span></text:p>
          </table:table-cell>
          <table:table-cell table:style-name="Default"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</table:table>
      <table:named-expressions/>
      <table:database-ranges>
        <table:database-range table:name="__Anonymous_Sheet_DB__0" table:target-range-address="'Admin_ICR_Pass Rules Report'.A1:'Admin_ICR_Pass Rules Report'.N217" table:display-filter-buttons="true" table:orientation="column">
          <table:filter>
            <table:filter-and>
              <table:filter-condition table:field-number="1" table:value="ICR 02 - TSL Payable - Tata Bluescope Receivable &gt; GRIR to Customer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0:57:22.704348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dmin_5f_ICR_5f_Pass_20_Rules_20_Report" style:display-name="PageStyle_Admin_ICR_Pass Rules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wati Kumari</meta:initial-creator>
    <meta:creation-date>2021-06-17T07:02:10</meta:creation-date>
    <dc:date>2021-07-01T14:40:34.541126778</dc:date>
    <meta:generator>LibreOffice/6.4.7.2$Linux_X86_64 LibreOffice_project/40$Build-2</meta:generator>
    <meta:editing-duration>PT19M49S</meta:editing-duration>
    <meta:editing-cycles>3</meta:editing-cycles>
    <meta:document-statistic meta:table-count="2" meta:cell-count="2964" meta:object-count="0"/>
    <meta:user-defined meta:name="AppVersion">15.0300</meta:user-defined>
    <meta:user-defined meta:name="Company">TATASTEE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