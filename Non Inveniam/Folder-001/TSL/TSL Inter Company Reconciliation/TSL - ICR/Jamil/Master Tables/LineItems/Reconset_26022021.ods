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5.115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column table:style-name="co6" table:number-columns-repeated="1018" table:default-cell-style-name="Default"/>
        <table:table-row table:style-name="ro1">
          <table:table-cell table:style-name="ce5" office:value-type="string" calcext:value-type="string">
            <text:p>Company_Name</text:p>
          </table:table-cell>
          <table:table-cell table:style-name="ce5" office:value-type="string" calcext:value-type="string">
            <text:p>VendorCustomer_Code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econ_Set</text:p>
          </table:table-cell>
          <table:table-cell table:style-name="ce5" office:value-type="string" calcext:value-type="string">
            <text:p>Recon_Entities</text:p>
          </table:table-cell>
          <table:table-cell table:style-name="ce7" office:value-type="string" calcext:value-type="string">
            <text:p>Is There Any Duplicate VendorCustomerCod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RF LTD</text:p>
          </table:table-cell>
          <table:table-cell table:formula="of:=IFERROR(LOOKUP([.B2];[.B3:.B488];[.B3:.B48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];[.B4:.B489];[.B4:.B48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4];[.B5:.B490];[.B5:.B49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037" calcext:value-type="float">
            <text:p>16037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5];[.B6:.B491];[.B6:.B49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045" calcext:value-type="float">
            <text:p>1604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6];[.B7:.B492];[.B7:.B49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145" calcext:value-type="float">
            <text:p>1614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7];[.B8:.B493];[.B8:.B49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8];[.B9:.B494];[.B9:.B49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385" calcext:value-type="float">
            <text:p>1638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9];[.B10:.B495];[.B10:.B49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485" calcext:value-type="float">
            <text:p>1648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10];[.B11:.B496];[.B11:.B49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25" calcext:value-type="float">
            <text:p>1662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CAPCPL</text:p>
          </table:table-cell>
          <table:table-cell table:formula="of:=IFERROR(LOOKUP([.B11];[.B12:.B497];[.B12:.B49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12];[.B13:.B498];[.B13:.B49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705" calcext:value-type="float">
            <text:p>1670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L</text:p>
          </table:table-cell>
          <table:table-cell table:formula="of:=IFERROR(LOOKUP([.B13];[.B14:.B499];[.B14:.B49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14];[.B15:.B500];[.B15:.B50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241" calcext:value-type="float">
            <text:p>1724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15];[.B16:.B501];[.B16:.B50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1335" calcext:value-type="float">
            <text:p>8133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PL</text:p>
          </table:table-cell>
          <table:table-cell table:formula="of:=IFERROR(LOOKUP([.B16];[.B17:.B502];[.B17:.B50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1760" calcext:value-type="float">
            <text:p>8176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PL</text:p>
          </table:table-cell>
          <table:table-cell table:formula="of:=IFERROR(LOOKUP([.B17];[.B18:.B503];[.B18:.B50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01823" calcext:value-type="float">
            <text:p>10182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18];[.B19:.B504];[.B19:.B50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01824" calcext:value-type="float">
            <text:p>10182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19];[.B20:.B505];[.B20:.B50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01834" calcext:value-type="float">
            <text:p>10183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20];[.B21:.B506];[.B21:.B50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393" calcext:value-type="float">
            <text:p>11139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21];[.B22:.B507];[.B22:.B50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395" calcext:value-type="float">
            <text:p>11139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22];[.B23:.B508];[.B23:.B50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399" calcext:value-type="float">
            <text:p>11139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23];[.B24:.B509];[.B24:.B509]); &quot;&quot;)" office:value-type="float" office:value="111399" calcext:value-type="float">
            <text:p>1113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399" calcext:value-type="float">
            <text:p>11139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24];[.B25:.B510];[.B25:.B51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400" calcext:value-type="float">
            <text:p>11140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25];[.B26:.B511];[.B26:.B51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402" calcext:value-type="float">
            <text:p>1114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6];[.B27:.B512];[.B27:.B51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11403" calcext:value-type="float">
            <text:p>11140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27];[.B28:.B513];[.B28:.B51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1416" calcext:value-type="float">
            <text:p>12141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MJUNCTION - TSL</text:p>
          </table:table-cell>
          <table:table-cell office:value-type="string" calcext:value-type="string">
            <text:p>TSL - MJUNCTION</text:p>
          </table:table-cell>
          <table:table-cell table:formula="of:=IFERROR(LOOKUP([.B28];[.B29:.B514];[.B29:.B51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2004" calcext:value-type="float">
            <text:p>12200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ILL - TSL</text:p>
          </table:table-cell>
          <table:table-cell office:value-type="string" calcext:value-type="string">
            <text:p>TSL - TMILL</text:p>
          </table:table-cell>
          <table:table-cell table:formula="of:=IFERROR(LOOKUP([.B29];[.B30:.B515];[.B30:.B51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4301" calcext:value-type="float">
            <text:p>1243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30];[.B31:.B516];[.B31:.B51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4309" calcext:value-type="float">
            <text:p>12430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31];[.B32:.B517];[.B32:.B51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5552" calcext:value-type="float">
            <text:p>12555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32];[.B33:.B518];[.B33:.B51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7911" calcext:value-type="float">
            <text:p>12791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33];[.B34:.B519];[.B34:.B51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7918" calcext:value-type="float">
            <text:p>12791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34];[.B35:.B520];[.B35:.B52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0023" calcext:value-type="float">
            <text:p>13002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35];[.B36:.B521];[.B36:.B52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0043" calcext:value-type="float">
            <text:p>13004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36];[.B37:.B522];[.B37:.B52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0564" calcext:value-type="float">
            <text:p>13056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37];[.B38:.B523];[.B38:.B52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6006" calcext:value-type="float">
            <text:p>1360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8];[.B39:.B524];[.B39:.B52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6801" calcext:value-type="float">
            <text:p>1368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39];[.B40:.B525];[.B40:.B52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7623" calcext:value-type="float">
            <text:p>13762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40];[.B41:.B526];[.B41:.B52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7677" calcext:value-type="float">
            <text:p>1376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41];[.B42:.B527];[.B42:.B52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001" calcext:value-type="float">
            <text:p>1380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42];[.B43:.B528];[.B43:.B52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003" calcext:value-type="float">
            <text:p>13800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43];[.B44:.B529];[.B44:.B52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004" calcext:value-type="float">
            <text:p>13800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44];[.B45:.B530];[.B45:.B53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005" calcext:value-type="float">
            <text:p>13800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45];[.B46:.B531];[.B46:.B53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266" calcext:value-type="float">
            <text:p>13826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46];[.B47:.B532];[.B47:.B53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267" calcext:value-type="float">
            <text:p>13826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47];[.B48:.B533];[.B48:.B53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268" calcext:value-type="float">
            <text:p>13826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48];[.B49:.B534];[.B49:.B53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271" calcext:value-type="float">
            <text:p>13827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MJUNCTION - TSL</text:p>
          </table:table-cell>
          <table:table-cell office:value-type="string" calcext:value-type="string">
            <text:p>TSL - MJUNCTION</text:p>
          </table:table-cell>
          <table:table-cell table:formula="of:=IFERROR(LOOKUP([.B49];[.B50:.B535];[.B50:.B53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272" calcext:value-type="float">
            <text:p>13827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50];[.B51:.B536];[.B51:.B53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351" calcext:value-type="float">
            <text:p>13835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51];[.B52:.B537];[.B52:.B53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371" calcext:value-type="float">
            <text:p>13837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52];[.B53:.B538];[.B53:.B53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377" calcext:value-type="float">
            <text:p>1383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53];[.B54:.B539];[.B54:.B53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560" calcext:value-type="float">
            <text:p>13856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ILL - TSL</text:p>
          </table:table-cell>
          <table:table-cell office:value-type="string" calcext:value-type="string">
            <text:p>TSL - TMILL</text:p>
          </table:table-cell>
          <table:table-cell table:formula="of:=IFERROR(LOOKUP([.B54];[.B55:.B540];[.B55:.B54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8601" calcext:value-type="float">
            <text:p>1386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55];[.B56:.B541];[.B56:.B54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39619" calcext:value-type="float">
            <text:p>13961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56];[.B57:.B542];[.B57:.B54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0168" calcext:value-type="float">
            <text:p>14016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57];[.B58:.B543];[.B58:.B54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0972" calcext:value-type="float">
            <text:p>14097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58];[.B59:.B544];[.B59:.B54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2364" calcext:value-type="float">
            <text:p>14236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59];[.B60:.B545];[.B60:.B54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7063" calcext:value-type="float">
            <text:p>14706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NYK - TSL</text:p>
          </table:table-cell>
          <table:table-cell office:value-type="string" calcext:value-type="string">
            <text:p>TSL - TATA NYK</text:p>
          </table:table-cell>
          <table:table-cell table:formula="of:=IFERROR(LOOKUP([.B60];[.B61:.B546];[.B61:.B54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61];[.B62:.B547];[.B62:.B547]); &quot;&quot;)" office:value-type="float" office:value="149158" calcext:value-type="float">
            <text:p>149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62];[.B63:.B548];[.B63:.B54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9778" calcext:value-type="float">
            <text:p>14977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63];[.B64:.B549];[.B64:.B54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49780" calcext:value-type="float">
            <text:p>14978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64];[.B65:.B550];[.B65:.B55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0652" calcext:value-type="float">
            <text:p>15065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65];[.B66:.B551];[.B66:.B55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0871" calcext:value-type="float">
            <text:p>15087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S &amp; T MINING - TSL</text:p>
          </table:table-cell>
          <table:table-cell office:value-type="string" calcext:value-type="string">
            <text:p>TSL - S &amp; T MINING</text:p>
          </table:table-cell>
          <table:table-cell table:formula="of:=IFERROR(LOOKUP([.B66];[.B67:.B552];[.B67:.B55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3053" calcext:value-type="float">
            <text:p>15305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67];[.B68:.B553];[.B68:.B55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461" calcext:value-type="float">
            <text:p>15446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68];[.B69:.B554];[.B69:.B55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462" calcext:value-type="float">
            <text:p>15446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69];[.B70:.B555];[.B70:.B55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464" calcext:value-type="float">
            <text:p>15446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0];[.B71:.B556];[.B71:.B55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478" calcext:value-type="float">
            <text:p>15447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1];[.B72:.B557];[.B72:.B55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501" calcext:value-type="float">
            <text:p>1545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2];[.B73:.B558];[.B73:.B55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519" calcext:value-type="float">
            <text:p>15451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73];[.B74:.B559];[.B74:.B55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632" calcext:value-type="float">
            <text:p>15463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4];[.B75:.B560];[.B75:.B56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641" calcext:value-type="float">
            <text:p>15464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5];[.B76:.B561];[.B76:.B56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877" calcext:value-type="float">
            <text:p>1548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6];[.B77:.B562];[.B77:.B56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4991" calcext:value-type="float">
            <text:p>15499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7];[.B78:.B563];[.B78:.B56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5001" calcext:value-type="float">
            <text:p>1550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78];[.B79:.B564];[.B79:.B56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5462" calcext:value-type="float">
            <text:p>15546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79];[.B80:.B565];[.B80:.B56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5536" calcext:value-type="float">
            <text:p>15553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80];[.B81:.B566];[.B81:.B56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6492" calcext:value-type="float">
            <text:p>15649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ALLOY - TSL</text:p>
          </table:table-cell>
          <table:table-cell office:value-type="string" calcext:value-type="string">
            <text:p>TSL - TSALLOY</text:p>
          </table:table-cell>
          <table:table-cell table:formula="of:=IFERROR(LOOKUP([.B81];[.B82:.B567];[.B82:.B56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7019" calcext:value-type="float">
            <text:p>15701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82];[.B83:.B568];[.B83:.B56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7491" calcext:value-type="float">
            <text:p>15749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83];[.B84:.B569];[.B84:.B56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7501" calcext:value-type="float">
            <text:p>1575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84];[.B85:.B570];[.B85:.B57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59913" calcext:value-type="float">
            <text:p>15991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85];[.B86:.B571];[.B86:.B57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0651" calcext:value-type="float">
            <text:p>16065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86];[.B87:.B572];[.B87:.B57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0927" calcext:value-type="float">
            <text:p>16092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87];[.B88:.B573];[.B88:.B57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1131" calcext:value-type="float">
            <text:p>1611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88];[.B89:.B574];[.B89:.B57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2918" calcext:value-type="float">
            <text:p>16291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HSMS - TSL</text:p>
          </table:table-cell>
          <table:table-cell office:value-type="string" calcext:value-type="string">
            <text:p>TSL - HSMS</text:p>
          </table:table-cell>
          <table:table-cell table:formula="of:=IFERROR(LOOKUP([.B89];[.B90:.B575];[.B90:.B57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2936" calcext:value-type="float">
            <text:p>16293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MC - TSL</text:p>
          </table:table-cell>
          <table:table-cell office:value-type="string" calcext:value-type="string">
            <text:p>TSL - TSMC</text:p>
          </table:table-cell>
          <table:table-cell table:formula="of:=IFERROR(LOOKUP([.B90];[.B91:.B576];[.B91:.B57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2937" calcext:value-type="float">
            <text:p>16293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91];[.B92:.B577];[.B92:.B57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3277" calcext:value-type="float">
            <text:p>1632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92];[.B93:.B578];[.B93:.B57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3431" calcext:value-type="float">
            <text:p>1634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93];[.B94:.B579];[.B94:.B57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4763" calcext:value-type="float">
            <text:p>16476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EL - TSL</text:p>
          </table:table-cell>
          <table:table-cell office:value-type="string" calcext:value-type="string">
            <text:p>TSL - IEL</text:p>
          </table:table-cell>
          <table:table-cell table:formula="of:=IFERROR(LOOKUP([.B94];[.B95:.B580];[.B95:.B58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4811" calcext:value-type="float">
            <text:p>16481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95];[.B96:.B581];[.B96:.B58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5828" calcext:value-type="float">
            <text:p>16582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96];[.B97:.B582];[.B97:.B58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97];[.B98:.B583];[.B98:.B58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078" calcext:value-type="float">
            <text:p>16607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98];[.B99:.B584];[.B99:.B58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124" calcext:value-type="float">
            <text:p>16612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99];[.B100:.B585];[.B100:.B58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335" calcext:value-type="float">
            <text:p>16633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00];[.B101:.B586];[.B101:.B58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6903" calcext:value-type="float">
            <text:p>16690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01];[.B102:.B587];[.B102:.B58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7856" calcext:value-type="float">
            <text:p>16785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02];[.B103:.B588];[.B103:.B58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7892" calcext:value-type="float">
            <text:p>16789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ALLOY - TSL</text:p>
          </table:table-cell>
          <table:table-cell office:value-type="string" calcext:value-type="string">
            <text:p>TSL - TSALLOY</text:p>
          </table:table-cell>
          <table:table-cell table:formula="of:=IFERROR(LOOKUP([.B103];[.B104:.B589];[.B104:.B58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8002" calcext:value-type="float">
            <text:p>1680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S &amp; T MINING - TSL</text:p>
          </table:table-cell>
          <table:table-cell office:value-type="string" calcext:value-type="string">
            <text:p>TSL - S &amp; T MINING</text:p>
          </table:table-cell>
          <table:table-cell table:formula="of:=IFERROR(LOOKUP([.B104];[.B105:.B590];[.B105:.B59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8320" calcext:value-type="float">
            <text:p>16832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105];[.B106:.B591];[.B106:.B59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8636" calcext:value-type="float">
            <text:p>16863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106];[.B107:.B592];[.B107:.B59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8756" calcext:value-type="float">
            <text:p>16875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SEZ - TSL</text:p>
          </table:table-cell>
          <table:table-cell office:value-type="string" calcext:value-type="string">
            <text:p>TSL - TSSEZ</text:p>
          </table:table-cell>
          <table:table-cell table:formula="of:=IFERROR(LOOKUP([.B107];[.B108:.B593];[.B108:.B59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9915" calcext:value-type="float">
            <text:p>16991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08];[.B109:.B594];[.B109:.B59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9917" calcext:value-type="float">
            <text:p>16991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09];[.B110:.B595];[.B110:.B59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9918" calcext:value-type="float">
            <text:p>16991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10];[.B111:.B596];[.B111:.B59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0051" calcext:value-type="float">
            <text:p>17005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111];[.B112:.B597];[.B112:.B59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0181" calcext:value-type="float">
            <text:p>17018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GP - TSL</text:p>
          </table:table-cell>
          <table:table-cell office:value-type="string" calcext:value-type="string">
            <text:p>TSL - TSGP</text:p>
          </table:table-cell>
          <table:table-cell table:formula="of:=IFERROR(LOOKUP([.B112];[.B113:.B598];[.B113:.B59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2506" calcext:value-type="float">
            <text:p>1725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BPPL - TSL</text:p>
          </table:table-cell>
          <table:table-cell office:value-type="string" calcext:value-type="string">
            <text:p>TSL - BPPL</text:p>
          </table:table-cell>
          <table:table-cell table:formula="of:=IFERROR(LOOKUP([.B113];[.B114:.B599];[.B114:.B59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36" calcext:value-type="float">
            <text:p>17303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114];[.B115:.B600];[.B115:.B60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39" calcext:value-type="float">
            <text:p>17303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15];[.B116:.B601];[.B116:.B60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40" calcext:value-type="float">
            <text:p>17304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16];[.B117:.B602];[.B117:.B60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41" calcext:value-type="float">
            <text:p>17304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17];[.B118:.B603];[.B118:.B60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42" calcext:value-type="float">
            <text:p>17304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18];[.B119:.B604];[.B119:.B60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083" calcext:value-type="float">
            <text:p>17308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19];[.B120:.B605];[.B120:.B60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242" calcext:value-type="float">
            <text:p>17324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20];[.B121:.B606];[.B121:.B60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243" calcext:value-type="float">
            <text:p>17324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21];[.B122:.B607];[.B122:.B60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244" calcext:value-type="float">
            <text:p>17324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22];[.B123:.B608];[.B123:.B60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245" calcext:value-type="float">
            <text:p>17324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23];[.B124:.B609];[.B124:.B60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346" calcext:value-type="float">
            <text:p>17334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124];[.B125:.B610];[.B125:.B61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385" calcext:value-type="float">
            <text:p>17338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MJUNCTION - TSL</text:p>
          </table:table-cell>
          <table:table-cell office:value-type="string" calcext:value-type="string">
            <text:p>TSL - MJUNCTION</text:p>
          </table:table-cell>
          <table:table-cell table:formula="of:=IFERROR(LOOKUP([.B125];[.B126:.B611];[.B126:.B61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3723" calcext:value-type="float">
            <text:p>17372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26];[.B127:.B612];[.B127:.B61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521" calcext:value-type="float">
            <text:p>17452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27];[.B128:.B613];[.B128:.B61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698" calcext:value-type="float">
            <text:p>17469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28];[.B129:.B614];[.B129:.B61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731" calcext:value-type="float">
            <text:p>1747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29];[.B130:.B615];[.B130:.B61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732" calcext:value-type="float">
            <text:p>17473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KGSSL - TSL</text:p>
          </table:table-cell>
          <table:table-cell office:value-type="string" calcext:value-type="string">
            <text:p>TSL - KGSSL</text:p>
          </table:table-cell>
          <table:table-cell table:formula="of:=IFERROR(LOOKUP([.B130];[.B131:.B616];[.B131:.B61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844" calcext:value-type="float">
            <text:p>17484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131];[.B132:.B617];[.B132:.B61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846" calcext:value-type="float">
            <text:p>17484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132];[.B133:.B618];[.B133:.B61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847" calcext:value-type="float">
            <text:p>17484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133];[.B134:.B619];[.B134:.B61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931" calcext:value-type="float">
            <text:p>1749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BPPL - TSL</text:p>
          </table:table-cell>
          <table:table-cell office:value-type="string" calcext:value-type="string">
            <text:p>TSL - BPPL</text:p>
          </table:table-cell>
          <table:table-cell table:formula="of:=IFERROR(LOOKUP([.B134];[.B135:.B620];[.B135:.B62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932" calcext:value-type="float">
            <text:p>17493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FSPL - TSL</text:p>
          </table:table-cell>
          <table:table-cell office:value-type="string" calcext:value-type="string">
            <text:p>TSL - JFSPL</text:p>
          </table:table-cell>
          <table:table-cell table:formula="of:=IFERROR(LOOKUP([.B135];[.B136:.B621];[.B136:.B62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4952" calcext:value-type="float">
            <text:p>17495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36];[.B137:.B622];[.B137:.B62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155" calcext:value-type="float">
            <text:p>17515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EL - TSL</text:p>
          </table:table-cell>
          <table:table-cell office:value-type="string" calcext:value-type="string">
            <text:p>TSL - IEL</text:p>
          </table:table-cell>
          <table:table-cell table:formula="of:=IFERROR(LOOKUP([.B137];[.B138:.B623];[.B138:.B62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03" calcext:value-type="float">
            <text:p>17540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38];[.B139:.B624];[.B139:.B62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05" calcext:value-type="float">
            <text:p>17540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139];[.B140:.B625];[.B140:.B62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06" calcext:value-type="float">
            <text:p>1754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140];[.B141:.B626];[.B141:.B62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07" calcext:value-type="float">
            <text:p>17540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141];[.B142:.B627];[.B142:.B62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16" calcext:value-type="float">
            <text:p>17541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142];[.B143:.B628];[.B143:.B62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19" calcext:value-type="float">
            <text:p>17541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143];[.B144:.B629];[.B144:.B62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22" calcext:value-type="float">
            <text:p>17542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44];[.B145:.B630];[.B145:.B63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25" calcext:value-type="float">
            <text:p>17542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45];[.B146:.B631];[.B146:.B63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27" calcext:value-type="float">
            <text:p>17542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46];[.B147:.B632];[.B147:.B63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28" calcext:value-type="float">
            <text:p>17542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47];[.B148:.B633];[.B148:.B63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61" calcext:value-type="float">
            <text:p>17546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48];[.B149:.B634];[.B149:.B63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462" calcext:value-type="float">
            <text:p>17546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149];[.B150:.B635];[.B150:.B63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791" calcext:value-type="float">
            <text:p>17579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BPPL - TSL</text:p>
          </table:table-cell>
          <table:table-cell office:value-type="string" calcext:value-type="string">
            <text:p>TSL - BPPL</text:p>
          </table:table-cell>
          <table:table-cell table:formula="of:=IFERROR(LOOKUP([.B150];[.B151:.B636];[.B151:.B63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885" calcext:value-type="float">
            <text:p>17588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S &amp; T MINING - TSL</text:p>
          </table:table-cell>
          <table:table-cell office:value-type="string" calcext:value-type="string">
            <text:p>TSL - S &amp; T MINING</text:p>
          </table:table-cell>
          <table:table-cell table:formula="of:=IFERROR(LOOKUP([.B151];[.B152:.B637];[.B152:.B63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5895" calcext:value-type="float">
            <text:p>17589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152];[.B153:.B638];[.B153:.B63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234" calcext:value-type="float">
            <text:p>17623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153];[.B154:.B639];[.B154:.B63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1" calcext:value-type="float">
            <text:p>17694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154];[.B155:.B640];[.B155:.B64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2" calcext:value-type="float">
            <text:p>17694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55];[.B156:.B641];[.B156:.B64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3" calcext:value-type="float">
            <text:p>17694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156];[.B157:.B642];[.B157:.B64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4" calcext:value-type="float">
            <text:p>17694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57];[.B158:.B643];[.B158:.B64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5" calcext:value-type="float">
            <text:p>17694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PL - TSL</text:p>
          </table:table-cell>
          <table:table-cell office:value-type="string" calcext:value-type="string">
            <text:p>TSL - TPL</text:p>
          </table:table-cell>
          <table:table-cell table:formula="of:=IFERROR(LOOKUP([.B158];[.B159:.B644];[.B159:.B64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7" calcext:value-type="float">
            <text:p>17694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159];[.B160:.B645];[.B160:.B64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8" calcext:value-type="float">
            <text:p>17694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160];[.B161:.B646];[.B161:.B64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49" calcext:value-type="float">
            <text:p>17694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EL - TSL</text:p>
          </table:table-cell>
          <table:table-cell office:value-type="string" calcext:value-type="string">
            <text:p>TSL - IEL</text:p>
          </table:table-cell>
          <table:table-cell table:formula="of:=IFERROR(LOOKUP([.B161];[.B162:.B647];[.B162:.B64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50" calcext:value-type="float">
            <text:p>17695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MJUNCTION - TSL</text:p>
          </table:table-cell>
          <table:table-cell office:value-type="string" calcext:value-type="string">
            <text:p>TSL - MJUNCTION</text:p>
          </table:table-cell>
          <table:table-cell table:formula="of:=IFERROR(LOOKUP([.B162];[.B163:.B648];[.B163:.B64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51" calcext:value-type="float">
            <text:p>17695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163];[.B164:.B649];[.B164:.B64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6952" calcext:value-type="float">
            <text:p>17695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164];[.B165:.B650];[.B165:.B65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104" calcext:value-type="float">
            <text:p>17710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165];[.B166:.B651];[.B166:.B65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506" calcext:value-type="float">
            <text:p>1775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ABJA - TSL</text:p>
          </table:table-cell>
          <table:table-cell office:value-type="string" calcext:value-type="string">
            <text:p>TSL - ABJA</text:p>
          </table:table-cell>
          <table:table-cell table:formula="of:=IFERROR(LOOKUP([.B166];[.B167:.B652];[.B167:.B65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509" calcext:value-type="float">
            <text:p>17750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H - TSL</text:p>
          </table:table-cell>
          <table:table-cell office:value-type="string" calcext:value-type="string">
            <text:p>TSL - TSH</text:p>
          </table:table-cell>
          <table:table-cell table:formula="of:=IFERROR(LOOKUP([.B167];[.B168:.B653];[.B168:.B65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510" calcext:value-type="float">
            <text:p>17751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NYK - TSL</text:p>
          </table:table-cell>
          <table:table-cell office:value-type="string" calcext:value-type="string">
            <text:p>TSL - TATA NYK</text:p>
          </table:table-cell>
          <table:table-cell table:formula="of:=IFERROR(LOOKUP([.B168];[.B169:.B654];[.B169:.B65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631" calcext:value-type="float">
            <text:p>1776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69];[.B170:.B655];[.B170:.B65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903" calcext:value-type="float">
            <text:p>17790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ILL - TSL</text:p>
          </table:table-cell>
          <table:table-cell office:value-type="string" calcext:value-type="string">
            <text:p>TSL - TMILL</text:p>
          </table:table-cell>
          <table:table-cell table:formula="of:=IFERROR(LOOKUP([.B170];[.B171:.B656];[.B171:.B65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7911" calcext:value-type="float">
            <text:p>17791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1];[.B172:.B657];[.B172:.B65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8062" calcext:value-type="float">
            <text:p>17806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2];[.B173:.B658];[.B173:.B65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8063" calcext:value-type="float">
            <text:p>17806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3];[.B174:.B659];[.B174:.B65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8064" calcext:value-type="float">
            <text:p>17806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4];[.B175:.B660];[.B175:.B66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8102" calcext:value-type="float">
            <text:p>1781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HSMS - TSL</text:p>
          </table:table-cell>
          <table:table-cell office:value-type="string" calcext:value-type="string">
            <text:p>TSL - HSMS</text:p>
          </table:table-cell>
          <table:table-cell table:formula="of:=IFERROR(LOOKUP([.B175];[.B176:.B661];[.B176:.B66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8231" calcext:value-type="float">
            <text:p>1782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6];[.B177:.B662];[.B177:.B66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79081" calcext:value-type="float">
            <text:p>17908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177];[.B178:.B663];[.B178:.B66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201570" calcext:value-type="float">
            <text:p>20157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MJUNCTION</text:p>
          </table:table-cell>
          <table:table-cell table:formula="of:=IFERROR(LOOKUP([.B178];[.B179:.B664];[.B179:.B66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206546" calcext:value-type="float">
            <text:p>20654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179];[.B180:.B665];[.B180:.B66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180];[.B181:.B666];[.B181:.B66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211422" calcext:value-type="float">
            <text:p>21142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181];[.B182:.B667];[.B182:.B66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400017" calcext:value-type="float">
            <text:p>40001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ILL - TSL</text:p>
          </table:table-cell>
          <table:table-cell office:value-type="string" calcext:value-type="string">
            <text:p>TSL - TMILL</text:p>
          </table:table-cell>
          <table:table-cell table:formula="of:=IFERROR(LOOKUP([.B182];[.B183:.B668];[.B183:.B66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02708" calcext:value-type="float">
            <text:p>502708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EL</text:p>
          </table:table-cell>
          <table:table-cell table:formula="of:=IFERROR(LOOKUP([.B183];[.B184:.B669];[.B184:.B66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09330" calcext:value-type="float">
            <text:p>50933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BPPL</text:p>
          </table:table-cell>
          <table:table-cell table:formula="of:=IFERROR(LOOKUP([.B184];[.B185:.B670];[.B185:.B67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10506" calcext:value-type="float">
            <text:p>51050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F</text:p>
          </table:table-cell>
          <table:table-cell table:formula="of:=IFERROR(LOOKUP([.B185];[.B186:.B671];[.B186:.B67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10525" calcext:value-type="float">
            <text:p>51052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BPPL</text:p>
          </table:table-cell>
          <table:table-cell table:formula="of:=IFERROR(LOOKUP([.B186];[.B187:.B672];[.B187:.B67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12211" calcext:value-type="float">
            <text:p>51221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FSPL</text:p>
          </table:table-cell>
          <table:table-cell table:formula="of:=IFERROR(LOOKUP([.B187];[.B188:.B673];[.B188:.B67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13798" calcext:value-type="float">
            <text:p>513798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EL</text:p>
          </table:table-cell>
          <table:table-cell table:formula="of:=IFERROR(LOOKUP([.B188];[.B189:.B674];[.B189:.B67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600778" calcext:value-type="float">
            <text:p>600778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MJUNCTION</text:p>
          </table:table-cell>
          <table:table-cell table:formula="of:=IFERROR(LOOKUP([.B189];[.B190:.B675];[.B190:.B67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731005" calcext:value-type="float">
            <text:p>73100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PL</text:p>
          </table:table-cell>
          <table:table-cell table:formula="of:=IFERROR(LOOKUP([.B190];[.B191:.B676];[.B191:.B67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731025" calcext:value-type="float">
            <text:p>73102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L</text:p>
          </table:table-cell>
          <table:table-cell table:formula="of:=IFERROR(LOOKUP([.B191];[.B192:.B677];[.B192:.B67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731030" calcext:value-type="float">
            <text:p>73103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192];[.B193:.B678];[.B193:.B67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02488" calcext:value-type="float">
            <text:p>80248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3];[.B194:.B679];[.B194:.B67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14077" calcext:value-type="float">
            <text:p>8140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4];[.B195:.B680];[.B195:.B68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17217" calcext:value-type="float">
            <text:p>81721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5];[.B196:.B681];[.B196:.B68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17218" calcext:value-type="float">
            <text:p>81721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6];[.B197:.B682];[.B197:.B68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1522" calcext:value-type="float">
            <text:p>82152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7];[.B198:.B683];[.B198:.B68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2271" calcext:value-type="float">
            <text:p>82227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8];[.B199:.B684];[.B199:.B68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2272" calcext:value-type="float">
            <text:p>82227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199];[.B200:.B685];[.B200:.B68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6775" calcext:value-type="float">
            <text:p>82677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0];[.B201:.B686];[.B201:.B68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8170" calcext:value-type="float">
            <text:p>82817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1];[.B202:.B687];[.B202:.B68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29420" calcext:value-type="float">
            <text:p>82942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202];[.B203:.B688];[.B203:.B68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30977" calcext:value-type="float">
            <text:p>8309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203];[.B204:.B689];[.B204:.B68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34015" calcext:value-type="float">
            <text:p>83401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4];[.B205:.B690];[.B205:.B69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65295" calcext:value-type="float">
            <text:p>86529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205];[.B206:.B691];[.B206:.B69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68502" calcext:value-type="float">
            <text:p>8685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6];[.B207:.B692];[.B207:.B69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83855" calcext:value-type="float">
            <text:p>88385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207];[.B208:.B693];[.B208:.B69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84465" calcext:value-type="float">
            <text:p>88446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8];[.B209:.B694];[.B209:.B69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85231" calcext:value-type="float">
            <text:p>8852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09];[.B210:.B695];[.B210:.B69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86061" calcext:value-type="float">
            <text:p>88606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0];[.B211:.B696];[.B211:.B69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92593" calcext:value-type="float">
            <text:p>89259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1];[.B212:.B697];[.B212:.B69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899060" calcext:value-type="float">
            <text:p>89906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2];[.B213:.B698];[.B213:.B69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3755" calcext:value-type="float">
            <text:p>92375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3];[.B214:.B699];[.B214:.B69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4015" calcext:value-type="float">
            <text:p>92401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4];[.B215:.B700];[.B215:.B70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4913" calcext:value-type="float">
            <text:p>92491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215];[.B216:.B701];[.B216:.B70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5174" calcext:value-type="float">
            <text:p>92517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6];[.B217:.B702];[.B217:.B70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5277" calcext:value-type="float">
            <text:p>9252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7];[.B218:.B703];[.B218:.B70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5365" calcext:value-type="float">
            <text:p>92536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218];[.B219:.B704];[.B219:.B70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5470" calcext:value-type="float">
            <text:p>92547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19];[.B220:.B705];[.B220:.B70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5698" calcext:value-type="float">
            <text:p>92569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220];[.B221:.B706];[.B221:.B70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6158" calcext:value-type="float">
            <text:p>92615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1];[.B222:.B707];[.B222:.B70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406" calcext:value-type="float">
            <text:p>9274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2];[.B223:.B708];[.B223:.B70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518" calcext:value-type="float">
            <text:p>92751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3];[.B224:.B709];[.B224:.B70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977" calcext:value-type="float">
            <text:p>92797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4];[.B225:.B710];[.B225:.B71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978" calcext:value-type="float">
            <text:p>92797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5];[.B226:.B711];[.B226:.B71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979" calcext:value-type="float">
            <text:p>92797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6];[.B227:.B712];[.B227:.B71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7980" calcext:value-type="float">
            <text:p>92798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7];[.B228:.B713];[.B228:.B71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8128" calcext:value-type="float">
            <text:p>92812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8];[.B229:.B714];[.B229:.B71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8446" calcext:value-type="float">
            <text:p>92844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29];[.B230:.B715];[.B230:.B71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8860" calcext:value-type="float">
            <text:p>92886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30];[.B231:.B716];[.B231:.B71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9538" calcext:value-type="float">
            <text:p>92953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31];[.B232:.B717];[.B232:.B71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29814" calcext:value-type="float">
            <text:p>929814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SWP - TSL</text:p>
          </table:table-cell>
          <table:table-cell office:value-type="string" calcext:value-type="string">
            <text:p>TSL - ISWP</text:p>
          </table:table-cell>
          <table:table-cell table:formula="of:=IFERROR(LOOKUP([.B232];[.B233:.B718];[.B233:.B71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1331" calcext:value-type="float">
            <text:p>93133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233];[.B234:.B719];[.B234:.B71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1358" calcext:value-type="float">
            <text:p>931358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234];[.B235:.B720];[.B235:.B72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2219" calcext:value-type="float">
            <text:p>93221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235];[.B236:.B721];[.B236:.B72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2793" calcext:value-type="float">
            <text:p>932793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236];[.B237:.B722];[.B237:.B72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3187" calcext:value-type="float">
            <text:p>93318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237];[.B238:.B723];[.B238:.B72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22091" calcext:value-type="float">
            <text:p>122209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GP - TSL</text:p>
          </table:table-cell>
          <table:table-cell office:value-type="string" calcext:value-type="string">
            <text:p>TSL - TSGP</text:p>
          </table:table-cell>
          <table:table-cell table:formula="of:=IFERROR(LOOKUP([.B238];[.B239:.B724];[.B239:.B72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3263007" calcext:value-type="float">
            <text:p>326300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GP - TSL</text:p>
          </table:table-cell>
          <table:table-cell office:value-type="string" calcext:value-type="string">
            <text:p>TSL - TSGP</text:p>
          </table:table-cell>
          <table:table-cell table:formula="of:=IFERROR(LOOKUP([.B239];[.B240:.B725];[.B240:.B72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6033029" calcext:value-type="float">
            <text:p>603302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GP - TSL</text:p>
          </table:table-cell>
          <table:table-cell office:value-type="string" calcext:value-type="string">
            <text:p>TSL - TSGP</text:p>
          </table:table-cell>
          <table:table-cell table:formula="of:=IFERROR(LOOKUP([.B240];[.B241:.B726];[.B241:.B726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<text:s/>T74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RF LTD</text:p>
          </table:table-cell>
          <table:table-cell table:formula="of:=IFERROR(LOOKUP([.B241];[.B242:.B727];[.B242:.B72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I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EL</text:p>
          </table:table-cell>
          <table:table-cell table:formula="of:=IFERROR(LOOKUP([.B242];[.B243:.B728];[.B243:.B72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I0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IEL - TSL</text:p>
          </table:table-cell>
          <table:table-cell office:value-type="string" calcext:value-type="string">
            <text:p>TSL - IEL</text:p>
          </table:table-cell>
          <table:table-cell table:formula="of:=IFERROR(LOOKUP([.B243];[.B244:.B729];[.B244:.B72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I002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IEL - TSL</text:p>
          </table:table-cell>
          <table:table-cell office:value-type="string" calcext:value-type="string">
            <text:p>TSL - IEL</text:p>
          </table:table-cell>
          <table:table-cell table:formula="of:=IFERROR(LOOKUP([.B244];[.B245:.B730];[.B245:.B73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J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AMIPOL</text:p>
          </table:table-cell>
          <table:table-cell table:formula="of:=IFERROR(LOOKUP([.B245];[.B246:.B731];[.B246:.B73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J001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246];[.B247:.B732];[.B247:.B73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J0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AMIPOL - TSL</text:p>
          </table:table-cell>
          <table:table-cell office:value-type="string" calcext:value-type="string">
            <text:p>TSL - JAMIPOL</text:p>
          </table:table-cell>
          <table:table-cell table:formula="of:=IFERROR(LOOKUP([.B247];[.B248:.B733];[.B248:.B73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R005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RUJUVALIKA - TSL</text:p>
          </table:table-cell>
          <table:table-cell office:value-type="string" calcext:value-type="string">
            <text:p>TSL - RUJUVALIKA</text:p>
          </table:table-cell>
          <table:table-cell table:formula="of:=IFERROR(LOOKUP([.B248];[.B249:.B734];[.B249:.B73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T00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RF LTD</text:p>
          </table:table-cell>
          <table:table-cell table:formula="of:=IFERROR(LOOKUP([.B249];[.B250:.B735];[.B250:.B73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AT006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F LTD - TSL</text:p>
          </table:table-cell>
          <table:table-cell office:value-type="string" calcext:value-type="string">
            <text:p>TSL - TRF LTD</text:p>
          </table:table-cell>
          <table:table-cell table:formula="of:=IFERROR(LOOKUP([.B250];[.B251:.B736];[.B251:.B73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CA2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PL</text:p>
          </table:table-cell>
          <table:table-cell table:formula="of:=IFERROR(LOOKUP([.B251];[.B252:.B737];[.B252:.B73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H07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HSMS</text:p>
          </table:table-cell>
          <table:table-cell table:formula="of:=IFERROR(LOOKUP([.B252];[.B253:.B738];[.B253:.B73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I01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253];[.B254:.B739];[.B254:.B73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I27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L</text:p>
          </table:table-cell>
          <table:table-cell table:formula="of:=IFERROR(LOOKUP([.B254];[.B255:.B740];[.B255:.B74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014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255];[.B256:.B741];[.B256:.B74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01H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AMIPOL</text:p>
          </table:table-cell>
          <table:table-cell table:formula="of:=IFERROR(LOOKUP([.B256];[.B257:.B742];[.B257:.B74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279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CAPCPL</text:p>
          </table:table-cell>
          <table:table-cell table:formula="of:=IFERROR(LOOKUP([.B257];[.B258:.B743];[.B258:.B74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32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AMIPOL</text:p>
          </table:table-cell>
          <table:table-cell table:formula="of:=IFERROR(LOOKUP([.B258];[.B259:.B744];[.B259:.B74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38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USCO</text:p>
          </table:table-cell>
          <table:table-cell table:formula="of:=IFERROR(LOOKUP([.B259];[.B260:.B745];[.B260:.B74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B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BPPL</text:p>
          </table:table-cell>
          <table:table-cell table:formula="of:=IFERROR(LOOKUP([.B260];[.B261:.B746];[.B261:.B74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B0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BPPL - TSL</text:p>
          </table:table-cell>
          <table:table-cell office:value-type="string" calcext:value-type="string">
            <text:p>TSL - BPPL</text:p>
          </table:table-cell>
          <table:table-cell table:formula="of:=IFERROR(LOOKUP([.B261];[.B262:.B747];[.B262:.B74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H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HSMS</text:p>
          </table:table-cell>
          <table:table-cell table:formula="of:=IFERROR(LOOKUP([.B262];[.B263:.B748];[.B263:.B74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M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MJUNCTION</text:p>
          </table:table-cell>
          <table:table-cell table:formula="of:=IFERROR(LOOKUP([.B263];[.B264:.B749];[.B264:.B74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M001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MJUNCTION - TSL</text:p>
          </table:table-cell>
          <table:table-cell office:value-type="string" calcext:value-type="string">
            <text:p>TSL - MJUNCTION</text:p>
          </table:table-cell>
          <table:table-cell table:formula="of:=IFERROR(LOOKUP([.B264];[.B265:.B750];[.B265:.B75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M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MH</text:p>
          </table:table-cell>
          <table:table-cell table:formula="of:=IFERROR(LOOKUP([.B265];[.B266:.B751];[.B266:.B75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S001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S &amp; T MINING - TSL</text:p>
          </table:table-cell>
          <table:table-cell office:value-type="string" calcext:value-type="string">
            <text:p>TSL - S &amp; T MINING</text:p>
          </table:table-cell>
          <table:table-cell table:formula="of:=IFERROR(LOOKUP([.B266];[.B267:.B752];[.B267:.B75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S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S &amp; T MINING</text:p>
          </table:table-cell>
          <table:table-cell table:formula="of:=IFERROR(LOOKUP([.B267];[.B268:.B753];[.B268:.B75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T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268];[.B269:.B754];[.B269:.B75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T0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269];[.B270:.B755];[.B270:.B75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JT004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NYK</text:p>
          </table:table-cell>
          <table:table-cell table:formula="of:=IFERROR(LOOKUP([.B270];[.B271:.B756];[.B271:.B75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K33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KGSSL</text:p>
          </table:table-cell>
          <table:table-cell table:formula="of:=IFERROR(LOOKUP([.B271];[.B272:.B757];[.B272:.B75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M498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MH</text:p>
          </table:table-cell>
          <table:table-cell table:formula="of:=IFERROR(LOOKUP([.B272];[.B273:.B758];[.B273:.B75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M55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MJUNCTION</text:p>
          </table:table-cell>
          <table:table-cell table:formula="of:=IFERROR(LOOKUP([.B273];[.B274:.B759];[.B274:.B75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MG39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MJUNCTION</text:p>
          </table:table-cell>
          <table:table-cell table:formula="of:=IFERROR(LOOKUP([.B274];[.B275:.B760];[.B275:.B76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RH4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ALLOY</text:p>
          </table:table-cell>
          <table:table-cell table:formula="of:=IFERROR(LOOKUP([.B275];[.B276:.B761];[.B276:.B76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A008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ABJA - TSL</text:p>
          </table:table-cell>
          <table:table-cell office:value-type="string" calcext:value-type="string">
            <text:p>TSL - ABJA</text:p>
          </table:table-cell>
          <table:table-cell table:formula="of:=IFERROR(LOOKUP([.B276];[.B277:.B762];[.B277:.B76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G002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SSEZ - TSL</text:p>
          </table:table-cell>
          <table:table-cell office:value-type="string" calcext:value-type="string">
            <text:p>TSL - TSSEZ</text:p>
          </table:table-cell>
          <table:table-cell table:formula="of:=IFERROR(LOOKUP([.B277];[.B278:.B763];[.B278:.B76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G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SEZ</text:p>
          </table:table-cell>
          <table:table-cell table:formula="of:=IFERROR(LOOKUP([.B278];[.B279:.B764];[.B279:.B76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CAPCPL</text:p>
          </table:table-cell>
          <table:table-cell table:formula="of:=IFERROR(LOOKUP([.B279];[.B280:.B765];[.B280:.B76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CAPCPL - TSL</text:p>
          </table:table-cell>
          <table:table-cell office:value-type="string" calcext:value-type="string">
            <text:p>TSL - JCAPCPL</text:p>
          </table:table-cell>
          <table:table-cell table:formula="of:=IFERROR(LOOKUP([.B280];[.B281:.B766];[.B281:.B76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USCO</text:p>
          </table:table-cell>
          <table:table-cell table:formula="of:=IFERROR(LOOKUP([.B281];[.B282:.B767];[.B282:.B76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2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282];[.B283:.B768];[.B283:.B76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2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JUSCO - TSL</text:p>
          </table:table-cell>
          <table:table-cell office:value-type="string" calcext:value-type="string">
            <text:p>TSL - JUSCO</text:p>
          </table:table-cell>
          <table:table-cell table:formula="of:=IFERROR(LOOKUP([.B283];[.B284:.B769];[.B284:.B76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3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JFSPL - TSL</text:p>
          </table:table-cell>
          <table:table-cell office:value-type="string" calcext:value-type="string">
            <text:p>TSL - JFSPL</text:p>
          </table:table-cell>
          <table:table-cell table:formula="of:=IFERROR(LOOKUP([.B284];[.B285:.B770];[.B285:.B77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J003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JFSPL</text:p>
          </table:table-cell>
          <table:table-cell table:formula="of:=IFERROR(LOOKUP([.B285];[.B286:.B771];[.B286:.B77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K00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KGSSL</text:p>
          </table:table-cell>
          <table:table-cell table:formula="of:=IFERROR(LOOKUP([.B286];[.B287:.B772];[.B287:.B77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N026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BAMNIPAL - TSL</text:p>
          </table:table-cell>
          <table:table-cell office:value-type="string" calcext:value-type="string">
            <text:p>TSL - BAMNIPAL</text:p>
          </table:table-cell>
          <table:table-cell table:formula="of:=IFERROR(LOOKUP([.B287];[.B288:.B773];[.B288:.B77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02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SALLOY - TSL</text:p>
          </table:table-cell>
          <table:table-cell office:value-type="string" calcext:value-type="string">
            <text:p>TSL - TSALLOY</text:p>
          </table:table-cell>
          <table:table-cell table:formula="of:=IFERROR(LOOKUP([.B288];[.B289:.B774];[.B289:.B77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0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ALLOY</text:p>
          </table:table-cell>
          <table:table-cell table:formula="of:=IFERROR(LOOKUP([.B289];[.B290:.B775];[.B290:.B77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06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ML - TSL</text:p>
          </table:table-cell>
          <table:table-cell office:value-type="string" calcext:value-type="string">
            <text:p>TSL - TML</text:p>
          </table:table-cell>
          <table:table-cell table:formula="of:=IFERROR(LOOKUP([.B290];[.B291:.B776];[.B291:.B77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2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GMH</text:p>
          </table:table-cell>
          <table:table-cell table:formula="of:=IFERROR(LOOKUP([.B291];[.B292:.B777];[.B292:.B77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20</text:p>
          </table:table-cell>
          <table:table-cell office:value-type="string" calcext:value-type="string">
            <text:p>Corporate</text:p>
          </table:table-cell>
          <table:table-cell table:number-columns-repeated="2" office:value-type="string" calcext:value-type="string">
            <text:p>TSL - TSGMH</text:p>
          </table:table-cell>
          <table:table-cell table:formula="of:=IFERROR(LOOKUP([.B292];[.B293:.B778];[.B293:.B77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2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GP</text:p>
          </table:table-cell>
          <table:table-cell table:formula="of:=IFERROR(LOOKUP([.B293];[.B294:.B779];[.B294:.B77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2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GP - TSL</text:p>
          </table:table-cell>
          <table:table-cell office:value-type="string" calcext:value-type="string">
            <text:p>TSL - TSGP</text:p>
          </table:table-cell>
          <table:table-cell table:formula="of:=IFERROR(LOOKUP([.B294];[.B295:.B780];[.B295:.B78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43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HPLTSISPL</text:p>
          </table:table-cell>
          <table:table-cell table:formula="of:=IFERROR(LOOKUP([.B295];[.B296:.B781];[.B296:.B78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49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MC - TSL</text:p>
          </table:table-cell>
          <table:table-cell office:value-type="string" calcext:value-type="string">
            <text:p>TSL - TSMC</text:p>
          </table:table-cell>
          <table:table-cell table:formula="of:=IFERROR(LOOKUP([.B296];[.B297:.B782];[.B297:.B782]); 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60</text:p>
          </table:table-cell>
          <table:table-cell table:style-name="ce2" office:value-type="string" calcext:value-type="string">
            <text:p>Payable</text:p>
          </table:table-cell>
          <table:table-cell table:number-columns-repeated="2" table:style-name="ce2" office:value-type="string" calcext:value-type="string">
            <text:p>TSL - TSPDL</text:p>
          </table:table-cell>
          <table:table-cell table:formula="of:=IFERROR(LOOKUP([.B297];[.B298:.B783];[.B298:.B783]); &quot;&quot;)" office:value-type="string" office:string-value="ST060" calcext:value-type="string">
            <text:p>ST06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60</text:p>
          </table:table-cell>
          <table:table-cell table:style-name="ce2" office:value-type="string" calcext:value-type="string">
            <text:p>Receivable</text:p>
          </table:table-cell>
          <table:table-cell table:style-name="ce2" office:value-type="string" calcext:value-type="string">
            <text:p>TSPDL - TSL</text:p>
          </table:table-cell>
          <table:table-cell table:style-name="ce2" office:value-type="string" calcext:value-type="string">
            <text:p>TSL - TSPDL</text:p>
          </table:table-cell>
          <table:table-cell table:formula="of:=IFERROR(LOOKUP([.B298];[.B299:.B784];[.B299:.B784]); &quot;&quot;)">
            <text:p/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69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ISWP</text:p>
          </table:table-cell>
          <table:table-cell table:formula="of:=IFERROR(LOOKUP([.B299];[.B300:.B785];[.B300:.B785]); 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76</text:p>
          </table:table-cell>
          <table:table-cell table:style-name="ce2" office:value-type="string" calcext:value-type="string">
            <text:p>Payable</text:p>
          </table:table-cell>
          <table:table-cell table:number-columns-repeated="2" table:style-name="ce2" office:value-type="string" calcext:value-type="string">
            <text:p>TSL - TPL</text:p>
          </table:table-cell>
          <table:table-cell table:formula="of:=IFERROR(LOOKUP([.B300];[.B301:.B786];[.B301:.B786]); &quot;&quot;)" office:value-type="string" office:string-value="ST076" calcext:value-type="string">
            <text:p>ST076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76</text:p>
          </table:table-cell>
          <table:table-cell table:style-name="ce2" office:value-type="string" calcext:value-type="string">
            <text:p>Corporate</text:p>
          </table:table-cell>
          <table:table-cell table:style-name="ce2" office:value-type="string" calcext:value-type="string">
            <text:p>TPL - TSL</text:p>
          </table:table-cell>
          <table:table-cell table:style-name="ce2" office:value-type="string" calcext:value-type="string">
            <text:p>TSL - TPL</text:p>
          </table:table-cell>
          <table:table-cell table:formula="of:=IFERROR(LOOKUP([.B301];[.B302:.B787];[.B302:.B787]); &quot;&quot;)">
            <text:p/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83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302];[.B303:.B788];[.B303:.B788]); 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85</text:p>
          </table:table-cell>
          <table:table-cell table:style-name="ce2" office:value-type="string" calcext:value-type="string">
            <text:p>Payable</text:p>
          </table:table-cell>
          <table:table-cell table:number-columns-repeated="2" table:style-name="ce2" office:value-type="string" calcext:value-type="string">
            <text:p>TSL - TMILL</text:p>
          </table:table-cell>
          <table:table-cell table:formula="of:=IFERROR(LOOKUP([.B303];[.B304:.B789];[.B304:.B789]); &quot;&quot;)" office:value-type="string" office:string-value="ST085" calcext:value-type="string">
            <text:p>ST085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085</text:p>
          </table:table-cell>
          <table:table-cell table:style-name="ce2" office:value-type="string" calcext:value-type="string">
            <text:p>Corporate</text:p>
          </table:table-cell>
          <table:table-cell table:style-name="ce2" office:value-type="string" calcext:value-type="string">
            <text:p>TMILL - TSL</text:p>
          </table:table-cell>
          <table:table-cell table:style-name="ce2" office:value-type="string" calcext:value-type="string">
            <text:p>TSL - TMILL</text:p>
          </table:table-cell>
          <table:table-cell table:formula="of:=IFERROR(LOOKUP([.B304];[.B305:.B790];[.B305:.B790]); &quot;&quot;)">
            <text:p/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9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CIL</text:p>
          </table:table-cell>
          <table:table-cell table:formula="of:=IFERROR(LOOKUP([.B305];[.B306:.B791];[.B306:.B791]); &quot;&quot;)" office:value-type="string" office:string-value="ST095" calcext:value-type="string">
            <text:p>ST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95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306];[.B307:.B792];[.B307:.B79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97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L</text:p>
          </table:table-cell>
          <table:table-cell table:formula="of:=IFERROR(LOOKUP([.B307];[.B308:.B793];[.B308:.B793]); &quot;&quot;)" office:value-type="string" office:string-value="ST097" calcext:value-type="string">
            <text:p>ST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97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308];[.B309:.B794];[.B309:.B794]); 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100</text:p>
          </table:table-cell>
          <table:table-cell table:style-name="ce2" office:value-type="string" calcext:value-type="string">
            <text:p>Receivable</text:p>
          </table:table-cell>
          <table:table-cell table:style-name="ce2" office:value-type="string" calcext:value-type="string">
            <text:p>TSF - TSL</text:p>
          </table:table-cell>
          <table:table-cell table:style-name="ce2" office:value-type="string" calcext:value-type="string">
            <text:p>TSL - TSF</text:p>
          </table:table-cell>
          <table:table-cell table:formula="of:=IFERROR(LOOKUP([.B309];[.B310:.B795];[.B310:.B795]); &quot;&quot;)">
            <text:p/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10];[.B311:.B796];[.B311:.B79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11];[.B312:.B797];[.B312:.B79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43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312];[.B313:.B798];[.B313:.B79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7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RF LTD</text:p>
          </table:table-cell>
          <table:table-cell table:formula="of:=IFERROR(LOOKUP([.B313];[.B314:.B799];[.B314:.B79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85 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14];[.B315:.B800];[.B315:.B80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099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CIL</text:p>
          </table:table-cell>
          <table:table-cell table:formula="of:=IFERROR(LOOKUP([.B315];[.B316:.B801];[.B316:.B80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47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IL</text:p>
          </table:table-cell>
          <table:table-cell table:formula="of:=IFERROR(LOOKUP([.B316];[.B317:.B802];[.B317:.B80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69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PDL</text:p>
          </table:table-cell>
          <table:table-cell table:formula="of:=IFERROR(LOOKUP([.B317];[.B318:.B803];[.B318:.B80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715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18];[.B319:.B804];[.B319:.B80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71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19];[.B320:.B805];[.B320:.B80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722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20];[.B321:.B806];[.B321:.B80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722-OR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21];[.B322:.B807];[.B322:.B80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74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RF LTD</text:p>
          </table:table-cell>
          <table:table-cell table:formula="of:=IFERROR(LOOKUP([.B322];[.B323:.B808];[.B323:.B80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F50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KM GLOBAL</text:p>
          </table:table-cell>
          <table:table-cell table:formula="of:=IFERROR(LOOKUP([.B323];[.B324:.B809];[.B324:.B80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I2F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ATA NYK</text:p>
          </table:table-cell>
          <table:table-cell table:formula="of:=IFERROR(LOOKUP([.B324];[.B325:.B810];[.B325:.B81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J6F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GP</text:p>
          </table:table-cell>
          <table:table-cell table:formula="of:=IFERROR(LOOKUP([.B325];[.B326:.B811];[.B326:.B811]); &quot;&quot;)" office:value-type="string" office:string-value="ST100" calcext:value-type="string">
            <text:p>ST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MILLONE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ILL</text:p>
          </table:table-cell>
          <table:table-cell table:formula="of:=IFERROR(LOOKUP([.B326];[.B327:.B812];[.B327:.B812]); &quot;&quot;)" office:value-type="string" office:string-value="ST100" calcext:value-type="string">
            <text:p>ST1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Steel Limited</text:p>
          </table:table-cell>
          <table:table-cell table:style-name="ce2" office:value-type="string" calcext:value-type="string">
            <text:p>ST100</text:p>
          </table:table-cell>
          <table:table-cell table:style-name="ce2" office:value-type="string" calcext:value-type="string">
            <text:p>Payable</text:p>
          </table:table-cell>
          <table:table-cell table:number-columns-repeated="2" table:style-name="ce2" office:value-type="string" calcext:value-type="string">
            <text:p>TSL - TSF</text:p>
          </table:table-cell>
          <table:table-cell table:formula="of:=IFERROR(LOOKUP([.B327];[.B328:.B813];[.B328:.B813]); &quot;&quot;)" office:value-type="string" office:string-value="HT001" calcext:value-type="string">
            <text:p>HT00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1910" calcext:value-type="float">
            <text:p>931910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CIL - TSL</text:p>
          </table:table-cell>
          <table:table-cell office:value-type="string" calcext:value-type="string">
            <text:p>TSL - TCIL</text:p>
          </table:table-cell>
          <table:table-cell table:formula="of:=IFERROR(LOOKUP([.B328];[.B329:.B814];[.B329:.B814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CIL</text:p>
          </table:table-cell>
          <table:table-cell table:formula="of:=IFERROR(LOOKUP([.B329];[.B330:.B815];[.B330:.B81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4007" calcext:value-type="float">
            <text:p>934007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330];[.B331:.B816];[.B331:.B816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3985" calcext:value-type="float">
            <text:p>93398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331];[.B332:.B817];[.B332:.B817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932471" calcext:value-type="float">
            <text:p>93247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PDL - TSL</text:p>
          </table:table-cell>
          <table:table-cell office:value-type="string" calcext:value-type="string">
            <text:p>TSL - TSPDL</text:p>
          </table:table-cell>
          <table:table-cell table:formula="of:=IFERROR(LOOKUP([.B332];[.B333:.B818];[.B333:.B818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16705" calcext:value-type="float">
            <text:p>1670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333];[.B334:.B819];[.B334:.B81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475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SIL - TSL</text:p>
          </table:table-cell>
          <table:table-cell office:value-type="string" calcext:value-type="string">
            <text:p>TSL - TSIL</text:p>
          </table:table-cell>
          <table:table-cell table:formula="of:=IFERROR(LOOKUP([.B334];[.B335:.B820];[.B335:.B82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float" office:value="516381" calcext:value-type="float">
            <text:p>516381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SSEZ</text:p>
          </table:table-cell>
          <table:table-cell table:formula="of:=IFERROR(LOOKUP([.B335];[.B336:.B821];[.B336:.B821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T616</text:p>
          </table:table-cell>
          <table:table-cell office:value-type="string" calcext:value-type="string">
            <text:p>Payable</text:p>
          </table:table-cell>
          <table:table-cell table:number-columns-repeated="2" office:value-type="string" calcext:value-type="string">
            <text:p>TSL - TML</text:p>
          </table:table-cell>
          <table:table-cell table:formula="of:=IFERROR(LOOKUP([.B336];[.B337:.B822];[.B337:.B822]); &quot;&quot;)" office:value-type="string" office:string-value="ST022" calcext:value-type="string">
            <text:p>ST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Steel Limited</text:p>
          </table:table-cell>
          <table:table-cell office:value-type="string" calcext:value-type="string">
            <text:p>ST022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TSH - TSL</text:p>
          </table:table-cell>
          <table:table-cell office:value-type="string" calcext:value-type="string">
            <text:p>TSL - TSH</text:p>
          </table:table-cell>
          <table:table-cell table:formula="of:=IFERROR(LOOKUP([.B337];[.B338:.B823];[.B338:.B82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100098" calcext:value-type="float">
            <text:p>10009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38];[.B339:.B824];[.B339:.B824]); &quot;&quot;)" office:value-type="float" office:value="100098" calcext:value-type="float">
            <text:p>100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100765" calcext:value-type="float">
            <text:p>10076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39];[.B340:.B825];[.B340:.B82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100843" calcext:value-type="float">
            <text:p>100843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40];[.B341:.B826];[.B341:.B82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101005" calcext:value-type="float">
            <text:p>10100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41];[.B342:.B827];[.B342:.B82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2493" calcext:value-type="float">
            <text:p>30249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2];[.B343:.B828];[.B343:.B82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2563" calcext:value-type="float">
            <text:p>30256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3];[.B344:.B829];[.B344:.B82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3062" calcext:value-type="float">
            <text:p>30306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4];[.B345:.B830];[.B345:.B83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3221" calcext:value-type="float">
            <text:p>30322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5];[.B346:.B831];[.B346:.B83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3730" calcext:value-type="float">
            <text:p>30373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6];[.B347:.B832];[.B347:.B83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4152" calcext:value-type="float">
            <text:p>30415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7];[.B348:.B833];[.B348:.B83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4431" calcext:value-type="float">
            <text:p>30443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8];[.B349:.B834];[.B349:.B83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4443" calcext:value-type="float">
            <text:p>30444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49];[.B350:.B835];[.B350:.B83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0];[.B351:.B836];[.B351:.B83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5873" calcext:value-type="float">
            <text:p>30587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1];[.B352:.B837];[.B352:.B83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6263" calcext:value-type="float">
            <text:p>30626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2];[.B353:.B838];[.B353:.B83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6534" calcext:value-type="float">
            <text:p>30653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3];[.B354:.B839];[.B354:.B83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6546" calcext:value-type="float">
            <text:p>30654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4];[.B355:.B840];[.B355:.B84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7259" calcext:value-type="float">
            <text:p>30725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5];[.B356:.B841];[.B356:.B84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8751" calcext:value-type="float">
            <text:p>30875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6];[.B357:.B842];[.B357:.B84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085" calcext:value-type="float">
            <text:p>30908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7];[.B358:.B843];[.B358:.B84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527" calcext:value-type="float">
            <text:p>30952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8];[.B359:.B844];[.B359:.B84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556" calcext:value-type="float">
            <text:p>30955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59];[.B360:.B845];[.B360:.B84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564" calcext:value-type="float">
            <text:p>30956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0];[.B361:.B846];[.B361:.B84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673" calcext:value-type="float">
            <text:p>30967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1];[.B362:.B847];[.B362:.B84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728" calcext:value-type="float">
            <text:p>30972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2];[.B363:.B848];[.B363:.B84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09990" calcext:value-type="float">
            <text:p>30999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3];[.B364:.B849];[.B364:.B84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187" calcext:value-type="float">
            <text:p>31018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4];[.B365:.B850];[.B365:.B85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354" calcext:value-type="float">
            <text:p>31035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5];[.B366:.B851];[.B366:.B85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521" calcext:value-type="float">
            <text:p>31052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6];[.B367:.B852];[.B367:.B85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653" calcext:value-type="float">
            <text:p>31065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7];[.B368:.B853];[.B368:.B85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794" calcext:value-type="float">
            <text:p>31079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8];[.B369:.B854];[.B369:.B85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944" calcext:value-type="float">
            <text:p>31094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69];[.B370:.B855];[.B370:.B85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0995" calcext:value-type="float">
            <text:p>31099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0];[.B371:.B856];[.B371:.B85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1155" calcext:value-type="float">
            <text:p>31115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1];[.B372:.B857];[.B372:.B85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1520" calcext:value-type="float">
            <text:p>31152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2];[.B373:.B858];[.B373:.B85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1780" calcext:value-type="float">
            <text:p>31178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3];[.B374:.B859];[.B374:.B85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1959" calcext:value-type="float">
            <text:p>31195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4];[.B375:.B860];[.B375:.B86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5];[.B376:.B861];[.B376:.B86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2351" calcext:value-type="float">
            <text:p>31235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6];[.B377:.B862];[.B377:.B86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2948" calcext:value-type="float">
            <text:p>31294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7];[.B378:.B863];[.B378:.B86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2950" calcext:value-type="float">
            <text:p>31295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8];[.B379:.B864];[.B379:.B86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79];[.B380:.B865];[.B380:.B86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3078" calcext:value-type="float">
            <text:p>31307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0];[.B381:.B866];[.B381:.B86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3534" calcext:value-type="float">
            <text:p>31353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1];[.B382:.B867];[.B382:.B86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4258" calcext:value-type="float">
            <text:p>31425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2];[.B383:.B868];[.B383:.B86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5113" calcext:value-type="float">
            <text:p>31511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3];[.B384:.B869];[.B384:.B86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6809" calcext:value-type="float">
            <text:p>31680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4];[.B385:.B870];[.B385:.B87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6840" calcext:value-type="float">
            <text:p>31684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5];[.B386:.B871];[.B386:.B87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6949" calcext:value-type="float">
            <text:p>31694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6];[.B387:.B872];[.B387:.B87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7428" calcext:value-type="float">
            <text:p>31742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7];[.B388:.B873];[.B388:.B87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064" calcext:value-type="float">
            <text:p>31806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8];[.B389:.B874];[.B389:.B87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072" calcext:value-type="float">
            <text:p>31807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89];[.B390:.B875];[.B390:.B87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169" calcext:value-type="float">
            <text:p>31816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0];[.B391:.B876];[.B391:.B87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179" calcext:value-type="float">
            <text:p>31817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1];[.B392:.B877];[.B392:.B87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420" calcext:value-type="float">
            <text:p>31842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2];[.B393:.B878];[.B393:.B87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767" calcext:value-type="float">
            <text:p>31876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3];[.B394:.B879];[.B394:.B87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4];[.B395:.B880];[.B395:.B88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500716" calcext:value-type="float">
            <text:p>50071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395];[.B396:.B881];[.B396:.B881]); &quot;&quot;)" office:value-type="float" office:value="500716" calcext:value-type="float">
            <text:p>5007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BlueScope Steel Ltd</text:p>
          </table:table-cell>
          <table:table-cell table:style-name="ce2" office:value-type="string" calcext:value-type="string">
            <text:p>HT001</text:p>
          </table:table-cell>
          <table:table-cell table:style-name="ce2" office:value-type="string" calcext:value-type="string">
            <text:p>Receivable</text:p>
          </table:table-cell>
          <table:table-cell table:number-columns-repeated="2" table:style-name="ce2" office:value-type="string" calcext:value-type="string">
            <text:p>TSL - TATA BLUESCOPE</text:p>
          </table:table-cell>
          <table:table-cell table:formula="of:=IFERROR(LOOKUP([.B396];[.B397:.B882];[.B397:.B882]); &quot;&quot;)" office:value-type="string" office:string-value="HT001" calcext:value-type="string">
            <text:p>HT00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ata BlueScope Steel Ltd</text:p>
          </table:table-cell>
          <table:table-cell table:style-name="ce2" office:value-type="string" calcext:value-type="string">
            <text:p>HT001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ATA BLUESCOPE - TSL</text:p>
          </table:table-cell>
          <table:table-cell table:style-name="ce2" office:value-type="string" calcext:value-type="string">
            <text:p>TSL - TATA BLUESCOPE</text:p>
          </table:table-cell>
          <table:table-cell table:formula="of:=IFERROR(LOOKUP([.B397];[.B398:.B883];[.B398:.B883]); &quot;&quot;)" office:value-type="string" office:string-value="HT001" calcext:value-type="string">
            <text:p>HT00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032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98];[.B399:.B884];[.B399:.B88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043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399];[.B400:.B885];[.B400:.B88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074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0];[.B401:.B886];[.B401:.B88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166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1];[.B402:.B887];[.B402:.B88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16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2];[.B403:.B888];[.B403:.B88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76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3];[.B404:.B889];[.B404:.B88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77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4];[.B405:.B890];[.B405:.B89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830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5];[.B406:.B891];[.B406:.B89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T083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6];[.B407:.B892];[.B407:.B89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ZT000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7];[.B408:.B893];[.B408:.B89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ZT0019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8];[.B409:.B894];[.B409:.B89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ZT004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09];[.B410:.B895];[.B410:.B89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string" calcext:value-type="string">
            <text:p>ZT0067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0];[.B411:.B896];[.B411:.B89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20196" calcext:value-type="float">
            <text:p>32019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11];[.B412:.B897];[.B412:.B89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Ltd</text:p>
          </table:table-cell>
          <table:table-cell office:value-type="float" office:value="320417" calcext:value-type="float">
            <text:p>32041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12];[.B413:.B898];[.B413:.B898]); &quot;&quot;)" office:value-type="float" office:value="318999" calcext:value-type="float">
            <text:p>318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100098" calcext:value-type="float">
            <text:p>10009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3];[.B414:.B899];[.B414:.B89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100765" calcext:value-type="float">
            <text:p>10076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4];[.B415:.B900];[.B415:.B90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100843" calcext:value-type="float">
            <text:p>100843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5];[.B416:.B901];[.B416:.B90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101005" calcext:value-type="float">
            <text:p>10100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6];[.B417:.B902];[.B417:.B902]); 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BlueScope Steel Pvt</text:p>
          </table:table-cell>
          <table:table-cell table:style-name="ce2" office:value-type="string" calcext:value-type="string">
            <text:p>HT001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ATA BLUESCOPE - TSL</text:p>
          </table:table-cell>
          <table:table-cell table:style-name="ce2" office:value-type="string" calcext:value-type="string">
            <text:p>TSL - TATA BLUESCOPE</text:p>
          </table:table-cell>
          <table:table-cell table:formula="of:=IFERROR(LOOKUP([.B417];[.B418:.B903];[.B418:.B903]); &quot;&quot;)" office:value-type="string" office:string-value="HT001" calcext:value-type="string">
            <text:p>HT00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032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8];[.B419:.B904];[.B419:.B90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043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19];[.B420:.B905];[.B420:.B90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074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0];[.B421:.B906];[.B421:.B90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166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1];[.B422:.B907];[.B422:.B90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16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2];[.B423:.B908];[.B423:.B90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765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3];[.B424:.B909];[.B424:.B90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77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4];[.B425:.B910];[.B425:.B91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830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5];[.B426:.B911];[.B426:.B91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T0838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6];[.B427:.B912];[.B427:.B91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ZT000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7];[.B428:.B913];[.B428:.B91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ZT0019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8];[.B429:.B914];[.B429:.B91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ZT0041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29];[.B430:.B915];[.B430:.B91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string" calcext:value-type="string">
            <text:p>ZT0067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ATA BLUESCOPE - TSL</text:p>
          </table:table-cell>
          <table:table-cell office:value-type="string" calcext:value-type="string">
            <text:p>TSL - TATA BLUESCOPE</text:p>
          </table:table-cell>
          <table:table-cell table:formula="of:=IFERROR(LOOKUP([.B430];[.B431:.B916];[.B431:.B91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2493" calcext:value-type="float">
            <text:p>30249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1];[.B432:.B917];[.B432:.B91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2563" calcext:value-type="float">
            <text:p>30256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2];[.B433:.B918];[.B433:.B91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3062" calcext:value-type="float">
            <text:p>30306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3];[.B434:.B919];[.B434:.B91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3221" calcext:value-type="float">
            <text:p>30322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4];[.B435:.B920];[.B435:.B92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3730" calcext:value-type="float">
            <text:p>30373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5];[.B436:.B921];[.B436:.B92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4152" calcext:value-type="float">
            <text:p>30415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6];[.B437:.B922];[.B437:.B92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4431" calcext:value-type="float">
            <text:p>30443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7];[.B438:.B923];[.B438:.B92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4443" calcext:value-type="float">
            <text:p>30444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8];[.B439:.B924];[.B439:.B92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39];[.B440:.B925];[.B440:.B92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5873" calcext:value-type="float">
            <text:p>30587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0];[.B441:.B926];[.B441:.B92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6263" calcext:value-type="float">
            <text:p>30626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1];[.B442:.B927];[.B442:.B92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6534" calcext:value-type="float">
            <text:p>30653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2];[.B443:.B928];[.B443:.B92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6546" calcext:value-type="float">
            <text:p>30654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3];[.B444:.B929];[.B444:.B92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7259" calcext:value-type="float">
            <text:p>30725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4];[.B445:.B930];[.B445:.B93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8751" calcext:value-type="float">
            <text:p>30875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5];[.B446:.B931];[.B446:.B93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085" calcext:value-type="float">
            <text:p>30908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6];[.B447:.B932];[.B447:.B93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527" calcext:value-type="float">
            <text:p>30952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7];[.B448:.B933];[.B448:.B93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556" calcext:value-type="float">
            <text:p>30955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8];[.B449:.B934];[.B449:.B93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564" calcext:value-type="float">
            <text:p>30956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49];[.B450:.B935];[.B450:.B93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673" calcext:value-type="float">
            <text:p>30967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0];[.B451:.B936];[.B451:.B93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728" calcext:value-type="float">
            <text:p>30972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1];[.B452:.B937];[.B452:.B93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09990" calcext:value-type="float">
            <text:p>30999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2];[.B453:.B938];[.B453:.B93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187" calcext:value-type="float">
            <text:p>31018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3];[.B454:.B939];[.B454:.B93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354" calcext:value-type="float">
            <text:p>31035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4];[.B455:.B940];[.B455:.B94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521" calcext:value-type="float">
            <text:p>31052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5];[.B456:.B941];[.B456:.B94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653" calcext:value-type="float">
            <text:p>31065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6];[.B457:.B942];[.B457:.B94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794" calcext:value-type="float">
            <text:p>31079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7];[.B458:.B943];[.B458:.B94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944" calcext:value-type="float">
            <text:p>31094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8];[.B459:.B944];[.B459:.B94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0995" calcext:value-type="float">
            <text:p>31099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59];[.B460:.B945];[.B460:.B94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1155" calcext:value-type="float">
            <text:p>311155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0];[.B461:.B946];[.B461:.B94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1520" calcext:value-type="float">
            <text:p>31152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1];[.B462:.B947];[.B462:.B94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1780" calcext:value-type="float">
            <text:p>31178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2];[.B463:.B948];[.B463:.B94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1959" calcext:value-type="float">
            <text:p>31195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3];[.B464:.B949];[.B464:.B94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4];[.B465:.B950];[.B465:.B95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2351" calcext:value-type="float">
            <text:p>312351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5];[.B466:.B951];[.B466:.B95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2948" calcext:value-type="float">
            <text:p>31294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6];[.B467:.B952];[.B467:.B95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2950" calcext:value-type="float">
            <text:p>31295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7];[.B468:.B953];[.B468:.B95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8];[.B469:.B954];[.B469:.B95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3078" calcext:value-type="float">
            <text:p>31307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69];[.B470:.B955];[.B470:.B95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3534" calcext:value-type="float">
            <text:p>31353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0];[.B471:.B956];[.B471:.B95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4258" calcext:value-type="float">
            <text:p>31425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1];[.B472:.B957];[.B472:.B95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5113" calcext:value-type="float">
            <text:p>315113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2];[.B473:.B958];[.B473:.B95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6809" calcext:value-type="float">
            <text:p>31680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3];[.B474:.B959];[.B474:.B95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6840" calcext:value-type="float">
            <text:p>31684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4];[.B475:.B960];[.B475:.B960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6949" calcext:value-type="float">
            <text:p>31694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5];[.B476:.B961];[.B476:.B961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7428" calcext:value-type="float">
            <text:p>317428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6];[.B477:.B962];[.B477:.B96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064" calcext:value-type="float">
            <text:p>318064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7];[.B478:.B963];[.B478:.B963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072" calcext:value-type="float">
            <text:p>318072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8];[.B479:.B964];[.B479:.B964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169" calcext:value-type="float">
            <text:p>31816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79];[.B480:.B965];[.B480:.B965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179" calcext:value-type="float">
            <text:p>31817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0];[.B481:.B966];[.B481:.B966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420" calcext:value-type="float">
            <text:p>318420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1];[.B482:.B967];[.B482:.B967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767" calcext:value-type="float">
            <text:p>31876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2];[.B483:.B968];[.B483:.B968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3];[.B484:.B969];[.B484:.B969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500716" calcext:value-type="float">
            <text:p>50071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4];[.B485:.B970];[.B485:.B970]); &quot;&quot;)" office:value-type="float" office:value="320417" calcext:value-type="float">
            <text:p>3204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ta BlueScope Steel Pvt</text:p>
          </table:table-cell>
          <table:table-cell table:style-name="ce2" office:value-type="string" calcext:value-type="string">
            <text:p>HT001</text:p>
          </table:table-cell>
          <table:table-cell table:style-name="ce2" office:value-type="string" calcext:value-type="string">
            <text:p>Receivable</text:p>
          </table:table-cell>
          <table:table-cell table:number-columns-repeated="2" table:style-name="ce2" office:value-type="string" calcext:value-type="string">
            <text:p>TSL - TATA BLUESCOPE</text:p>
          </table:table-cell>
          <table:table-cell table:formula="of:=IFERROR(LOOKUP([.B485];[.B486:.B971];[.B486:.B971]); &quot;&quot;)">
            <text:p/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20196" calcext:value-type="float">
            <text:p>320196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6];[.B487:.B972];[.B487:.B972]); 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ta BlueScope Steel Pvt</text:p>
          </table:table-cell>
          <table:table-cell office:value-type="float" office:value="320417" calcext:value-type="float">
            <text:p>320417</text:p>
          </table:table-cell>
          <table:table-cell office:value-type="string" calcext:value-type="string">
            <text:p>Receivable</text:p>
          </table:table-cell>
          <table:table-cell table:number-columns-repeated="2" office:value-type="string" calcext:value-type="string">
            <text:p>TSL - TATA BLUESCOPE</text:p>
          </table:table-cell>
          <table:table-cell table:formula="of:=IFERROR(LOOKUP([.B487];[.B488:.B973];[.B488:.B973])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ERROR(LOOKUP([.B488];[.B489:.B974];[.B489:.B974]); &quot;&quot;)">
            <text:p/>
          </table:table-cell>
          <table:table-cell table:number-columns-repeated="1018"/>
        </table:table-row>
        <table:table-row table:style-name="ro2" table:number-rows-repeated="104808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E$337"/>
        </table:named-expressions>
      </table:table>
      <table:named-expressions/>
      <table:database-ranges>
        <table:database-range table:name="__Anonymous_Sheet_DB__0" table:target-range-address="Sheet1.A1:Sheet1.F48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6:04:53.823848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wati Kumari</meta:initial-creator>
    <meta:creation-date>2021-06-17T06:50:55</meta:creation-date>
    <dc:date>2021-06-21T16:05:13.696827905</dc:date>
    <meta:generator>LibreOffice/6.4.7.2$Linux_X86_64 LibreOffice_project/40$Build-2</meta:generator>
    <meta:editing-duration>PT5H24M16S</meta:editing-duration>
    <meta:editing-cycles>3</meta:editing-cycles>
    <meta:document-statistic meta:table-count="1" meta:cell-count="2923" meta:object-count="0"/>
    <meta:user-defined meta:name="AppVersion">15.0300</meta:user-defined>
    <meta:user-defined meta:name="Company">TATASTE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