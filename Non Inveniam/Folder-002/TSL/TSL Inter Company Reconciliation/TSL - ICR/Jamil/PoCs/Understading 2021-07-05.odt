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b66d" officeooo:paragraph-rsid="0005b6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Match Engine Requirements:</text:p>
      <text:p text:style-name="P1"><text:tab/>a. Data ( Vendor, Customer, GRIR, Provision, TDS )</text:p>
      <text:p text:style-name="P1"><text:tab/>b. Master Table that will be used to determine the line item for the roles TSL_PAYABLE.</text:p>
      <text:p text:style-name="P1">(Transaction Type)</text:p>
      <text:p text:style-name="P1"><text:tab/>c. Account Related Information for Balance Calculation. (Transaction Type)</text:p>
      <text:p text:style-name="P1"><text:tab/>d. To prepare Reconciliation set, the vendor-customer codes are required, so that those vendor codes are associated with a single entity.</text:p>
      <text:p text:style-name="P1"><text:tab/></text:p>
      <text:p text:style-name="P1"/>
      <text:p text:style-name="P1"/>
      <text:p text:style-name="P1">2. Data Flow Understading</text:p>
      <text:p text:style-name="P1"><text:tab/>a. They will send data from SAP using our REST endpoints</text:p>
      <text:p text:style-name="P1"><text:tab/>b. akta line item ki 2bar aste pare ?</text:p>
      <text:p text:style-name="P1"><text:tab/>c. tara ki batch a data send korbe ?</text:p>
      <text:p text:style-name="P1"><text:tab/>d. jodi batch a send kore, tahole amkeo batch a send korte hobe.</text:p>
      <text:p text:style-name="P1"><text:tab/>e. How do they update the line item. As per my understanding, line items are cleared later. In that case to update the line items, some specific fields are provisioned to be updated once. But is should be against an Id what our system will provide them at the time of inserting the line item for the first ti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5T10:32:34.869219607</meta:creation-date>
    <dc:date>2021-07-05T12:31:50.198040050</dc:date>
    <meta:editing-duration>PT1H32M3S</meta:editing-duration>
    <meta:editing-cycles>1</meta:editing-cycles>
    <meta:document-statistic meta:table-count="0" meta:image-count="0" meta:object-count="0" meta:page-count="1" meta:paragraph-count="13" meta:word-count="166" meta:character-count="934" meta:non-whitespace-character-count="770"/>
    <meta:generator>LibreOffice/6.4.7.2$Linux_X86_64 LibreOffice_project/40$Build-2</meta:generator>
  </office:meta>
</office:document-meta>
</file>